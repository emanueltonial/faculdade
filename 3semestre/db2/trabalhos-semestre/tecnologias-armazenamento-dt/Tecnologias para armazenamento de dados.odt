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justify" style:justify-single-word="false"/>
      <style:text-properties fo:color="#c9211e" loext:opacity="100%" fo:font-size="16pt" style:font-size-asian="12pt" style:font-size-complex="12pt"/>
    </style:style>
    <style:style style:name="P2" style:family="paragraph" style:parent-style-name="Text_20_body">
      <style:paragraph-properties fo:margin-top="0cm" fo:margin-bottom="0.046cm" style:contextual-spacing="false" fo:line-height="100%" fo:text-align="justify" style:justify-single-word="false"/>
      <style:text-properties officeooo:paragraph-rsid="00084fe2"/>
    </style:style>
    <style:style style:name="P3" style:family="paragraph" style:parent-style-name="Standard">
      <style:paragraph-properties fo:text-align="justify" style:justify-single-word="false"/>
      <style:text-properties officeooo:paragraph-rsid="003008a1"/>
    </style:style>
    <style:style style:name="P4" style:family="paragraph" style:parent-style-name="Standard">
      <style:paragraph-properties fo:text-align="justify" style:justify-single-word="false"/>
      <style:text-properties officeooo:paragraph-rsid="0033a0a8"/>
    </style:style>
    <style:style style:name="P5" style:family="paragraph" style:parent-style-name="Standard">
      <style:paragraph-properties fo:text-align="justify" style:justify-single-word="false"/>
      <style:text-properties officeooo:rsid="0033a0a8" officeooo:paragraph-rsid="0033a0a8"/>
    </style:style>
    <style:style style:name="P6" style:family="paragraph" style:parent-style-name="Standard">
      <style:paragraph-properties fo:text-align="justify" style:justify-single-word="false"/>
      <style:text-properties officeooo:paragraph-rsid="003740f9"/>
    </style:style>
    <style:style style:name="P7" style:family="paragraph" style:parent-style-name="Standard">
      <style:paragraph-properties fo:text-align="justify" style:justify-single-word="false"/>
      <style:text-properties officeooo:paragraph-rsid="0031e5a0"/>
    </style:style>
    <style:style style:name="P8" style:family="paragraph" style:parent-style-name="Standard">
      <style:paragraph-properties fo:text-align="justify" style:justify-single-word="false"/>
      <style:text-properties fo:font-weight="bold" officeooo:paragraph-rsid="003008a1" style:font-weight-asian="bold" style:font-weight-complex="bold"/>
    </style:style>
    <style:style style:name="P9" style:family="paragraph" style:parent-style-name="Standard">
      <style:paragraph-properties fo:text-align="justify" style:justify-single-word="false"/>
      <style:text-properties officeooo:paragraph-rsid="0037ff83"/>
    </style:style>
    <style:style style:name="P10" style:family="paragraph" style:parent-style-name="Standard">
      <style:paragraph-properties fo:text-align="justify" style:justify-single-word="false"/>
      <style:text-properties officeooo:paragraph-rsid="00203487"/>
    </style:style>
    <style:style style:name="P11" style:family="paragraph" style:parent-style-name="Standard">
      <style:paragraph-properties fo:text-align="justify" style:justify-single-word="false"/>
      <style:text-properties fo:font-weight="bold" officeooo:rsid="003391da" officeooo:paragraph-rsid="003391da" style:font-weight-asian="bold" style:font-weight-complex="bold"/>
    </style:style>
    <style:style style:name="P12" style:family="paragraph" style:parent-style-name="Standard">
      <style:paragraph-properties fo:text-align="justify" style:justify-single-word="false"/>
      <style:text-properties officeooo:rsid="003391da" officeooo:paragraph-rsid="003391da"/>
    </style:style>
    <style:style style:name="P13" style:family="paragraph" style:parent-style-name="Standard">
      <style:paragraph-properties fo:text-align="justify" style:justify-single-word="false"/>
      <style:text-properties officeooo:rsid="003391da" officeooo:paragraph-rsid="0033a0a8"/>
    </style:style>
    <style:style style:name="P14" style:family="paragraph" style:parent-style-name="Standard">
      <style:paragraph-properties fo:text-align="justify" style:justify-single-word="false"/>
      <style:text-properties officeooo:rsid="003391da" officeooo:paragraph-rsid="00339c67"/>
    </style:style>
    <style:style style:name="P15" style:family="paragraph" style:parent-style-name="Standard">
      <style:paragraph-properties fo:text-align="justify" style:justify-single-word="false"/>
      <style:text-properties fo:color="#c9211e" loext:opacity="100%" officeooo:rsid="003391da" officeooo:paragraph-rsid="00339c67"/>
    </style:style>
    <style:style style:name="P16" style:family="paragraph" style:parent-style-name="Standard">
      <style:paragraph-properties fo:text-align="justify" style:justify-single-word="false"/>
      <style:text-properties fo:color="#3465a4" loext:opacity="100%" fo:font-size="14pt" fo:font-weight="bold" officeooo:rsid="00084fe2" officeooo:paragraph-rsid="00084fe2" style:font-weight-asian="bold" style:font-weight-complex="bold"/>
    </style:style>
    <style:style style:name="P17" style:family="paragraph" style:parent-style-name="Standard">
      <style:paragraph-properties fo:text-align="justify" style:justify-single-word="false"/>
      <style:text-properties officeooo:rsid="00084fe2" officeooo:paragraph-rsid="00084fe2"/>
    </style:style>
    <style:style style:name="P18" style:family="paragraph" style:parent-style-name="Standard">
      <style:paragraph-properties fo:text-align="justify" style:justify-single-word="false"/>
      <style:text-properties fo:color="#c9211e" loext:opacity="100%" officeooo:rsid="003d62a5" officeooo:paragraph-rsid="003d39a9"/>
    </style:style>
    <style:style style:name="P19" style:family="paragraph" style:parent-style-name="Standard">
      <style:paragraph-properties fo:text-align="justify" style:justify-single-word="false"/>
      <style:text-properties officeooo:rsid="0038f983" officeooo:paragraph-rsid="003d39a9"/>
    </style:style>
    <style:style style:name="P20" style:family="paragraph" style:parent-style-name="Standard">
      <style:paragraph-properties fo:text-align="justify" style:justify-single-word="false"/>
      <style:text-properties officeooo:rsid="0038f983" officeooo:paragraph-rsid="0038f983"/>
    </style:style>
    <style:style style:name="P21" style:family="paragraph" style:parent-style-name="Standard">
      <style:paragraph-properties fo:text-align="justify" style:justify-single-word="false"/>
      <style:text-properties officeooo:rsid="0038f983" officeooo:paragraph-rsid="0039ef14"/>
    </style:style>
    <style:style style:name="P22" style:family="paragraph" style:parent-style-name="Standard">
      <style:paragraph-properties fo:text-align="justify" style:justify-single-word="false"/>
      <style:text-properties officeooo:rsid="00084fe2" officeooo:paragraph-rsid="002455e1"/>
    </style:style>
    <style:style style:name="P23" style:family="paragraph" style:parent-style-name="Standard">
      <style:paragraph-properties fo:text-align="justify" style:justify-single-word="false"/>
      <style:text-properties fo:color="#3465a4" loext:opacity="100%" fo:font-size="14pt" fo:font-weight="bold" officeooo:rsid="000ae916" officeooo:paragraph-rsid="000ae916" style:font-weight-asian="bold" style:font-weight-complex="bold"/>
    </style:style>
    <style:style style:name="P24" style:family="paragraph" style:parent-style-name="Standard">
      <style:paragraph-properties fo:text-align="justify" style:justify-single-word="false"/>
      <style:text-properties fo:color="#000000" loext:opacity="100%" fo:font-size="12pt" fo:font-weight="normal" officeooo:rsid="003a1eda" officeooo:paragraph-rsid="003a1eda"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officeooo:paragraph-rsid="003a1eda"/>
    </style:style>
    <style:style style:name="P26" style:family="paragraph" style:parent-style-name="Standard">
      <style:paragraph-properties fo:text-align="justify" style:justify-single-word="false"/>
      <style:text-properties fo:color="#3465a4" loext:opacity="100%" fo:font-size="14pt" fo:font-weight="bold" officeooo:rsid="003a1eda" officeooo:paragraph-rsid="003a1eda" style:font-weight-asian="bold" style:font-weight-complex="bold"/>
    </style:style>
    <style:style style:name="P27" style:family="paragraph" style:parent-style-name="Standard">
      <style:paragraph-properties fo:text-align="justify" style:justify-single-word="false"/>
      <style:text-properties fo:color="#000000" loext:opacity="100%" fo:font-size="12pt" fo:font-weight="normal" officeooo:rsid="00084fe2" officeooo:paragraph-rsid="00113db3" style:font-size-asian="12pt" style:font-weight-asian="normal" style:font-size-complex="12pt" style:font-weight-complex="normal"/>
    </style:style>
    <style:style style:name="P28" style:family="paragraph" style:parent-style-name="Standard" style:master-page-name="">
      <style:paragraph-properties fo:text-align="justify" style:justify-single-word="false" style:page-number="auto" fo:break-before="auto" fo:break-after="auto"/>
      <style:text-properties fo:color="#3465a4" loext:opacity="100%" fo:font-size="14pt" fo:font-weight="bold" officeooo:rsid="00084fe2" officeooo:paragraph-rsid="00113db3" style:font-weight-asian="bold" style:font-weight-complex="bold"/>
    </style:style>
    <style:style style:name="P29" style:family="paragraph" style:parent-style-name="Standard">
      <style:paragraph-properties fo:text-align="justify" style:justify-single-word="false"/>
      <style:text-properties officeooo:rsid="00113db3" officeooo:paragraph-rsid="00113db3"/>
    </style:style>
    <style:style style:name="P30" style:family="paragraph" style:parent-style-name="Standard">
      <style:paragraph-properties fo:text-align="justify" style:justify-single-word="false"/>
      <style:text-properties officeooo:rsid="003a4eab" officeooo:paragraph-rsid="003a4eab"/>
    </style:style>
    <style:style style:name="P31" style:family="paragraph" style:parent-style-name="Standard">
      <style:paragraph-properties fo:text-align="justify" style:justify-single-word="false"/>
      <style:text-properties officeooo:rsid="003b6d9b" officeooo:paragraph-rsid="003b6d9b"/>
    </style:style>
    <style:style style:name="P32" style:family="paragraph" style:parent-style-name="Standard">
      <style:paragraph-properties fo:text-align="justify" style:justify-single-word="false"/>
      <style:text-properties officeooo:rsid="003bcae7" officeooo:paragraph-rsid="003bcae7"/>
    </style:style>
    <style:style style:name="T1" style:family="text">
      <style:text-properties officeooo:rsid="003008a1"/>
    </style:style>
    <style:style style:name="T2" style:family="text">
      <style:text-properties officeooo:rsid="003391da"/>
    </style:style>
    <style:style style:name="T3" style:family="text">
      <style:text-properties fo:color="#3465a4" loext:opacity="100%" fo:font-size="16pt" officeooo:rsid="00084fe2"/>
    </style:style>
    <style:style style:name="T4" style:family="text">
      <style:text-properties fo:color="#3465a4" loext:opacity="100%" fo:font-size="14pt" officeooo:rsid="00084fe2"/>
    </style:style>
    <style:style style:name="T5" style:family="text">
      <style:text-properties officeooo:rsid="0033a0a8"/>
    </style:style>
    <style:style style:name="T6" style:family="text">
      <style:text-properties fo:font-weight="bold" style:font-weight-asian="bold" style:font-weight-complex="bold"/>
    </style:style>
    <style:style style:name="T7" style:family="text">
      <style:text-properties fo:font-weight="bold" officeooo:rsid="00354c5d" style:font-weight-asian="bold" style:font-weight-complex="bold"/>
    </style:style>
    <style:style style:name="T8" style:family="text">
      <style:text-properties fo:color="#c9211e" loext:opacity="100%"/>
    </style:style>
    <style:style style:name="T9" style:family="text">
      <style:text-properties fo:color="#c9211e" loext:opacity="100%" officeooo:rsid="003d62a5"/>
    </style:style>
    <style:style style:name="T10" style:family="text">
      <style:text-properties officeooo:rsid="0039ef14"/>
    </style:style>
    <style:style style:name="T11" style:family="text">
      <style:text-properties fo:color="#000080" loext:opacity="100%" style:text-underline-style="solid" style:text-underline-width="auto" style:text-underline-color="font-color" officeooo:rsid="0038f983"/>
    </style:style>
    <style:style style:name="T12" style:family="text">
      <style:text-properties fo:color="#000000" loext:opacity="100%" fo:font-size="12pt" fo:font-weight="normal" style:font-size-asian="12pt" style:font-weight-asian="normal" style:font-size-complex="12pt" style:font-weight-complex="normal"/>
    </style:style>
    <style:style style:name="T13" style:family="text">
      <style:text-properties officeooo:rsid="003b6d9b"/>
    </style:style>
    <style:style style:name="T14" style:family="text">
      <style:text-properties officeooo:rsid="003bca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Tecnologias para armazenamento de dados <text:span text:style-name="T1">e </text:span><text:span text:style-name="T2">máquinas virtuais</text:span></text:h>
      <text:p text:style-name="P2"><text:span text:style-name="Strong_20_Emphasis"><text:span text:style-name="T3"/></text:span></text:p>
      <text:p text:style-name="P2"><text:span text:style-name="Strong_20_Emphasis"><text:span text:style-name="T4">Definição</text:span></text:span></text:p>
      <text:p text:style-name="P3"/>
      <text:p text:style-name="P4">Grandes data centers frequentemente enfrentam desafios significativos relacionados ao desempenho, ao tempo de backup e à manutenção de suas infraestruturas. A crescente demanda por processamento de dados e a necessidade de alta disponibilidade impõem um estresse considerável sobre os sistemas tradicionais de armazenamento. Esses desafios incluem a lentidão no processo de backup, a dificuldade de realizar manutenção sem interromper o serviço e a complexidade em garantir a integridade dos dados. Para mitigar essas dificuldades, surgem soluções avançadas como plataformas de armazenamento rápido, tecnologias de hot swap e sistemas de recuperação facilitada. Essas tecnologias permitem a substituição e atualização de componentes sem a necessidade de desligar o sistema, melhoram a eficiência dos backups e aceleram o acesso aos dados, garantindo que o data center mantenha uma performance otimizada e uma alta disponibilidade. <text:span text:style-name="T5">Este tópico em particular versa sobre as questões de armazenamento: onde e como iremos armazenar nosso banco de dados? Será localmente dentro da empresa? Teremos diferentes máquinas servindo a diferentes bancos de dados? As tecnologias de armazenamento estão dando conta do volume de dados gerado? A performance está satisfatória? Se acontecer algum desastre de perda de disco ou arquivos do sistema operacional ou do banco de dados, o backup consegue ser restaurado em tempo hábil?</text:span></text:p>
      <text:p text:style-name="P4"/>
      <text:p text:style-name="P5">Não são poucas as perguntas. Os tópicos abaixo colocam você frente a algumas soluções que se aproximam das questões acima, para que você comece a entender e a se questionar um pouco sobre tais necessidades.</text:p>
      <text:p text:style-name="P4"><text:line-break/><text:span text:style-name="T6">1. </text:span><text:span text:style-name="T7">Tecnologias de a</text:span><text:span text:style-name="T6">rmazenamento em </text:span><text:span text:style-name="T7">b</text:span><text:span text:style-name="T6">locos</text:span></text:p>
      <text:p text:style-name="P6"><text:line-break/>RAID (Redundant Array of Independent Disks): Combina vários discos para melhorar redundância e desempenho. Diferentes níveis de RAID (RAID 0, 1, 5, 6, 10) oferecem diversas combinações de proteção e velocidade. RAID permite a criação de arranjos de discos que oferecem proteção contra a falha de um ou mais discos, dependendo do nível de RAID utilizado. Por exemplo, RAID 1 (espelhamento) e RAID 5 (paridade distribuída) garantem que os dados não sejam perdidos se um disco falhar, proporcionando maior segurança para os dados. Alguns níveis de RAID podem melhorar o desempenho do sistema ao distribuir as operações de leitura e escrita entre vários discos. Isso resulta em tempos de resposta mais rápidos e maior capacidade de lidar com grandes volumes de dados simultaneamente.</text:p>
      <text:p text:style-name="P6"/>
      <text:p text:style-name="P6">RAID pode combinar a capacidade de vários discos em um único volume lógico. Isso permite criar um armazenamento de grandes volumes sem a necessidade de discos individuais de capacidade imensa, facilitando a expansão e o gerenciamento do espaço de armazenamento.<text:line-break/>Em configurações RAID avançadas, é possível substituir discos defeituosos sem interromper o funcionamento do sistema, especialmente em RAID 5 e RAID 6, que oferecem recuperação automática dos dados após a substituição dos discos falhos.</text:p>
      <text:p text:style-name="P7"/>
      <text:p text:style-name="P7"/>
      <text:p text:style-name="P8">2. Soluções de Armazenamento Flash e SSD</text:p>
      <text:p text:style-name="P3"/>
      <text:p text:style-name="P9">Solid State Drives (SSD): Oferecem alta velocidade de leitura e escrita, sendo cruciais para aplicações que exigem rápido acesso a dados. </text:p>
      <text:p text:style-name="P9"><text:soft-page-break/>NVMe (Non-Volatile Memory Express): Protocolos de comunicação rápida para SSDs, proporcionando velocidades superiores às de SATA SSDs.</text:p>
      <text:p text:style-name="P3"/>
      <text:p text:style-name="P3"/>
      <text:p text:style-name="P8">3. Armazenamento em Nuvem</text:p>
      <text:p text:style-name="P3"/>
      <text:p text:style-name="P3">AWS S3, Google Cloud Storage, Azure Blob Storage: Fornecem armazenamento escalável e seguro, ideal para grandes volumes de dados, com fácil integração aos serviços de nuvem.</text:p>
      <text:p text:style-name="P10"/>
      <text:p text:style-name="P11">4. Máquinas Virtuais</text:p>
      <text:p text:style-name="P12"/>
      <text:p text:style-name="P13">Máquinas virtuais são emulações de sistemas computacionais que permitem executar um sistema operacional e aplicativos como se fossem em um hardware físico. São gerenciadas por um software chamado hipervisor.</text:p>
      <text:p text:style-name="P13"><text:line-break/><text:span text:style-name="T8">Tipos de Hipervisores</text:span></text:p>
      <text:p text:style-name="P14"><text:line-break/>Tipo 1 (Bare-Metal): Corre diretamente no hardware físico. Exemplos: VMware ESXi, Microsoft Hyper-V, Xen.</text:p>
      <text:p text:style-name="P14"><text:line-break/>Tipo 2 (Hosted): Corre sobre um sistema operacional anfitrião. Exemplos: VMware Workstation, Oracle VirtualBox.</text:p>
      <text:p text:style-name="P14"><text:line-break/><text:span text:style-name="T8">Vantagens</text:span></text:p>
      <text:p text:style-name="P14">Isolamento: VMs operam independentemente, garantindo segurança.</text:p>
      <text:p text:style-name="P14">Flexibilidade: Facilita a execução de diferentes sistemas operacionais.</text:p>
      <text:p text:style-name="P14">Eficiência: Permite melhor utilização do hardware físico.</text:p>
      <text:p text:style-name="P14">Escalabilidade: Facilita a expansão de recursos conforme a necessidade.</text:p>
      <text:p text:style-name="P14"/>
      <text:p text:style-name="P14"><text:span text:style-name="T8">Usos</text:span> <text:span text:style-name="T8">Comuns</text:span></text:p>
      <text:p text:style-name="P14">Teste e Desenvolvimento: Ambientes isolados para testar novos softwares.</text:p>
      <text:p text:style-name="P14">Consolidação de Servidores: Reduz o número de servidores físicos necessários.</text:p>
      <text:p text:style-name="P14">Recuperação de Desastres: Backup e restauração rápida de sistemas.</text:p>
      <text:p text:style-name="P14"/>
      <text:p text:style-name="P14"><text:span text:style-name="T8">Desvantagens</text:span><text:line-break/>Desempenho: Pode ser inferior ao do hardware físico nativo devido à sobrecarga do hipervisor.</text:p>
      <text:p text:style-name="P14">Gerenciamento de Recursos: Requer ferramentas adicionais para gerenciar eficientemente múltiplas</text:p>
      <text:p text:style-name="P14">Vms. </text:p>
      <text:p text:style-name="P14"/>
      <text:p text:style-name="P15">Tecnologias Populares</text:p>
      <text:p text:style-name="P14">VMware: Amplamente utilizado em ambientes empresariais.</text:p>
      <text:p text:style-name="P14">Microsoft Hyper-V: Integrado ao Windows Server. </text:p>
      <text:p text:style-name="P14">Oracle VirtualBox: Popular para uso em desktops.</text:p>
      <text:p text:style-name="P10"/>
      <text:p text:style-name="P16"/>
      <text:p text:style-name="P16"/>
      <text:p text:style-name="P16"/>
      <text:p text:style-name="P16"/>
      <text:p text:style-name="P16"/>
      <text:p text:style-name="P16"/>
      <text:p text:style-name="P16"/>
      <text:p text:style-name="P16"><text:soft-page-break/>Vídeo-aulas</text:p>
      <text:p text:style-name="P17"/>
      <text:p text:style-name="P18">Disclaimer: alguns vídeos podem conter opiniões que não são, exatamente, iguais às minhas como professor ou iguais às da comunidade científica, o que não invalida as questões técnicas neles abordadas.</text:p>
      <text:p text:style-name="P19"><text:span text:style-name="T9"/></text:p>
      <text:p text:style-name="P19">Canal Youtube FourServ – Tecnologia RAID</text:p>
      <text:p text:style-name="P20"><text:a xlink:type="simple" xlink:href="https://youtu.be/p2xOGfncB48" text:style-name="Internet_20_link" text:visited-style-name="Visited_20_Internet_20_Link">https://youtu.be/p2xOGfncB48</text:a></text:p>
      <text:p text:style-name="P20"/>
      <text:p text:style-name="P20">Canal Youtube SimplificandoTI – Tecnologia RAID</text:p>
      <text:p text:style-name="P20"><text:a xlink:type="simple" xlink:href="https://youtu.be/4Wm0rvOsoRA" text:style-name="Internet_20_link" text:visited-style-name="Visited_20_Internet_20_Link">https://youtu.be/4Wm0rvOsoRA</text:a> </text:p>
      <text:p text:style-name="P17"/>
      <text:p text:style-name="P20">Canal Youtube SimplificandoTI – Virtualização - <text:span text:style-name="T10">Conceituação</text:span></text:p>
      <text:p text:style-name="P20"><text:a xlink:type="simple" xlink:href="https://youtu.be/FLhv_JcnYlU" text:style-name="Internet_20_link" text:visited-style-name="Visited_20_Internet_20_Link">https://youtu.be/FLhv_JcnYlU</text:a> </text:p>
      <text:p text:style-name="P20"/>
      <text:p text:style-name="P21">Canal Youtube SimplificandoTI – Virtualização – <text:span text:style-name="T10">Implementação</text:span></text:p>
      <text:p text:style-name="P21"><text:a xlink:type="simple" xlink:href="https://youtu.be/80ZTRE529W8" text:style-name="Internet_20_link" text:visited-style-name="Visited_20_Internet_20_Link">https://youtu.be/80ZTRE529W8</text:a></text:p>
      <text:p text:style-name="P21"/>
      <text:p text:style-name="P22"/>
      <text:p text:style-name="P23">Links </text:p>
      <text:p text:style-name="P23"/>
      <text:p text:style-name="P24">IBM RAID</text:p>
      <text:p text:style-name="P25"><text:a xlink:type="simple" xlink:href="https://www.ibm.com/docs/pt/power7?topic=POWER7/p7hb1l/iphb1raid.html" text:style-name="Internet_20_link" text:visited-style-name="Visited_20_Internet_20_Link"><text:span text:style-name="T11">https://www.ibm.com/docs/pt/power7?topic=POWER7/p7hb1l/iphb1raid.html</text:span></text:a></text:p>
      <text:p text:style-name="P26"><text:span text:style-name="T12"/></text:p>
      <text:p text:style-name="P24">CISCO RAID</text:p>
      <text:p text:style-name="P25"><text:a xlink:type="simple" xlink:href="https://www.cisco.com/c/en/us/td/docs/unified_computing/ucs/c/sw/raid/configuration/guide/b_cisco-ucs-servers-raid-guide.html" text:style-name="Internet_20_link" text:visited-style-name="Visited_20_Internet_20_Link"><text:span text:style-name="T11">https://www.cisco.com/c/en/us/td/docs/unified_computing/ucs/c/sw/raid/configuration/guide/b_cisco-ucs-servers-raid-guide.html</text:span></text:a></text:p>
      <text:p text:style-name="P24"/>
      <text:p text:style-name="P24">INTEL RAID</text:p>
      <text:p text:style-name="P24"><text:a xlink:type="simple" xlink:href="https://www.intel.com.br/content/www/br/pt/products/details/servers/raid/raid-controllers.html" text:style-name="Internet_20_link" text:visited-style-name="Visited_20_Internet_20_Link">https://www.intel.com.br/content/www/br/pt/products/details/servers/raid/raid-controllers.html</text:a></text:p>
      <text:p text:style-name="P24"/>
      <text:p text:style-name="P24">HP RAID</text:p>
      <text:p text:style-name="P24"><text:a xlink:type="simple" xlink:href="https://www.hp.com/br-pt/shop/tech-takes/configurar-raid-windows-10" text:style-name="Internet_20_link" text:visited-style-name="Visited_20_Internet_20_Link">https://www.hp.com/br-pt/shop/tech-takes/configurar-raid-windows-10</text:a></text:p>
      <text:p text:style-name="P24"/>
      <text:p text:style-name="P27"/>
      <text:p text:style-name="P28">Questões</text:p>
      <text:p text:style-name="P29"/>
      <text:p text:style-name="P30">1) Afinal de contas, qual a necessidade que uma empresa teria de implementar algum nível de RAID em seus servidores?</text:p>
      <text:p text:style-name="P30"/>
      <text:p text:style-name="P30">2) Ora, mas se a empresa tem uma boa política de backup, as tecnologias RAID não seriam desnecessárias? Afinal de contas, se eu tiver um problema com um servidor ou com um disco, basta eu restaurar o backup.</text:p>
      <text:p text:style-name="P30"/>
      <text:p text:style-name="P30">3) <text:span text:style-name="T13">Se você não encontrou nos textos lidos, dê uma consultada na internet para escrever o que significa o conceito de Hot Swap com relação às tecnologias RAID.</text:span></text:p>
      <text:p text:style-name="P30"/>
      <text:p text:style-name="P31">4) Virtualização parece ser uma solução perfeita, já que permite que, se compramos uma máquina servidora super poderosa, todos os sistemas instalados nela vão aproveitar ao máximo seus recursos de hardware. <text:span text:style-name="T14">Correto? Ou existem desvantagens? Se existem, quais você citaria?</text:span></text:p>
      <text:p text:style-name="P31"/>
      <text:p text:style-name="P32"><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8T09:11:59.781000000</meta:creation-date>
    <dc:date>2025-04-04T14:05:22.526000000</dc:date>
    <meta:editing-duration>PT9H33M10S</meta:editing-duration>
    <meta:editing-cycles>55</meta:editing-cycles>
    <meta:generator>LibreOffice/24.8.4.2$Windows_X86_64 LibreOffice_project/bb3cfa12c7b1bf994ecc5649a80400d06cd71002</meta:generator>
    <meta:document-statistic meta:table-count="0" meta:image-count="0" meta:object-count="0" meta:page-count="3" meta:paragraph-count="58" meta:word-count="895" meta:character-count="6552" meta:non-whitespace-character-count="5696"/>
  </office:meta>
</office:document-meta>
</file>