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text-align="justify" style:justify-single-word="false"/>
      <style:text-properties officeooo:paragraph-rsid="003fd580"/>
    </style:style>
    <style:style style:name="P2" style:family="paragraph" style:parent-style-name="Text_20_body">
      <style:paragraph-properties fo:text-align="justify" style:justify-single-word="false"/>
      <style:text-properties officeooo:paragraph-rsid="0042700b"/>
    </style:style>
    <style:style style:name="P3" style:family="paragraph" style:parent-style-name="Text_20_body">
      <style:paragraph-properties fo:text-align="justify" style:justify-single-word="false"/>
      <style:text-properties officeooo:paragraph-rsid="003fd580"/>
    </style:style>
    <style:style style:name="P4" style:family="paragraph" style:parent-style-name="Text_20_body">
      <style:paragraph-properties fo:text-align="start" style:justify-single-word="false"/>
      <style:text-properties officeooo:paragraph-rsid="0040ab52"/>
    </style:style>
    <style:style style:name="P5" style:family="paragraph" style:parent-style-name="Text_20_body">
      <style:paragraph-properties fo:text-align="justify" style:justify-single-word="false"/>
      <style:text-properties officeooo:paragraph-rsid="0040ab52"/>
    </style:style>
    <style:style style:name="P6" style:family="paragraph" style:parent-style-name="Text_20_body">
      <style:paragraph-properties fo:text-align="justify" style:justify-single-word="false"/>
      <style:text-properties officeooo:paragraph-rsid="00427307"/>
    </style:style>
    <style:style style:name="P7" style:family="paragraph" style:parent-style-name="Standard">
      <style:paragraph-properties fo:text-align="justify" style:justify-single-word="false"/>
      <style:text-properties fo:color="#3465a4" loext:opacity="100%" fo:font-size="14pt" fo:font-weight="bold" officeooo:rsid="00084fe2" officeooo:paragraph-rsid="00084fe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084fe2" officeooo:paragraph-rsid="00084fe2"/>
    </style:style>
    <style:style style:name="P9" style:family="paragraph" style:parent-style-name="Standard">
      <style:paragraph-properties fo:text-align="justify" style:justify-single-word="false"/>
      <style:text-properties fo:color="#c9211e" loext:opacity="100%" officeooo:rsid="003d62a5" officeooo:paragraph-rsid="003d62a5"/>
    </style:style>
    <style:style style:name="P10" style:family="paragraph" style:parent-style-name="Standard">
      <style:paragraph-properties fo:text-align="justify" style:justify-single-word="false"/>
      <style:text-properties officeooo:rsid="0038f983" officeooo:paragraph-rsid="0038f983"/>
    </style:style>
    <style:style style:name="P11" style:family="paragraph" style:parent-style-name="Standard">
      <style:paragraph-properties fo:text-align="justify" style:justify-single-word="false"/>
      <style:text-properties officeooo:rsid="0044dc72" officeooo:paragraph-rsid="0044dc72"/>
    </style:style>
    <style:style style:name="P12" style:family="paragraph" style:parent-style-name="Standard">
      <style:paragraph-properties fo:text-align="justify" style:justify-single-word="false"/>
      <style:text-properties officeooo:rsid="0044dc72" officeooo:paragraph-rsid="00462ae8"/>
    </style:style>
    <style:style style:name="P13" style:family="paragraph" style:parent-style-name="Standard">
      <style:paragraph-properties fo:text-align="justify" style:justify-single-word="false"/>
      <style:text-properties officeooo:paragraph-rsid="0046df8c"/>
    </style:style>
    <style:style style:name="P14" style:family="paragraph" style:parent-style-name="Standard">
      <style:paragraph-properties fo:text-align="justify" style:justify-single-word="false"/>
      <style:text-properties officeooo:rsid="0046df8c" officeooo:paragraph-rsid="0046df8c"/>
    </style:style>
    <style:style style:name="P15" style:family="paragraph" style:parent-style-name="Standard">
      <style:paragraph-properties fo:text-align="justify" style:justify-single-word="false"/>
      <style:text-properties officeooo:rsid="00084fe2" officeooo:paragraph-rsid="003d62a5"/>
    </style:style>
    <style:style style:name="P16" style:family="paragraph" style:parent-style-name="Standard">
      <style:paragraph-properties fo:text-align="justify" style:justify-single-word="false"/>
      <style:text-properties fo:color="#3465a4" loext:opacity="100%" fo:font-size="14pt" fo:font-weight="bold" officeooo:rsid="000ae916" officeooo:paragraph-rsid="000ae916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fo:font-size="12pt" fo:font-weight="normal" officeooo:rsid="00483686" officeooo:paragraph-rsid="0048368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fo:font-size="12pt" fo:font-weight="normal" officeooo:rsid="00084fe2" officeooo:paragraph-rsid="0048368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fo:font-size="12pt" fo:font-weight="normal" officeooo:rsid="00084fe2" officeooo:paragraph-rsid="003db4a4" style:font-size-asian="12pt" style:font-weight-asian="normal" style:font-size-complex="12pt" style:font-weight-complex="normal"/>
    </style:style>
    <style:style style:name="P20" style:family="paragraph" style:parent-style-name="Standard" style:master-page-name="">
      <style:paragraph-properties fo:text-align="justify" style:justify-single-word="false" style:page-number="auto" fo:break-before="auto" fo:break-after="auto"/>
      <style:text-properties fo:color="#3465a4" loext:opacity="100%" fo:font-size="14pt" fo:font-weight="bold" officeooo:rsid="00084fe2" officeooo:paragraph-rsid="00113db3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rsid="00113db3" officeooo:paragraph-rsid="00113db3"/>
    </style:style>
    <style:style style:name="P22" style:family="paragraph" style:parent-style-name="Standard">
      <style:paragraph-properties fo:text-align="justify" style:justify-single-word="false"/>
      <style:text-properties officeooo:rsid="00490b7c" officeooo:paragraph-rsid="00490b7c"/>
    </style:style>
    <style:style style:name="P23" style:family="paragraph" style:parent-style-name="Standard">
      <style:paragraph-properties fo:text-align="justify" style:justify-single-word="false"/>
      <style:text-properties officeooo:rsid="004b4e9c" officeooo:paragraph-rsid="004b4e9c"/>
    </style:style>
    <style:style style:name="P24" style:family="paragraph" style:parent-style-name="Standard">
      <style:paragraph-properties fo:text-align="justify" style:justify-single-word="false"/>
      <style:text-properties officeooo:rsid="003e8e73" officeooo:paragraph-rsid="003db4a4"/>
    </style:style>
    <style:style style:name="T1" style:family="text">
      <style:text-properties fo:color="#000000" loext:opacity="100%" style:font-name="Liberation Serif" fo:font-size="16pt" officeooo:rsid="00084fe2" style:font-name-asian="NSimSun" style:font-size-asian="12pt" style:font-name-complex="Lucida Sans1" style:font-size-complex="12pt"/>
    </style:style>
    <style:style style:name="T2" style:family="text">
      <style:text-properties fo:color="#3465a4" loext:opacity="100%" fo:font-size="14pt" officeooo:rsid="00084fe2" style:font-size-asian="12pt" style:font-size-complex="12pt"/>
    </style:style>
    <style:style style:name="T3" style:family="text">
      <style:text-properties fo:color="#000000" loext:opacity="100%" fo:font-size="12pt" fo:font-weight="normal" officeooo:rsid="00084fe2" style:font-size-asian="12pt" style:font-weight-asian="normal" style:font-size-complex="12pt" style:font-weight-complex="normal"/>
    </style:style>
    <style:style style:name="T4" style:family="text">
      <style:text-properties fo:color="#000000" loext:opacity="100%" fo:font-size="12pt" officeooo:rsid="00084fe2" style:font-size-asian="12pt" style:font-size-complex="12pt"/>
    </style:style>
    <style:style style:name="T5" style:family="text">
      <style:text-properties fo:color="#c9211e" loext:opacity="100%" fo:font-size="12pt" fo:font-weight="normal" officeooo:rsid="00084fe2" style:font-size-asian="12pt" style:font-weight-asian="normal" style:font-size-complex="12pt" style:font-weight-complex="normal"/>
    </style:style>
    <style:style style:name="T6" style:family="text">
      <style:text-properties fo:color="#000000" loext:opacity="100%" fo:font-size="12pt" fo:font-weight="bold" officeooo:rsid="00084fe2" style:font-size-asian="12pt" style:font-weight-asian="bold" style:font-size-complex="12pt" style:font-weight-complex="bold"/>
    </style:style>
    <style:style style:name="T7" style:family="text">
      <style:text-properties fo:color="#3465a4" loext:opacity="100%" fo:font-size="14pt" officeooo:rsid="00084fe2"/>
    </style:style>
    <style:style style:name="T8" style:family="text">
      <style:text-properties officeooo:rsid="00462ae8"/>
    </style:style>
    <style:style style:name="T9" style:family="text">
      <style:text-properties officeooo:rsid="0046df8c"/>
    </style:style>
    <style:style style:name="T10" style:family="text">
      <style:text-properties officeooo:rsid="004a43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<text:span text:style-name="Strong_20_Emphasis"><text:span text:style-name="T1">Bancos de Dados NoSQL</text:span></text:span></text:h>
      <text:p text:style-name="P2"><text:span text:style-name="Strong_20_Emphasis"><text:span text:style-name="T2"/></text:span></text:p>
      <text:p text:style-name="P2"><text:span text:style-name="Strong_20_Emphasis"><text:span text:style-name="T2">Definição</text:span></text:span></text:p>
      <text:p text:style-name="P2"><text:span text:style-name="Strong_20_Emphasis"><text:span text:style-name="T3">Os Bancos de Dados NoSQL (Not Only SQL) surgiram como uma alternativa aos bancos de dados relacionais tradicionais (SQL) para atender às necessidades de aplicações que requerem alta escalabilidade, flexibilidade e desempenho. Eles são projetados para lidar com grandes volumes de dados, especialmente dados não estruturados ou semi-estruturados, e são amplamente utilizados em ambientes de big data, computação em nuvem e aplicações web de alta demanda. </text:span></text:span></text:p>
      <text:p text:style-name="P3"><text:span text:style-name="Strong_20_Emphasis"><text:span text:style-name="T4"/></text:span></text:p>
      <text:p text:style-name="P4"><text:span text:style-name="Strong_20_Emphasis"><text:span text:style-name="T5">Características dos Bancos de Dados NoSQL</text:span></text:span></text:p>
      <text:p text:style-name="P5"><text:span text:style-name="Strong_20_Emphasis"><text:span text:style-name="T6">Escalabilidade Horizontal</text:span></text:span><text:span text:style-name="Strong_20_Emphasis"><text:span text:style-name="T3">: Eles são projetados para escalar horizontalmente, ou seja, podem ser facilmente distribuídos em vários servidores, o que permite o aumento da capacidade de armazenamento e processamento conforme necessário.</text:span></text:span></text:p>
      <text:p text:style-name="P5"><text:span text:style-name="Strong_20_Emphasis"><text:span text:style-name="T3"><text:line-break/></text:span></text:span><text:span text:style-name="Strong_20_Emphasis"><text:span text:style-name="T6">Flexibilidade de Esquema</text:span></text:span><text:span text:style-name="Strong_20_Emphasis"><text:span text:style-name="T3">: Diferente dos bancos de dados relacionais que exigem um esquema fixo, os NoSQL permitem esquemas flexíveis, o que facilita a adaptação a mudanças nos dados sem a necessidade de redefinir toda a estrutura do banco de dados.</text:span></text:span></text:p>
      <text:p text:style-name="P5"><text:span text:style-name="Strong_20_Emphasis"><text:span text:style-name="T3"><text:line-break/></text:span></text:span><text:span text:style-name="Strong_20_Emphasis"><text:span text:style-name="T6">Alta Disponibilidade</text:span></text:span><text:span text:style-name="Strong_20_Emphasis"><text:span text:style-name="T3">: Muitos bancos de dados NoSQL são construídos para garantir alta disponibilidade e tolerância a falhas, utilizando replicação e particionamento de dados.</text:span></text:span></text:p>
      <text:p text:style-name="P5"><text:span text:style-name="Strong_20_Emphasis"><text:span text:style-name="T3"><text:line-break/></text:span></text:span><text:span text:style-name="Strong_20_Emphasis"><text:span text:style-name="T6">Desempenho</text:span></text:span><text:span text:style-name="Strong_20_Emphasis"><text:span text:style-name="T3">: Projetados para operações de leitura e escrita rápidas, eles são ideais para aplicações que exigem baixo tempo de resposta.</text:span></text:span></text:p>
      <text:p text:style-name="P5"><text:span text:style-name="Strong_20_Emphasis"><text:span text:style-name="T3"/></text:span></text:p>
      <text:p text:style-name="P2"><text:span text:style-name="Strong_20_Emphasis"><text:span text:style-name="T5">Tipos de Bancos de Dados NoSQL</text:span></text:span></text:p>
      <text:p text:style-name="P2"><text:span text:style-name="Strong_20_Emphasis"><text:span text:style-name="T6">Bancos de Dados de Documentos</text:span></text:span><text:span text:style-name="Strong_20_Emphasis"><text:span text:style-name="T3">: Armazenam dados em formato de documentos, como JSON, BSON ou XML. Cada documento é uma unidade independente que pode conter dados complexos e aninhados. Exemplos incluem MongoDB e CouchDB.</text:span></text:span></text:p>
      <text:p text:style-name="P2"><text:span text:style-name="Strong_20_Emphasis"><text:span text:style-name="T3"><text:line-break/></text:span></text:span><text:span text:style-name="Strong_20_Emphasis"><text:span text:style-name="T6">Bancos de Dados de Colunas</text:span></text:span><text:span text:style-name="Strong_20_Emphasis"><text:span text:style-name="T3">: Armazenam dados em colunas em vez de linhas. Isso é ideal para consultas que precisam acessar um grande número de dados em uma única coluna. Exemplos incluem Apache Cassandra e HBase.</text:span></text:span></text:p>
      <text:p text:style-name="P2"><text:span text:style-name="Strong_20_Emphasis"><text:span text:style-name="T3"><text:line-break/></text:span></text:span><text:span text:style-name="Strong_20_Emphasis"><text:span text:style-name="T6">Bancos de Dados Chave-Valor</text:span></text:span><text:span text:style-name="Strong_20_Emphasis"><text:span text:style-name="T3">: Armazenam dados como pares chave-valor, onde cada chave é única e mapeia diretamente para um valor. Exemplos incluem Redis, DynamoDB e Riak.</text:span></text:span></text:p>
      <text:p text:style-name="P2"><text:span text:style-name="Strong_20_Emphasis"><text:span text:style-name="T3"><text:line-break/></text:span></text:span><text:span text:style-name="Strong_20_Emphasis"><text:span text:style-name="T6">Bancos de Dados de Grafos</text:span></text:span><text:span text:style-name="Strong_20_Emphasis"><text:span text:style-name="T3">: Especializados em armazenar e consultar relações complexas entre </text:span></text:span><text:soft-page-break/><text:span text:style-name="Strong_20_Emphasis"><text:span text:style-name="T3">dados. São usados em aplicações que envolvem redes sociais, recomendações e análise de redes. Exemplos incluem Neo4j e ArangoDB.</text:span></text:span></text:p>
      <text:p text:style-name="P5"><text:span text:style-name="Strong_20_Emphasis"><text:span text:style-name="T3"/></text:span></text:p>
      <text:p text:style-name="P6"><text:span text:style-name="Strong_20_Emphasis"><text:span text:style-name="T5">Exemplos de Aplicações</text:span></text:span></text:p>
      <text:p text:style-name="P6"><text:span text:style-name="Strong_20_Emphasis"><text:span text:style-name="T6">Redes Sociais</text:span></text:span><text:span text:style-name="Strong_20_Emphasis"><text:span text:style-name="T3">: Onde a estrutura de dados é complexa e muda frequentemente.</text:span></text:span></text:p>
      <text:p text:style-name="P6"><text:span text:style-name="Strong_20_Emphasis"><text:span text:style-name="T6">E-commerce</text:span></text:span><text:span text:style-name="Strong_20_Emphasis"><text:span text:style-name="T3">: Para armazenar catálogos de produtos e carrinhos de compra.</text:span></text:span></text:p>
      <text:p text:style-name="P6"><text:span text:style-name="Strong_20_Emphasis"><text:span text:style-name="T6">Internet das Coisas (IoT)</text:span></text:span><text:span text:style-name="Strong_20_Emphasis"><text:span text:style-name="T3">: Para gerenciar grandes volumes de dados gerados por dispositivos.</text:span></text:span></text:p>
      <text:p text:style-name="P6"><text:span text:style-name="Strong_20_Emphasis"><text:span text:style-name="T6">Análise de Dados em Tempo Real</text:span></text:span><text:span text:style-name="Strong_20_Emphasis"><text:span text:style-name="T3">: Onde a velocidade e a capacidade de escalar rapidamente são cruciais.</text:span></text:span></text:p>
      <text:p text:style-name="P6"><text:span text:style-name="Strong_20_Emphasis"><text:span text:style-name="T3"/></text:span></text:p>
      <text:p text:style-name="P6"><text:span text:style-name="Strong_20_Emphasis"><text:span text:style-name="T5">Desvantagens e Desafios</text:span></text:span></text:p>
      <text:p text:style-name="P6"><text:span text:style-name="Strong_20_Emphasis"><text:span text:style-name="T6">Consistência vs. Disponibilidade</text:span></text:span><text:span text:style-name="Strong_20_Emphasis"><text:span text:style-name="T3">: Muitos bancos de dados NoSQL seguem o teorema CAP (Consistência, Disponibilidade e Tolerância à Partição) e, muitas vezes, optam por disponibilidade e tolerância à partição em detrimento da consistência imediata.</text:span></text:span></text:p>
      <text:p text:style-name="P6"><text:span text:style-name="Strong_20_Emphasis"><text:span text:style-name="T3"><text:line-break/></text:span></text:span><text:span text:style-name="Strong_20_Emphasis"><text:span text:style-name="T6">Falta de Padrões</text:span></text:span><text:span text:style-name="Strong_20_Emphasis"><text:span text:style-name="T3">: A ausência de um padrão SQL pode levar a desafios na integração e migração de dados entre diferentes sistemas NoSQL.</text:span></text:span></text:p>
      <text:p text:style-name="P6"><text:span text:style-name="Strong_20_Emphasis"><text:span text:style-name="T3"><text:line-break/></text:span></text:span><text:span text:style-name="Strong_20_Emphasis"><text:span text:style-name="T6">Complexidade de Gerenciamento</text:span></text:span><text:span text:style-name="Strong_20_Emphasis"><text:span text:style-name="T3">: A gestão de bancos de dados NoSQL pode ser complexa, especialmente em ambientes distribuídos.</text:span></text:span></text:p>
      <text:h text:style-name="P1" text:outline-level="4"><text:span text:style-name="Strong_20_Emphasis"><text:span text:style-name="T7"/></text:span></text:h>
      <text:p text:style-name="P7">Vídeo-aulas</text:p>
      <text:p text:style-name="P8"/>
      <text:p text:style-name="P9">Disclaimer: alguns vídeos podem conter opiniões que não são, exatamente, iguais às minhas como professor ou iguais às da comunidade científica, o que não invalida as questões técnicas neles abordadas.</text:p>
      <text:p text:style-name="P10"/>
      <text:p text:style-name="P11">Canal Youtube Garagem do Inventor – Bancos de Dados NoSQL</text:p>
      <text:p text:style-name="P11"><text:a xlink:type="simple" xlink:href="https://youtu.be/fySiDsKVZY0" text:style-name="Internet_20_link" text:visited-style-name="Visited_20_Internet_20_Link">https://youtu.be/fySiDsKVZY0</text:a></text:p>
      <text:p text:style-name="P11"/>
      <text:p text:style-name="P12">Canal Youtube <text:span text:style-name="T8">Código Fonte TV</text:span> – Bancos de Dados NoSQL</text:p>
      <text:p text:style-name="P12"><text:a xlink:type="simple" xlink:href="https://youtu.be/1B64oqE8PLs" text:style-name="Internet_20_link" text:visited-style-name="Visited_20_Internet_20_Link">https://youtu.be/1B64oqE8PLs</text:a></text:p>
      <text:p text:style-name="P12"/>
      <text:p text:style-name="P13"><text:span text:style-name="T9">Canal Youtube Dicionário de Informática </text:span>– Bancos de Dados NoSQL</text:p>
      <text:p text:style-name="P14"><text:a xlink:type="simple" xlink:href="https://youtu.be/n5BtvGW8rPw" text:style-name="Internet_20_link" text:visited-style-name="Visited_20_Internet_20_Link">https://youtu.be/n5BtvGW8rPw</text:a></text:p>
      <text:p text:style-name="P14"/>
      <text:p text:style-name="P15"/>
      <text:p text:style-name="P16">Links </text:p>
      <text:p text:style-name="P16"/>
      <text:p text:style-name="P17">Mongo DB</text:p>
      <text:p text:style-name="P17"><text:a xlink:type="simple" xlink:href="https://www.mongodb.com/" text:style-name="Internet_20_link" text:visited-style-name="Visited_20_Internet_20_Link">https://www.mongodb.com/</text:a></text:p>
      <text:p text:style-name="P17"/>
      <text:p text:style-name="P17"><text:soft-page-break/>Apache Cassandra</text:p>
      <text:p text:style-name="P17"><text:a xlink:type="simple" xlink:href="https://cassandra.apache.org/_/index.html" text:style-name="Internet_20_link" text:visited-style-name="Visited_20_Internet_20_Link">https://cassandra.apache.org/_/index.html</text:a></text:p>
      <text:p text:style-name="P17"/>
      <text:p text:style-name="P17">Redis</text:p>
      <text:p text:style-name="P17"><text:a xlink:type="simple" xlink:href="https://redis.io/enterprise" text:style-name="Internet_20_link" text:visited-style-name="Visited_20_Internet_20_Link">https://redis.io/enterprise</text:a></text:p>
      <text:p text:style-name="P17"/>
      <text:p text:style-name="P17">Apache HBase</text:p>
      <text:p text:style-name="P17"><text:a xlink:type="simple" xlink:href="https://docs.tecnisys.com.br/tdp/2.1.0/03-tdp-conceitos/tdp-hbase.html" text:style-name="Internet_20_link" text:visited-style-name="Visited_20_Internet_20_Link">https://docs.tecnisys.com.br/tdp/2.1.0/03-tdp-conceitos/tdp-hbase.html</text:a></text:p>
      <text:p text:style-name="P18"/>
      <text:p text:style-name="P19"/>
      <text:p text:style-name="P20">Questões</text:p>
      <text:p text:style-name="P21"/>
      <text:p text:style-name="P22">1) <text:span text:style-name="T10">Os bancos de dados NoSQL armazenam informações não-estruturadas, ao contrário dos bancos de dados relacionais onde as informações estão estruturadas. Mas o que significa “estruturar” as informações? o que seria uma “estrutura” ?</text:span></text:p>
      <text:p text:style-name="P22"/>
      <text:p text:style-name="P23">2) Qual o critério para você escolher implementar em uma empresa um banco de dados relacional ou um banco de dados NoSQL?</text:p>
      <text:p text:style-name="P23"/>
      <text:p text:style-name="P23">3) Cite alguns tipos de aplicação para as quais são mais indicados os bancos de dados NoSQL e alguns tipos de aplicação para as quais são mais indicados bancos de dados relacionais.</text:p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8T09:11:59.781000000</meta:creation-date>
    <dc:date>2025-04-04T14:12:00.918000000</dc:date>
    <meta:editing-duration>PT10H23M35S</meta:editing-duration>
    <meta:editing-cycles>71</meta:editing-cycles>
    <meta:generator>LibreOffice/24.8.4.2$Windows_X86_64 LibreOffice_project/bb3cfa12c7b1bf994ecc5649a80400d06cd71002</meta:generator>
    <meta:document-statistic meta:table-count="0" meta:image-count="0" meta:object-count="0" meta:page-count="3" meta:paragraph-count="43" meta:word-count="617" meta:character-count="4277" meta:non-whitespace-character-count="3690"/>
  </office:meta>
</office:document-meta>
</file>