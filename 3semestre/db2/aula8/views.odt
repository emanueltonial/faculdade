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39849" officeooo:paragraph-rsid="00139849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7ba59" officeooo:paragraph-rsid="0017ba59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39849" officeooo:paragraph-rsid="00162e14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4d504" officeooo:paragraph-rsid="0014d504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90b3e" officeooo:paragraph-rsid="00190b3e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ccefe" officeooo:paragraph-rsid="001ccefe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2001da" officeooo:paragraph-rsid="002001da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20a653" officeooo:paragraph-rsid="0020a653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236a17" officeooo:paragraph-rsid="00236a17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24c20c" officeooo:paragraph-rsid="0024c20c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24e6e6" officeooo:paragraph-rsid="0024e6e6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2814a2" officeooo:paragraph-rsid="002814a2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24e6e6" officeooo:paragraph-rsid="002814a2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285eb1" officeooo:paragraph-rsid="00285eb1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14d504" officeooo:paragraph-rsid="00285eb1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2d66e1" officeooo:paragraph-rsid="002d66e1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3090c8" officeooo:paragraph-rsid="003090c8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312c0c" officeooo:paragraph-rsid="00312c0c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2d66e1" officeooo:paragraph-rsid="00337875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2fea8c" officeooo:paragraph-rsid="002d66e1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35630a" officeooo:paragraph-rsid="0035630a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2fea8c" officeooo:paragraph-rsid="0035630a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418141" officeooo:paragraph-rsid="00418141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3090c8" officeooo:paragraph-rsid="00418141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312c0c" officeooo:paragraph-rsid="00418141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2d66e1" officeooo:paragraph-rsid="00418141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fo:font-size="12pt" officeooo:rsid="0035630a" officeooo:paragraph-rsid="00418141" style:font-size-asian="16pt" style:font-size-complex="16pt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42f27f" style:font-size-asian="16pt"/>
    </style:style>
    <style:style style:name="T3" style:family="text">
      <style:text-properties fo:font-size="16pt" officeooo:rsid="00139849" style:font-size-asian="16pt"/>
    </style:style>
    <style:style style:name="T4" style:family="text">
      <style:text-properties officeooo:rsid="0017ba59"/>
    </style:style>
    <style:style style:name="T5" style:family="text">
      <style:text-properties officeooo:rsid="00162e14"/>
    </style:style>
    <style:style style:name="T6" style:family="text">
      <style:text-properties officeooo:rsid="001b9785"/>
    </style:style>
    <style:style style:name="T7" style:family="text">
      <style:text-properties officeooo:rsid="001bdc22"/>
    </style:style>
    <style:style style:name="T8" style:family="text">
      <style:text-properties officeooo:rsid="0024e6e6"/>
    </style:style>
    <style:style style:name="T9" style:family="text">
      <style:text-properties style:font-name="Courier New1"/>
    </style:style>
    <style:style style:name="T10" style:family="text">
      <style:text-properties style:font-name="Courier New1" officeooo:rsid="002697d7"/>
    </style:style>
    <style:style style:name="T11" style:family="text">
      <style:text-properties officeooo:rsid="00217109"/>
    </style:style>
    <style:style style:name="T12" style:family="text">
      <style:text-properties officeooo:rsid="00223638"/>
    </style:style>
    <style:style style:name="T13" style:family="text">
      <style:text-properties officeooo:rsid="002697d7"/>
    </style:style>
    <style:style style:name="T14" style:family="text">
      <style:text-properties fo:font-weight="bold" officeooo:rsid="00223638" style:font-weight-asian="bold" style:font-weight-complex="bold"/>
    </style:style>
    <style:style style:name="T15" style:family="text">
      <style:text-properties officeooo:rsid="00279581"/>
    </style:style>
    <style:style style:name="T16" style:family="text">
      <style:text-properties officeooo:rsid="00236a17"/>
    </style:style>
    <style:style style:name="T17" style:family="text">
      <style:text-properties fo:font-weight="bold" officeooo:rsid="00236a17" style:font-weight-asian="bold" style:font-weight-complex="bold"/>
    </style:style>
    <style:style style:name="T18" style:family="text">
      <style:text-properties fo:font-size="12pt" officeooo:rsid="002814a2" style:font-size-asian="16pt" style:font-size-complex="16pt"/>
    </style:style>
    <style:style style:name="T19" style:family="text">
      <style:text-properties fo:font-size="12pt" officeooo:rsid="0024e6e6" style:font-size-asian="16pt" style:font-size-complex="16pt"/>
    </style:style>
    <style:style style:name="T20" style:family="text">
      <style:text-properties fo:font-size="16pt"/>
    </style:style>
    <style:style style:name="T21" style:family="text">
      <style:text-properties officeooo:rsid="0032d2b3"/>
    </style:style>
    <style:style style:name="T22" style:family="text">
      <style:text-properties officeooo:rsid="00337875"/>
    </style:style>
    <style:style style:name="T23" style:family="text">
      <style:text-properties officeooo:rsid="002fea8c"/>
    </style:style>
    <style:style style:name="T24" style:family="text">
      <style:text-properties officeooo:rsid="0044af49"/>
    </style:style>
    <style:style style:name="T25" style:family="text">
      <style:text-properties officeooo:rsid="0033aa67"/>
    </style:style>
    <style:style style:name="T26" style:family="text">
      <style:text-properties officeooo:rsid="00372f2c"/>
    </style:style>
    <style:style style:name="T27" style:family="text">
      <style:text-properties officeooo:rsid="00418141"/>
    </style:style>
    <style:style style:name="T28" style:family="text">
      <style:text-properties officeooo:rsid="0039ca81"/>
    </style:style>
    <style:style style:name="T29" style:family="text">
      <style:text-properties officeooo:rsid="003c0f22"/>
    </style:style>
    <style:style style:name="T30" style:family="text">
      <style:text-properties officeooo:rsid="003db1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ercício</text:span><text:span text:style-name="T2">s</text:span><text:span text:style-name="T1"> </text:span><text:span text:style-name="T3">sobre Views</text:span></text:p>
      <text:p text:style-name="P1"><text:span text:style-name="T3"/></text:p>
      <text:p text:style-name="P2">Neste primeiro exemplo, criaremos uma view sobre uma consulta SQL que relaciona as tabelas CIDADE e CLIENTE do esquema EOR no banco Oracle.</text:p>
      <text:p text:style-name="P2"/>
      <text:p text:style-name="P2"/>
      <text:p text:style-name="P2">sqlplus eor/eor</text:p>
      <text:p text:style-name="P2"/>
      <text:p text:style-name="P3">col rs format a30</text:p>
      <text:p text:style-name="P3"/>
      <text:p text:style-name="P2">create <text:span text:style-name="T4">or replace </text:span>view VCLI as</text:p>
      <text:p text:style-name="P4">select <text:tab/>cli. cod_cliente <text:span text:style-name="T5">CODCLI</text:span>, </text:p>
      <text:p text:style-name="P4"><text:tab/>cli.razao_social <text:span text:style-name="T5">RS</text:span>, </text:p>
      <text:p text:style-name="P4"><text:tab/>cli.data_cadastro <text:span text:style-name="T5">DTCAD</text:span>, </text:p>
      <text:p text:style-name="P4"><text:tab/>cid.descricao <text:span text:style-name="T5">CIDADE</text:span>, </text:p>
      <text:p text:style-name="P4"><text:tab/>cid.uf <text:span text:style-name="T5">UF</text:span></text:p>
      <text:p text:style-name="P2">from cliente cli, cidade cid</text:p>
      <text:p text:style-name="P3">where cli.cod_cidade = cid.cod_cidade</text:p>
      <text:p text:style-name="P2">order by cli.razao_social;</text:p>
      <text:p text:style-name="P2"/>
      <text:p text:style-name="P5">select * from vcli;</text:p>
      <text:p text:style-name="P5"/>
      <text:p text:style-name="P3">select * from vcli </text:p>
      <text:p text:style-name="P3">where CODCLI = 3499;</text:p>
      <text:p text:style-name="P3"/>
      <text:p text:style-name="P6"/>
      <text:p text:style-name="P6">Observe que nesta última consulta à view, que filtra pelo código do cliente, o filtro refere-se ao CODCLI e não ao COD_CLIENTE, isso porque renomeamos COD_CLIENTE para CODCLI na criação da view, então ela passa a referenciar tal coluna como CODCLI. Isso permitiria que a estrutura das tabelas subjacentes (cliente e cidade) fosse alterada, <text:span text:style-name="T6">em alguns casos,</text:span> sem afetar a view. Até mesmo o nome dos campos <text:span text:style-name="T7">selecionados </text:span>poderia ser alterado, sendo necessário somente recriar a view, nesse caso, sem ter que alterar códigos de programação dentro dos programas/aplicativos. </text:p>
      <text:p text:style-name="P6"/>
      <text:p text:style-name="P7">Essa característica das views está mais relacionada à abstração e à consistência dos dados. No exemplo seguinte veremos qual a relação das views com o aspecto da segurança da informação.</text:p>
      <text:p text:style-name="P7"/>
      <text:p text:style-name="P7"/>
      <text:p text:style-name="P8">Imagine que exista a necessidade do usuário <text:span text:style-name="T8">eor</text:span> acessar a tabela <text:span text:style-name="T8">t</text:span>cliente<text:span text:style-name="T8">s</text:span> do usuário <text:span text:style-name="T8">pos</text:span>. Seria fácil concedermos acesso à tabela através do comando <text:span text:style-name="T9">grant select on </text:span><text:span text:style-name="T10">t</text:span><text:span text:style-name="T9">cliente</text:span><text:span text:style-name="T10">s</text:span><text:span text:style-name="T9"> to </text:span><text:span text:style-name="T10">eor</text:span><text:span text:style-name="T9">; </text:span></text:p>
      <text:p text:style-name="P8"/>
      <text:p text:style-name="P9">Porém, ao fazer isso, concederíamos acesso a todos os campos da tabela, e não é isso que queremos afinal o usuário da aplicação em questão somente precisa fazer uso dos campos Código do Cliente e Razão Social <text:span text:style-name="T11">e não seria uma boa ideia conceder acesso ao endereço e nem ao telefone dos clientes </text:span><text:span text:style-name="T12">para tal usuário </text:span><text:span text:style-name="T13">já que o diretor comercial não quer isso</text:span>. <text:span text:style-name="T12">Resolvemos isso através da criação de uma view e da concessão de acesso </text:span><text:span text:style-name="T14">à view </text:span><text:span text:style-name="T12">ao usuário </text:span><text:span text:style-name="T15">eor</text:span><text:span text:style-name="T12"> </text:span><text:span text:style-name="T16">e não </text:span><text:span text:style-name="T17">à tabela</text:span><text:span text:style-name="T16"> </text:span><text:span text:style-name="T15">t</text:span><text:span text:style-name="T16">clientes</text:span>.</text:p>
      <text:p text:style-name="P9"/>
      <text:p text:style-name="P10"/>
      <text:p text:style-name="P10"/>
      <text:p text:style-name="P10"/>
      <text:p text:style-name="P10"><text:soft-page-break/>conn <text:span text:style-name="T8">pos</text:span>/<text:span text:style-name="T8">pos</text:span></text:p>
      <text:p text:style-name="P10"/>
      <text:p text:style-name="P11">create or replace view VCLIRS as</text:p>
      <text:p text:style-name="P11">select cod_cli, <text:span text:style-name="T8">descricao</text:span></text:p>
      <text:p text:style-name="P11">from <text:span text:style-name="T8">t</text:span>cliente<text:span text:style-name="T8">s</text:span>;</text:p>
      <text:p text:style-name="P11"/>
      <text:p text:style-name="P12">conn eor/eor</text:p>
      <text:p text:style-name="P12"/>
      <text:p text:style-name="P12">select * from pos.vclirs;</text:p>
      <text:p text:style-name="P12"/>
      <text:p text:style-name="P13">Funcionou o acesso?</text:p>
      <text:p text:style-name="P13">___________________________</text:p>
      <text:p text:style-name="P13"/>
      <text:p text:style-name="P13">Por quê?</text:p>
      <text:p text:style-name="P13">___________________________________________________________</text:p>
      <text:p text:style-name="P13"/>
      <text:p text:style-name="P13"/>
      <text:p text:style-name="P13">conn pos/pos</text:p>
      <text:p text:style-name="P13"/>
      <text:p text:style-name="P13">grant select on vclirs to eor;</text:p>
      <text:p text:style-name="P13"/>
      <text:p text:style-name="P13"/>
      <text:p text:style-name="P13">conn eor/eor</text:p>
      <text:p text:style-name="P14"/>
      <text:p text:style-name="P14">select * from pos.vclirs;</text:p>
      <text:p text:style-name="P14"/>
      <text:p text:style-name="P13">Mas minha aplicação não pode enxergar os dados qualificando a tabela pelo nome do usuário, por alguma razão. Para isso, podemos ainda criar sinônimos.</text:p>
      <text:p text:style-name="P13"/>
      <text:p text:style-name="P13"/>
      <text:p text:style-name="P13">conn eor/eor</text:p>
      <text:p text:style-name="P14"/>
      <text:p text:style-name="P14">select * from vclirs;</text:p>
      <text:p text:style-name="P14"/>
      <text:p text:style-name="P13">Funcionou o acesso?</text:p>
      <text:p text:style-name="P13">___________________________</text:p>
      <text:p text:style-name="P13"/>
      <text:p text:style-name="P13">Por quê?</text:p>
      <text:p text:style-name="P13">___________________________________________________________</text:p>
      <text:p text:style-name="P13"/>
      <text:p text:style-name="P13"/>
      <text:p text:style-name="P13">conn eor/eor</text:p>
      <text:p text:style-name="P14"/>
      <text:p text:style-name="P13">create synonym vclirs for pos.vclirs;</text:p>
      <text:p text:style-name="P14"><text:span text:style-name="T18"/></text:p>
      <text:p text:style-name="P14">select * from vclirs;</text:p>
      <text:p text:style-name="P13"><text:span text:style-name="T19"/></text:p>
      <text:p text:style-name="P15"><text:span text:style-name="T8">s</text:span>elect * from user_synonyms;</text:p>
      <text:p text:style-name="P16"/>
      <text:p text:style-name="P17"><text:soft-page-break/><text:span text:style-name="T20">Exercícios</text:span>:</text:p>
      <text:p text:style-name="P17"/>
      <text:p text:style-name="P18">1) Criar uma view chamada VCLITEL que selecione somente os campos COD_CLIENTE, RAZAO_SOCIAL e TELEFONE da tabela CLIENTE.</text:p>
      <text:p text:style-name="P18"/>
      <text:p text:style-name="P19">2) Criar uma view chamada VPRODINAT que seleciona todos os códigos de produtos <text:span text:style-name="T21">com suas descrições </text:span>e suas quantidades para todos os produtos que estejam inativos.</text:p>
      <text:p text:style-name="P19"/>
      <text:p text:style-name="P20"><text:span text:style-name="T22">3</text:span>) Criar uma view chamada VFAT<text:span text:style-name="T23">_</text:span><text:span text:style-name="T24">AL</text:span><text:span text:style-name="T23">_BIM1_</text:span>2004 que selecione a data da venda, o código do cliente, a razão social dele, o código do produto, a descrição do produto e a quantidade vendida <text:s/>de todas as vendas realizadas por clientes de <text:span text:style-name="T22">AL</text:span> <text:span text:style-name="T22">no primeiro bimestre de </text:span>2004 <text:span text:style-name="T25">ordenando por data de venda de forma descendente</text:span>;</text:p>
      <text:p text:style-name="P21"/>
      <text:p text:style-name="P22">4) <text:span text:style-name="T26">Criar uma view </text:span><text:span text:style-name="T27">chamada VFAT_NE_JAN2024 </text:span><text:span text:style-name="T26">que mostre os mesmos dados da view </text:span><text:span text:style-name="T28">anterior</text:span><text:span text:style-name="T26">, </text:span><text:span text:style-name="T28">porém somente para clientes </text:span><text:span text:style-name="T29">de AL, PE, CE e RN </text:span><text:span text:style-name="T28">e que tenham comprado produtos que estejam </text:span><text:span text:style-name="T30">atualmente </text:span><text:span text:style-name="T28">com estoque entre 0 e </text:span><text:span text:style-name="T30">5</text:span><text:span text:style-name="T28"> unidades </text:span><text:span text:style-name="T30">e cuja compra foi realizada em janeiro de 2024, em ordem descendente de data, e dentro do dia em ordem ascendente de razão social</text:span><text:span text:style-name="T28">.</text:span></text:p>
      <text:p text:style-name="P23"/>
      <text:p text:style-name="P24">5) Alterar a view anterior para incluir somente produtos cujas vendas foram maiores de 5 unidades mostrando a quantidade atual de estoque também no select. </text:p>
      <text:p text:style-name="P24"/>
      <text:p text:style-name="P24">6) O usuário POS precisa acessar todas essas views exatamente com o nome abaixo. São elas:</text:p>
      <text:p text:style-name="P24"/>
      <text:p text:style-name="P25">VCLITEL</text:p>
      <text:p text:style-name="P26">VPRODINAT</text:p>
      <text:p text:style-name="P27">VFAT<text:span text:style-name="T23">_</text:span><text:span text:style-name="T24">AL</text:span><text:span text:style-name="T23">_BIM1_</text:span>2004 </text:p>
      <text:p text:style-name="P24">VFAT_NE_JAN2024</text:p>
      <text:p text:style-name="P28"/>
      <text:p text:style-name="P24">Para isso, crie sinônimos no usuários POS para acesso às referidas views. Lembre-se que para isso o usuário POS precisa ter privilégio de acesso às tabelas e às views. 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cm" fo:margin-bottom="1.7cm" fo:margin-left="1.101cm" fo:margin-right="0.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AE - Faculdade Anglicana de Erechim</dc:title>
    <meta:initial-creator>Berbau</meta:initial-creator>
    <meta:creation-date>2007-05-21T14:21:00</meta:creation-date>
    <dc:date>2025-06-11T21:18:38.239000000</dc:date>
    <meta:editing-cycles>136</meta:editing-cycles>
    <meta:editing-duration>PT11H40M58S</meta:editing-duration>
    <meta:generator>LibreOffice/24.8.4.2$Windows_X86_64 LibreOffice_project/bb3cfa12c7b1bf994ecc5649a80400d06cd71002</meta:generator>
    <meta:document-statistic meta:table-count="0" meta:image-count="0" meta:object-count="0" meta:page-count="3" meta:paragraph-count="57" meta:word-count="638" meta:character-count="4024" meta:non-whitespace-character-count="3427"/>
  </office:meta>
</office:document-meta>
</file>