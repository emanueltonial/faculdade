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justify" style:justify-single-word="false"/>
      <style:text-properties fo:color="#c9211e" loext:opacity="100%" fo:font-size="16pt" style:font-size-asian="12pt" style:font-size-complex="12pt"/>
    </style:style>
    <style:style style:name="P2" style:family="paragraph" style:parent-style-name="Text_20_body">
      <style:paragraph-properties fo:margin-top="0cm" fo:margin-bottom="0.046cm" style:contextual-spacing="false" fo:line-height="100%" fo:text-align="justify" style:justify-single-word="false"/>
      <style:text-properties officeooo:paragraph-rsid="00084fe2"/>
    </style:style>
    <style:style style:name="P3" style:family="paragraph" style:parent-style-name="Standard">
      <style:paragraph-properties fo:text-align="justify" style:justify-single-word="false"/>
      <style:text-properties officeooo:paragraph-rsid="003008a1"/>
    </style:style>
    <style:style style:name="P4" style:family="paragraph" style:parent-style-name="Text_20_body">
      <style:paragraph-properties fo:text-align="justify" style:justify-single-word="false"/>
      <style:text-properties fo:font-weight="normal" officeooo:paragraph-rsid="0033a0a8"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margin-top="0cm" fo:margin-bottom="0cm" style:contextual-spacing="false"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Standard">
      <style:paragraph-properties fo:text-align="justify" style:justify-single-word="false"/>
      <style:text-properties fo:color="#3465a4" loext:opacity="100%" fo:font-size="14pt" fo:font-weight="bold" officeooo:rsid="00084fe2" officeooo:paragraph-rsid="0033a0a8" style:font-weight-asian="bold" style:font-weight-complex="bold"/>
    </style:style>
    <style:style style:name="P9" style:family="paragraph" style:parent-style-name="Standard">
      <style:paragraph-properties fo:text-align="justify" style:justify-single-word="false"/>
      <style:text-properties fo:color="#3465a4" loext:opacity="100%" fo:font-size="14pt" fo:font-weight="bold" officeooo:rsid="00084fe2" officeooo:paragraph-rsid="00084fe2" style:font-weight-asian="bold" style:font-weight-complex="bold"/>
    </style:style>
    <style:style style:name="P10" style:family="paragraph" style:parent-style-name="Standard">
      <style:paragraph-properties fo:text-align="justify" style:justify-single-word="false"/>
      <style:text-properties officeooo:rsid="00084fe2" officeooo:paragraph-rsid="00084fe2"/>
    </style:style>
    <style:style style:name="P11" style:family="paragraph" style:parent-style-name="Standard">
      <style:paragraph-properties fo:text-align="justify" style:justify-single-word="false"/>
      <style:text-properties fo:color="#c9211e" loext:opacity="100%" officeooo:rsid="003d62a5" officeooo:paragraph-rsid="003d62a5"/>
    </style:style>
    <style:style style:name="P12" style:family="paragraph" style:parent-style-name="Standard">
      <style:paragraph-properties fo:text-align="justify" style:justify-single-word="false"/>
      <style:text-properties officeooo:rsid="0038f983" officeooo:paragraph-rsid="0038f983"/>
    </style:style>
    <style:style style:name="P13" style:family="paragraph" style:parent-style-name="Standard">
      <style:paragraph-properties fo:text-align="justify" style:justify-single-word="false"/>
      <style:text-properties officeooo:rsid="003d62a5" officeooo:paragraph-rsid="003d62a5"/>
    </style:style>
    <style:style style:name="P14" style:family="paragraph" style:parent-style-name="Standard">
      <style:paragraph-properties fo:text-align="justify" style:justify-single-word="false"/>
      <style:text-properties officeooo:rsid="003db4a4" officeooo:paragraph-rsid="003db4a4"/>
    </style:style>
    <style:style style:name="P15" style:family="paragraph" style:parent-style-name="Standard">
      <style:paragraph-properties fo:text-align="justify" style:justify-single-word="false"/>
      <style:text-properties officeooo:rsid="0038f983" officeooo:paragraph-rsid="003db4a4"/>
    </style:style>
    <style:style style:name="P16" style:family="paragraph" style:parent-style-name="Standard">
      <style:paragraph-properties fo:text-align="justify" style:justify-single-word="false"/>
      <style:text-properties officeooo:rsid="00084fe2" officeooo:paragraph-rsid="002455e1"/>
    </style:style>
    <style:style style:name="P17" style:family="paragraph" style:parent-style-name="Standard">
      <style:paragraph-properties fo:text-align="justify" style:justify-single-word="false"/>
      <style:text-properties fo:color="#3465a4" loext:opacity="100%" fo:font-size="14pt" fo:font-weight="bold" officeooo:rsid="000ae916" officeooo:paragraph-rsid="000ae916" style:font-weight-asian="bold" style:font-weight-complex="bold"/>
    </style:style>
    <style:style style:name="P18" style:family="paragraph" style:parent-style-name="Standard">
      <style:paragraph-properties fo:text-align="justify" style:justify-single-word="false"/>
      <style:text-properties fo:color="#000000" loext:opacity="100%" fo:font-size="12pt" fo:font-weight="normal" officeooo:rsid="003db4a4" officeooo:paragraph-rsid="003db4a4"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loext:opacity="100%" fo:font-size="12pt" fo:font-weight="normal" officeooo:rsid="00084fe2" officeooo:paragraph-rsid="00113db3" style:font-size-asian="12pt" style:font-weight-asian="normal" style:font-size-complex="12pt" style:font-weight-complex="normal"/>
    </style:style>
    <style:style style:name="P20" style:family="paragraph" style:parent-style-name="Standard" style:master-page-name="">
      <style:paragraph-properties fo:text-align="justify" style:justify-single-word="false" style:page-number="auto" fo:break-before="auto" fo:break-after="auto"/>
      <style:text-properties fo:color="#3465a4" loext:opacity="100%" fo:font-size="14pt" fo:font-weight="bold" officeooo:rsid="00084fe2" officeooo:paragraph-rsid="00113db3" style:font-weight-asian="bold" style:font-weight-complex="bold"/>
    </style:style>
    <style:style style:name="P21" style:family="paragraph" style:parent-style-name="Standard">
      <style:paragraph-properties fo:text-align="justify" style:justify-single-word="false"/>
      <style:text-properties officeooo:rsid="00113db3" officeooo:paragraph-rsid="00113db3"/>
    </style:style>
    <style:style style:name="P22" style:family="paragraph" style:parent-style-name="Standard">
      <style:paragraph-properties fo:text-align="justify" style:justify-single-word="false"/>
      <style:text-properties officeooo:rsid="003e8e73" officeooo:paragraph-rsid="003e8e73"/>
    </style:style>
    <style:style style:name="T1" style:family="text">
      <style:text-properties officeooo:rsid="003d62a5"/>
    </style:style>
    <style:style style:name="T2" style:family="text">
      <style:text-properties fo:color="#3465a4" loext:opacity="100%" fo:font-size="16pt" officeooo:rsid="00084fe2"/>
    </style:style>
    <style:style style:name="T3" style:family="text">
      <style:text-properties fo:color="#3465a4" loext:opacity="100%" fo:font-size="14pt" officeooo:rsid="00084fe2"/>
    </style:style>
    <style:style style:name="T4" style:family="text">
      <style:text-properties fo:font-style="italic" style:font-style-asian="italic" style:font-style-complex="italic"/>
    </style:style>
    <style:style style:name="T5" style:family="text">
      <style:text-properties officeooo:rsid="003e8e7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B<text:span text:style-name="T1">ancos de </text:span>D<text:span text:style-name="T1">ado</text:span>s em nuvem</text:h>
      <text:p text:style-name="P2"><text:span text:style-name="Strong_20_Emphasis"><text:span text:style-name="T2"/></text:span></text:p>
      <text:p text:style-name="P2"><text:span text:style-name="Strong_20_Emphasis"><text:span text:style-name="T3">Definição</text:span></text:span></text:p>
      <text:p text:style-name="P3"/>
      <text:p text:style-name="P4">Bancos de dados em nuvem são sistemas de gerenciamento de banco de dados (SGBD) que são oferecidos como serviços baseados na nuvem, permitindo o armazenamento, gerenciamento e recuperação de dados por meio da internet. Essas soluções eliminam a necessidade de manter infraestrutura física própria, oferecendo escalabilidade, flexibilidade e acessibilidade.</text:p>
      <text:p text:style-name="P5">Principais características dos bancos de dados em nuvem incluem:</text:p>
      <text:list text:style-name="L1">
        <text:list-item>
          <text:p text:style-name="P6"><text:span text:style-name="Strong_20_Emphasis">Escalabilidade</text:span>: Capacidade de aumentar ou diminuir recursos conforme a demanda.</text:p>
        </text:list-item>
        <text:list-item>
          <text:p text:style-name="P6"><text:span text:style-name="Strong_20_Emphasis">Acessibilidade</text:span>: Acesso aos dados de qualquer lugar com conexão à internet.</text:p>
        </text:list-item>
        <text:list-item>
          <text:p text:style-name="P6"><text:span text:style-name="Strong_20_Emphasis">Custos</text:span>: Modelo de pagamento baseado no uso, que pode ser mais econômico do que manter infraestrutura própria.</text:p>
        </text:list-item>
        <text:list-item>
          <text:p text:style-name="P6"><text:span text:style-name="Strong_20_Emphasis">Segurança</text:span>: Fornecedores de serviços em nuvem oferecem diversas camadas de segurança, embora seja essencial considerar as melhores práticas de segurança de dados.</text:p>
        </text:list-item>
        <text:list-item>
          <text:p text:style-name="P6"><text:span text:style-name="Strong_20_Emphasis">Backup e Recuperação</text:span>: Ferramentas integradas para backup e recuperação de dados, garantindo a continuidade do negócio.</text:p>
        </text:list-item>
        <text:list-item>
          <text:p text:style-name="P7"><text:span text:style-name="Strong_20_Emphasis">Gerenciamento Simplificado</text:span>: Redução da complexidade de administração do banco de dados, já que muitas tarefas são automatizadas ou gerenciadas pelo provedor de serviços.</text:p>
        </text:list-item>
      </text:list>
      <text:p text:style-name="P5">Os principais provedores de bancos de dados em nuvem incluem Amazon Web Services (AWS) com Amazon RDS, Microsoft Azure com Azure SQL Database, e Google Cloud Platform com Google Cloud SQL. Esses serviços suportam diferentes tipos de bancos de dados, incluindo relacionais (SQL) e não relacionais (NoSQL).</text:p>
      <text:p text:style-name="P8"/>
      <text:p text:style-name="P9">Vídeo-aulas</text:p>
      <text:p text:style-name="P10"/>
      <text:p text:style-name="P11">Disclaimer: alguns vídeos podem conter opiniões que não são, exatamente, iguais às minhas como professor ou iguais às da comunidade científica, o que não invalida as questões técnicas neles abordadas.</text:p>
      <text:p text:style-name="P12"/>
      <text:p text:style-name="P13">Canal Youtube Garagem do Inventor – Bancos de Dados em Nuvem</text:p>
      <text:p text:style-name="P13"><text:a xlink:type="simple" xlink:href="https://youtu.be/6SVwygschaM" text:style-name="Internet_20_link" text:visited-style-name="Visited_20_Internet_20_Link">https://youtu.be/6SVwygschaM</text:a></text:p>
      <text:p text:style-name="P13"/>
      <text:p text:style-name="P14">Canal Youtube Transformação Digital – Criação de um banco de dados em nuvem</text:p>
      <text:p text:style-name="P14"><text:a xlink:type="simple" xlink:href="https://youtu.be/M-ejk69T86g" text:style-name="Internet_20_link" text:visited-style-name="Visited_20_Internet_20_Link">https://youtu.be/M-ejk69T86g</text:a></text:p>
      <text:p text:style-name="P15"/>
      <text:p text:style-name="P16"/>
      <text:p text:style-name="P17">Links </text:p>
      <text:p text:style-name="P17"/>
      <text:p text:style-name="P18">Amazon Web Services</text:p>
      <text:p text:style-name="P18"><text:a xlink:type="simple" xlink:href="https://aws.amazon.com/" text:style-name="Internet_20_link" text:visited-style-name="Visited_20_Internet_20_Link">https://aws.amazon.com/</text:a></text:p>
      <text:p text:style-name="P18"/>
      <text:p text:style-name="P18">Microsoft Azure</text:p>
      <text:p text:style-name="P18"><text:a xlink:type="simple" xlink:href="https://azure.microsoft.com/pt-br/" text:style-name="Internet_20_link" text:visited-style-name="Visited_20_Internet_20_Link">https://azure.microsoft.com/pt-br/</text:a></text:p>
      <text:p text:style-name="P18"/>
      <text:p text:style-name="P18"><text:soft-page-break/>Google Cloud Platform</text:p>
      <text:p text:style-name="P18"><text:a xlink:type="simple" xlink:href="https://cloud.google.com/" text:style-name="Internet_20_link" text:visited-style-name="Visited_20_Internet_20_Link">https://cloud.google.com/</text:a></text:p>
      <text:p text:style-name="P18"/>
      <text:p text:style-name="P19"/>
      <text:p text:style-name="P20">Questões</text:p>
      <text:p text:style-name="P21"/>
      <text:p text:style-name="P14">1) Afinal, qual o conceito de “Nuvem” e por que tem esse nome?</text:p>
      <text:p text:style-name="P14"/>
      <text:p text:style-name="P22">2) Talvez nos vídeos e conteúdos vistos, não tenhamos abordado o conceito de <text:span text:style-name="T4">outsourcing</text:span>. O que vem a ser <text:span text:style-name="T4">outsourcing </text:span>no contexto da Tecnologia da Informação?</text:p>
      <text:p text:style-name="P22"/>
      <text:p text:style-name="P14"><text:span text:style-name="T5">3</text:span>) <text:span text:style-name="T5">Se termos nossos dados na Nuvem é vantajoso, tanto que grandes empresas (se não as maiores de informática do mundo) fornecem soluções para isso, por que algumas empresas optam em não possuir soluções em nuvem? Certamente há algumas razões principais.</text:span></text:p>
      <text:p text:style-name="P22"><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8T09:11:59.781000000</meta:creation-date>
    <dc:date>2025-04-04T14:07:14.113000000</dc:date>
    <meta:editing-duration>PT9H54M3S</meta:editing-duration>
    <meta:editing-cycles>57</meta:editing-cycles>
    <meta:generator>LibreOffice/24.8.4.2$Windows_X86_64 LibreOffice_project/bb3cfa12c7b1bf994ecc5649a80400d06cd71002</meta:generator>
    <meta:document-statistic meta:table-count="0" meta:image-count="0" meta:object-count="0" meta:page-count="2" meta:paragraph-count="29" meta:word-count="364" meta:character-count="2506" meta:non-whitespace-character-count="2172"/>
  </office:meta>
</office:document-meta>
</file>