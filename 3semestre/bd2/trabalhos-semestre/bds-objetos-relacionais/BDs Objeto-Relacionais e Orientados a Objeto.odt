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color="#c9211e" loext:opacity="100%" fo:font-size="16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officeooo:paragraph-rsid="00084fe2"/>
    </style:style>
    <style:style style:name="P3" style:family="paragraph" style:parent-style-name="Text_20_body">
      <style:paragraph-properties fo:margin-top="0cm" fo:margin-bottom="0.046cm" style:contextual-spacing="false" fo:line-height="100%" fo:text-align="justify" style:justify-single-word="false"/>
      <style:text-properties officeooo:paragraph-rsid="00084fe2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203487"/>
    </style:style>
    <style:style style:name="P6" style:family="paragraph" style:parent-style-name="Standard">
      <style:paragraph-properties fo:text-align="justify" style:justify-single-word="false"/>
      <style:text-properties officeooo:paragraph-rsid="00203487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20348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81d41a" loext:opacity="100%" fo:font-weight="bold" officeooo:paragraph-rsid="0020348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1d41a" loext:opacity="100%" fo:font-weight="bold" officeooo:paragraph-rsid="0020348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3465a4" loext:opacity="100%" fo:font-size="14pt" fo:font-weight="bold" officeooo:rsid="00084fe2" officeooo:paragraph-rsid="00084fe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84fe2" officeooo:paragraph-rsid="00084fe2"/>
    </style:style>
    <style:style style:name="P12" style:family="paragraph" style:parent-style-name="Standard">
      <style:paragraph-properties fo:text-align="justify" style:justify-single-word="false"/>
      <style:text-properties fo:color="#c9211e" loext:opacity="100%" officeooo:rsid="003d62a5" officeooo:paragraph-rsid="002e8787"/>
    </style:style>
    <style:style style:name="P13" style:family="paragraph" style:parent-style-name="Standard">
      <style:paragraph-properties fo:text-align="justify" style:justify-single-word="false"/>
      <style:text-properties officeooo:rsid="0021e146" officeooo:paragraph-rsid="002e8787"/>
    </style:style>
    <style:style style:name="P14" style:family="paragraph" style:parent-style-name="Standard">
      <style:paragraph-properties fo:text-align="justify" style:justify-single-word="false"/>
      <style:text-properties officeooo:rsid="0022563a" officeooo:paragraph-rsid="002455e1"/>
    </style:style>
    <style:style style:name="P15" style:family="paragraph" style:parent-style-name="Standard">
      <style:paragraph-properties fo:text-align="justify" style:justify-single-word="false"/>
      <style:text-properties officeooo:rsid="0022563a" officeooo:paragraph-rsid="0022563a"/>
    </style:style>
    <style:style style:name="P16" style:family="paragraph" style:parent-style-name="Standard">
      <style:paragraph-properties fo:text-align="justify" style:justify-single-word="false"/>
      <style:text-properties officeooo:paragraph-rsid="002455e1"/>
    </style:style>
    <style:style style:name="P17" style:family="paragraph" style:parent-style-name="Standard">
      <style:paragraph-properties fo:text-align="justify" style:justify-single-word="false"/>
      <style:text-properties officeooo:paragraph-rsid="00258414"/>
    </style:style>
    <style:style style:name="P18" style:family="paragraph" style:parent-style-name="Standard">
      <style:paragraph-properties fo:text-align="justify" style:justify-single-word="false"/>
      <style:text-properties officeooo:rsid="00250c05" officeooo:paragraph-rsid="00258414"/>
    </style:style>
    <style:style style:name="P19" style:family="paragraph" style:parent-style-name="Standard">
      <style:paragraph-properties fo:text-align="justify" style:justify-single-word="false"/>
      <style:text-properties fo:color="#3465a4" loext:opacity="100%" fo:font-size="14pt" fo:font-weight="bold" officeooo:rsid="000ae916" officeooo:paragraph-rsid="000ae91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rsid="000ae916" officeooo:paragraph-rsid="000ae91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3465a4" loext:opacity="100%" fo:font-size="12pt" fo:font-weight="bold" officeooo:rsid="000ae916" officeooo:paragraph-rsid="000ae916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3465a4" loext:opacity="100%" fo:font-size="14pt" fo:font-weight="bold" officeooo:rsid="00084fe2" officeooo:paragraph-rsid="00113db3" style:font-weight-asian="bold" style:font-weight-complex="bold"/>
    </style:style>
    <style:style style:name="P23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fo:color="#3465a4" loext:opacity="100%" fo:font-size="14pt" fo:font-weight="bold" officeooo:rsid="00084fe2" officeooo:paragraph-rsid="00113db3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0113db3" officeooo:paragraph-rsid="00113db3"/>
    </style:style>
    <style:style style:name="P25" style:family="paragraph" style:parent-style-name="Standard">
      <style:paragraph-properties fo:text-align="justify" style:justify-single-word="false"/>
      <style:text-properties officeooo:rsid="0026fd57" officeooo:paragraph-rsid="002bc763"/>
    </style:style>
    <style:style style:name="P26" style:family="paragraph" style:parent-style-name="Standard">
      <style:paragraph-properties fo:text-align="justify" style:justify-single-word="false"/>
      <style:text-properties officeooo:rsid="0026fd57" officeooo:paragraph-rsid="0026fd57"/>
    </style:style>
    <style:style style:name="P27" style:family="paragraph" style:parent-style-name="Standard">
      <style:paragraph-properties fo:text-align="justify" style:justify-single-word="false"/>
      <style:text-properties officeooo:rsid="00297d33" officeooo:paragraph-rsid="00297d33"/>
    </style:style>
    <style:style style:name="P28" style:family="paragraph" style:parent-style-name="Standard">
      <style:paragraph-properties fo:text-align="justify" style:justify-single-word="false"/>
      <style:text-properties officeooo:rsid="002c5ae6" officeooo:paragraph-rsid="0026fd57"/>
    </style:style>
    <style:style style:name="P29" style:family="paragraph" style:parent-style-name="Standard">
      <style:paragraph-properties fo:text-align="justify" style:justify-single-word="false"/>
      <style:text-properties officeooo:rsid="002c7701" officeooo:paragraph-rsid="002c7701"/>
    </style:style>
    <style:style style:name="P30" style:family="paragraph" style:parent-style-name="Standard">
      <style:paragraph-properties fo:text-align="justify" style:justify-single-word="false"/>
      <style:text-properties officeooo:rsid="0019ea26" officeooo:paragraph-rsid="0019ea26"/>
    </style:style>
    <style:style style:name="P31" style:family="paragraph" style:parent-style-name="Standard">
      <style:paragraph-properties fo:text-align="justify" style:justify-single-word="false"/>
      <style:text-properties officeooo:rsid="001ca249" officeooo:paragraph-rsid="0019ea26"/>
    </style:style>
    <style:style style:name="T1" style:family="text">
      <style:text-properties fo:color="#3465a4" loext:opacity="100%" fo:font-size="16pt" officeooo:rsid="00084fe2"/>
    </style:style>
    <style:style style:name="T2" style:family="text">
      <style:text-properties fo:color="#3465a4" loext:opacity="100%" fo:font-size="14pt" officeooo:rsid="00084fe2"/>
    </style:style>
    <style:style style:name="T3" style:family="text">
      <style:text-properties fo:color="#81d41a" loext:opacity="100%" fo:font-weight="bold" style:font-weight-asian="bold" style:font-weight-complex="bold"/>
    </style:style>
    <style:style style:name="T4" style:family="text">
      <style:text-properties fo:color="#729fcf" loext:opacity="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455e1"/>
    </style:style>
    <style:style style:name="T7" style:family="text">
      <style:text-properties fo:color="#c9211e" loext:opacity="100%" officeooo:rsid="003d62a5"/>
    </style:style>
    <style:style style:name="T8" style:family="text">
      <style:text-properties officeooo:rsid="0022563a"/>
    </style:style>
    <style:style style:name="T9" style:family="text">
      <style:text-properties officeooo:rsid="0024b597"/>
    </style:style>
    <style:style style:name="T10" style:family="text">
      <style:text-properties officeooo:rsid="0028ce67"/>
    </style:style>
    <style:style style:name="T11" style:family="text">
      <style:text-properties officeooo:rsid="00297d33"/>
    </style:style>
    <style:style style:name="T12" style:family="text">
      <style:text-properties officeooo:rsid="002c5ae6"/>
    </style:style>
    <style:style style:name="T13" style:family="text">
      <style:text-properties fo:font-weight="bold" officeooo:rsid="002c5ae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BDs Objeto-Relacionais e Orientados a Objeto</text:h>
      <text:p text:style-name="P2"><text:span text:style-name="Strong_20_Emphasis"><text:span text:style-name="T1"/></text:span></text:p>
      <text:p text:style-name="P3"><text:span text:style-name="Strong_20_Emphasis"><text:span text:style-name="T2">Definição</text:span></text:span></text:p>
      <text:p text:style-name="P4"/>
      <text:p text:style-name="P5"><text:span text:style-name="T3">Bancos de Dados Objeto-Relacionais</text:span><text:line-break/></text:p>
      <text:p text:style-name="P6">Os Bancos de Dados Objeto-Relacionais (ORDBMS - Object-Relational Database Management Systems) combinam características dos bancos de dados relacionais (RDBMS) com funcionalidades de bancos de dados orientados a objetos. Eles permitem que os usuários armazenem e manipulem dados complexos como objetos, ao mesmo tempo em que utilizam a familiar linguagem SQL.<text:line-break/></text:p>
      <text:p text:style-name="P7">Características dos ORDBMS</text:p>
      <text:p text:style-name="P6"><text:line-break/><text:span text:style-name="T4">Extensibilidade</text:span>: Permitem a criação de novos tipos de dados, operadores e funções.<text:line-break/><text:span text:style-name="T4">Suporte a objetos</text:span>: Possuem suporte a tipos de dados complexos, como objetos, arrays e coleções.<text:line-break/><text:span text:style-name="T4">Herança</text:span>: Suporte a hierarquia de classes e herança, permitindo que subtipos herdem atributos e métodos de seus supertipos.</text:p>
      <text:p text:style-name="P6"><text:line-break/><text:span text:style-name="T4">Encapsulamento</text:span>: Dados e métodos podem ser encapsulados dentro de tipos de objetos.<text:line-break/><text:span text:style-name="T4">Integridade referencial</text:span>: Mantém as características de integridade referencial dos RDBMS.<text:line-break/></text:p>
      <text:p text:style-name="P8"/>
      <text:p text:style-name="P8">Bancos de Dados Orientados a Objeto</text:p>
      <text:p text:style-name="P6"><text:line-break/>Os Bancos de Dados Orientados a Objeto (OODBMS - Object-Oriented Database Management Systems) armazenam dados na forma de objetos, assim como na programação orientada a objetos. Eles são projetados para trabalhar diretamente com linguagens de programação orientadas a objetos, como Java, C++, Python, etc.</text:p>
      <text:p text:style-name="P6"><text:line-break/><text:span text:style-name="T5">Características dos OODBMS</text:span></text:p>
      <text:p text:style-name="P6"><text:line-break/><text:span text:style-name="T4">Persistência de objetos</text:span>: Objetos podem ser persistidos no banco de dados diretamente, sem necessidade de conversão para um formato tabular.</text:p>
      <text:p text:style-name="P6"><text:span text:style-name="T4">Identidade de objeto</text:span>: Cada objeto tem uma identidade única que é independente de seus valores de atributos.<text:line-break/><text:span text:style-name="T4">Encapsulamento</text:span>: Objetos encapsulam dados e métodos, promovendo o princípio da ocultação de informações.<text:line-break/><text:span text:style-name="T4">Herança e polimorfismo</text:span>: Suporte completo para herança e polimorfismo, permitindo reutilização de código e flexibilidade no design.</text:p>
      <text:p text:style-name="P6"><text:span text:style-name="T4">Suporte a versões</text:span>: Permite gerenciamento de diferentes versões de objetos.</text:p>
      <text:p text:style-name="P6"><text:line-break/></text:p>
      <text:p text:style-name="P9">Comparação entre ORDBMS e OODBMS</text:p>
      <text:p text:style-name="P6"><text:line-break/><text:span text:style-name="T4">Modelo de dados</text:span>: Enquanto os ORDBMS utilizam uma combinação de modelos relacionais e orientados a objetos, os OODBMS utilizam exclusivamente um modelo orientado a objetos.<text:line-break/><text:span text:style-name="T4">Integração com SQL</text:span>: ORDBMS suportam SQL, permitindo a utilização de técnicas e ferramentas relacionais já estabelecidas. OODBMS podem não ter suporte completo a SQL, dependendo mais de métodos específicos da linguagem de programação.</text:p>
      <text:p text:style-name="P6"><text:soft-page-break/><text:span text:style-name="T4">Complexidade</text:span>: ORDBMS podem ser mais complexos devido à necessidade de integrar conceitos relacionais e orientados a objetos. OODBMS são mais naturais para aplicações que já utilizam orientação a objetos.</text:p>
      <text:p text:style-name="P6"><text:span text:style-name="T4">Desempenho</text:span>: OODBMS podem oferecer melhor desempenho em aplicações que trabalham intensivamente com objetos complexos, eliminando a necessidade de mapeamento objeto-relacional.</text:p>
      <text:p text:style-name="P6"><text:line-break/><text:span text:style-name="T3">Exemplos de ORDBMS e OODBMS</text:span></text:p>
      <text:p text:style-name="P6"><text:line-break/>ORDBMS: PostgreSQL é um exemplo notável, oferecendo extensibilidade e suporte a tipos de dados complexos.</text:p>
      <text:p text:style-name="P6"/>
      <text:p text:style-name="P6">OODBMS: db4o e ObjectDB são exemplos de bancos de dados orientados a objetos, projetados para integração direta com linguagens de programação orientadas a objetos. O db4o (<text:span text:style-name="T6">D</text:span>atabase for <text:span text:style-name="T6">O</text:span>bjects) era um banco de dados orientado a objetos open-source. Ele foi popular por um tempo, especialmente em ambientes de desenvolvimento onde a simplicidade e a integração direta com linguagens orientadas a objetos eram desejáveis. No entanto, o db4o foi descontinuado. A empresa que mantinha o db4o, a Versant Corporation, foi adquirida pela Actian Corporation, e o desenvolvimento ativo e o suporte ao db4o foram encerrados. Embora você ainda possa encontrar o db4o e seu código em repositórios antigos ou em projetos legados, não há mais atualizações ou suporte oficial para ele. <text:tab/></text:p>
      <text:p text:style-name="P6"/>
      <text:p text:style-name="P6"><text:line-break/>Esses dois tipos de bancos de dados atendem a diferentes necessidades e cenários de aplicação, oferecendo opções versáteis para o armazenamento e manipulação de dados complexos.</text:p>
      <text:p text:style-name="P4"/>
      <text:p text:style-name="P10">Vídeo-aulas</text:p>
      <text:p text:style-name="P11"/>
      <text:p text:style-name="P12">Disclaimer: alguns vídeos podem conter opiniões que não são, exatamente, iguais às minhas como professor ou iguais às da comunidade científica, o que não invalida as questões técnicas neles abordadas.</text:p>
      <text:p text:style-name="P13"><text:span text:style-name="T7"/></text:p>
      <text:p text:style-name="P13">ORDBMS PostgreSQL <text:span text:style-name="T8">em Canal IlustraDev</text:span>:</text:p>
      <text:p text:style-name="P11"><text:tab/><text:a xlink:type="simple" xlink:href="https://www.youtube.com/watch?v=KKxwFVk8bsg" text:style-name="Internet_20_link" text:visited-style-name="Visited_20_Internet_20_Link">https://www.youtube.com/watch?v=KKxwFVk8bsg</text:a></text:p>
      <text:p text:style-name="P11"/>
      <text:p text:style-name="P14">ORDBMS PostgreSQL em Canal Dev Tech Tips Brasil:</text:p>
      <text:p text:style-name="P15"><text:tab/><text:a xlink:type="simple" xlink:href="https://www.youtube.com/watch?v=rCTCptNvt_Y" text:style-name="Internet_20_link" text:visited-style-name="Visited_20_Internet_20_Link">https://www.youtube.com/watch?v=rCTCptNvt_Y</text:a></text:p>
      <text:p text:style-name="P15"/>
      <text:p text:style-name="P16">OODBMS <text:span text:style-name="T6">db4o em </text:span><text:span text:style-name="T9">Tech Week 2021 – IFSP Campus Cubatão</text:span></text:p>
      <text:p text:style-name="P16"><text:tab/><text:a xlink:type="simple" xlink:href="https://youtu.be/KhK0jvfbGKo" text:style-name="Internet_20_link" text:visited-style-name="Visited_20_Internet_20_Link">https://youtu.be/KhK0jvfbGKo</text:a> </text:p>
      <text:p text:style-name="P16"/>
      <text:p text:style-name="P17">OODBMS - ORM (A Ponte entre Orientação a Objetos e o Banco de Dados)</text:p>
      <text:p text:style-name="P18">em Código Fonte TV</text:p>
      <text:p text:style-name="P17"><text:tab/><text:a xlink:type="simple" xlink:href="https://youtu.be/snOXxJa31GI" text:style-name="Internet_20_link" text:visited-style-name="Visited_20_Internet_20_Link">https://youtu.be/snOXxJa31GI</text:a> </text:p>
      <text:p text:style-name="P16"><text:tab/></text:p>
      <text:p text:style-name="P11"/>
      <text:p text:style-name="P19">Links </text:p>
      <text:p text:style-name="P19"/>
      <text:p text:style-name="P20"><text:tab/><text:a xlink:type="simple" xlink:href="https://www.postgresql.org/" text:style-name="Internet_20_link" text:visited-style-name="Visited_20_Internet_20_Link">https://www.postgresql.org/</text:a> </text:p>
      <text:p text:style-name="P20"/>
      <text:p text:style-name="P20"><text:tab/><text:a xlink:type="simple" xlink:href="https://pt.wikipedia.org/wiki/Mapeamento_objeto-relacional" text:style-name="Internet_20_link" text:visited-style-name="Visited_20_Internet_20_Link">https://pt.wikipedia.org/wiki/Mapeamento_objeto-relacional</text:a> </text:p>
      <text:p text:style-name="P21"/>
      <text:p text:style-name="P22"><text:soft-page-break/></text:p>
      <text:p text:style-name="P23">Questões</text:p>
      <text:p text:style-name="P24"/>
      <text:p text:style-name="P25">1) Pelo seu conhecimento atual (talvez tenha estudado mais sobre um ou sobre outro), qual a vantagem que os diferentes tipos de Bancos de Dados levam sobre os seus concorrentes? Ou seja, quais as vantagens de você conhecer em maior profundidade um banco de dados relacional/objeto-relacional em vez de um banco de dados orientado a objeto no que tange a:</text:p>
      <text:p text:style-name="P26"/>
      <text:p text:style-name="P26">→ performance</text:p>
      <text:p text:style-name="P26">→ tamanho </text:p>
      <text:p text:style-name="P26">→ integração com dispositivos móveis, aplicações embarcadas <text:span text:style-name="T10">e IOT</text:span></text:p>
      <text:p text:style-name="P26">→ custo</text:p>
      <text:p text:style-name="P26">→ manutenção</text:p>
      <text:p text:style-name="P26">→ desenvolvimento <text:span text:style-name="T11">de uma aplicação</text:span></text:p>
      <text:p text:style-name="P26">→ etc.</text:p>
      <text:p text:style-name="P26"/>
      <text:p text:style-name="P27">2) <text:span text:style-name="T12">Cite pelo menos 3 bancos de dados (existentes ou já extintos) dentro da cada um dos tipos: </text:span><text:span text:style-name="T13">Relacional</text:span><text:span text:style-name="T12">, </text:span><text:span text:style-name="T13">Objeto-Relacional</text:span><text:span text:style-name="T12"> e </text:span><text:span text:style-name="T13">Orientado a Objetos</text:span><text:span text:style-name="T12">.</text:span></text:p>
      <text:p text:style-name="P26"/>
      <text:p text:style-name="P28">3) Os bancos de dados relacionais foram e continuam sendo amplamente utilizados. Se eles fizeram e fazem tanto sucesso, qual a necessidade que justifica o crescimento dos bancos de dados orientados a objeto?</text:p>
      <text:p text:style-name="P26"/>
      <text:p text:style-name="P29">4) Faça uma pesquisa rápida na internet e veja se consegue encontrar o percentual de uso dos <text:span text:style-name="T5">bancos de dados relacionais/objeto-relacionais</text:span> e dos <text:span text:style-name="T5">bancos de dados orientados a objeto</text:span>. Lembre de citar a fonte da sua resposta, incluindo preferencialmente o hyperlink.</text:p>
      <text:p text:style-name="P26"/>
      <text:p text:style-name="P30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09:11:59.781000000</meta:creation-date>
    <dc:date>2025-04-04T14:01:53.123000000</dc:date>
    <meta:editing-duration>PT5H29M20S</meta:editing-duration>
    <meta:editing-cycles>38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49" meta:word-count="800" meta:character-count="5578" meta:non-whitespace-character-count="4796"/>
  </office:meta>
</office:document-meta>
</file>