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69a2e" loext:opacity="100%" fo:font-size="14pt" fo:font-weight="bold" officeooo:rsid="001cd4b0" officeooo:paragraph-rsid="001cd4b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69a2e" loext:opacity="100%" fo:font-size="6pt" fo:font-weight="bold" officeooo:rsid="000a689c" officeooo:paragraph-rsid="001cd4b0" style:font-size-asian="5.25pt" style:font-weight-asian="bold" style:font-size-complex="6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0a689c" officeooo:paragraph-rsid="0036cdf4"/>
    </style:style>
    <style:style style:name="P4" style:family="paragraph" style:parent-style-name="Standard">
      <style:paragraph-properties fo:text-align="justify" style:justify-single-word="false"/>
      <style:text-properties officeooo:rsid="000a689c" officeooo:paragraph-rsid="000a689c"/>
    </style:style>
    <style:style style:name="P5" style:family="paragraph" style:parent-style-name="Standard">
      <style:paragraph-properties fo:text-align="justify" style:justify-single-word="false"/>
      <style:text-properties fo:color="#bf0041" loext:opacity="100%" fo:font-size="16pt" fo:font-weight="bold" officeooo:rsid="000bf140" officeooo:paragraph-rsid="000bf140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0bf140" officeooo:paragraph-rsid="000bf140"/>
    </style:style>
    <style:style style:name="P7" style:family="paragraph" style:parent-style-name="Standard">
      <style:paragraph-properties fo:text-align="justify" style:justify-single-word="false"/>
      <style:text-properties officeooo:rsid="000db0f5" officeooo:paragraph-rsid="000db0f5"/>
    </style:style>
    <style:style style:name="P8" style:family="paragraph" style:parent-style-name="Standard">
      <style:paragraph-properties fo:text-align="justify" style:justify-single-word="false"/>
      <style:text-properties officeooo:rsid="000e3fa9" officeooo:paragraph-rsid="000e3fa9"/>
    </style:style>
    <style:style style:name="P9" style:family="paragraph" style:parent-style-name="Standard">
      <style:paragraph-properties fo:text-align="justify" style:justify-single-word="false"/>
      <style:text-properties officeooo:rsid="000db0f5" officeooo:paragraph-rsid="000e3fa9"/>
    </style:style>
    <style:style style:name="P10" style:family="paragraph" style:parent-style-name="Standard">
      <style:paragraph-properties fo:text-align="justify" style:justify-single-word="false"/>
      <style:text-properties officeooo:rsid="00100ceb" officeooo:paragraph-rsid="002d2351"/>
    </style:style>
    <style:style style:name="P11" style:family="paragraph" style:parent-style-name="Standard">
      <style:paragraph-properties fo:text-align="justify" style:justify-single-word="false"/>
      <style:text-properties officeooo:rsid="001b227e" officeooo:paragraph-rsid="0014b06c"/>
    </style:style>
    <style:style style:name="P12" style:family="paragraph" style:parent-style-name="Standard">
      <style:paragraph-properties fo:text-align="justify" style:justify-single-word="false"/>
      <style:text-properties officeooo:rsid="0010d180" officeooo:paragraph-rsid="0069ffdb"/>
    </style:style>
    <style:style style:name="P13" style:family="paragraph" style:parent-style-name="Standard">
      <style:paragraph-properties fo:text-align="justify" style:justify-single-word="false"/>
      <style:text-properties officeooo:rsid="001b227e" officeooo:paragraph-rsid="0069ffdb"/>
    </style:style>
    <style:style style:name="P14" style:family="paragraph" style:parent-style-name="Standard">
      <style:paragraph-properties fo:text-align="justify" style:justify-single-word="false"/>
      <style:text-properties officeooo:rsid="00100ceb" officeooo:paragraph-rsid="002fbffd"/>
    </style:style>
    <style:style style:name="P15" style:family="paragraph" style:parent-style-name="Standard">
      <style:paragraph-properties fo:text-align="justify" style:justify-single-word="false"/>
      <style:text-properties officeooo:rsid="002d2351" officeooo:paragraph-rsid="006e129c"/>
    </style:style>
    <style:style style:name="P16" style:family="paragraph" style:parent-style-name="Standard">
      <style:paragraph-properties fo:text-align="center" style:justify-single-word="false"/>
      <style:text-properties officeooo:rsid="000a689c" officeooo:paragraph-rsid="001e001a"/>
    </style:style>
    <style:style style:name="P17" style:family="paragraph" style:parent-style-name="Standard">
      <style:paragraph-properties fo:text-align="center" style:justify-single-word="false"/>
      <style:text-properties fo:color="#069a2e" loext:opacity="100%" fo:font-weight="bold" officeooo:rsid="000a689c" officeooo:paragraph-rsid="001e001a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rsid="00202eed" officeooo:paragraph-rsid="00202eed"/>
    </style:style>
    <style:style style:name="P19" style:family="paragraph" style:parent-style-name="Standard">
      <style:paragraph-properties fo:text-align="justify" style:justify-single-word="false"/>
      <style:text-properties officeooo:rsid="00100ceb" officeooo:paragraph-rsid="00834a3c"/>
    </style:style>
    <style:style style:name="P20" style:family="paragraph" style:parent-style-name="Standard">
      <style:paragraph-properties fo:text-align="justify" style:justify-single-word="false"/>
      <style:text-properties officeooo:rsid="00100ceb" officeooo:paragraph-rsid="00506586"/>
    </style:style>
    <style:style style:name="P21" style:family="paragraph" style:parent-style-name="Standard">
      <style:paragraph-properties fo:text-align="justify" style:justify-single-word="false"/>
      <style:text-properties officeooo:rsid="001b227e" officeooo:paragraph-rsid="001e001a"/>
    </style:style>
    <style:style style:name="P22" style:family="paragraph" style:parent-style-name="Standard">
      <style:paragraph-properties fo:text-align="justify" style:justify-single-word="false"/>
      <style:text-properties officeooo:rsid="00100ceb" officeooo:paragraph-rsid="00549d71"/>
    </style:style>
    <style:style style:name="P23" style:family="paragraph" style:parent-style-name="Standard">
      <style:paragraph-properties fo:text-align="justify" style:justify-single-word="false"/>
      <style:text-properties officeooo:rsid="00549d71" officeooo:paragraph-rsid="00549d71"/>
    </style:style>
    <style:style style:name="P24" style:family="paragraph" style:parent-style-name="Standard">
      <style:paragraph-properties fo:text-align="justify" style:justify-single-word="false"/>
      <style:text-properties officeooo:rsid="001b227e" officeooo:paragraph-rsid="001b227e"/>
    </style:style>
    <style:style style:name="P25" style:family="paragraph" style:parent-style-name="Standard">
      <style:paragraph-properties fo:text-align="justify" style:justify-single-word="false"/>
      <style:text-properties officeooo:rsid="001b227e" officeooo:paragraph-rsid="00549d71"/>
    </style:style>
    <style:style style:name="P26" style:family="paragraph" style:parent-style-name="Standard">
      <style:paragraph-properties fo:text-align="justify" style:justify-single-word="false"/>
      <style:text-properties officeooo:rsid="00100ceb" officeooo:paragraph-rsid="001b227e"/>
    </style:style>
    <style:style style:name="P27" style:family="paragraph" style:parent-style-name="Standard">
      <style:paragraph-properties fo:text-align="center" style:justify-single-word="false"/>
      <style:text-properties officeooo:rsid="00423415" officeooo:paragraph-rsid="00423415"/>
    </style:style>
    <style:style style:name="P28" style:family="paragraph" style:parent-style-name="Standard">
      <style:paragraph-properties fo:text-align="justify" style:justify-single-word="false"/>
      <style:text-properties officeooo:rsid="0010d180" officeooo:paragraph-rsid="003eb715"/>
    </style:style>
    <style:style style:name="P29" style:family="paragraph" style:parent-style-name="Standard">
      <style:paragraph-properties fo:text-align="justify" style:justify-single-word="false"/>
      <style:text-properties style:font-name="Courier New" fo:font-size="11pt" fo:font-weight="bold" officeooo:rsid="003eb715" officeooo:paragraph-rsid="003eb715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Courier New" fo:font-size="11pt" officeooo:rsid="003eb715" officeooo:paragraph-rsid="003eb715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Courier New" fo:font-size="11pt" officeooo:rsid="000db0f5" officeooo:paragraph-rsid="003eb715" style:font-size-asian="11pt" style:font-size-complex="11pt"/>
    </style:style>
    <style:style style:name="P32" style:family="paragraph" style:parent-style-name="Standard">
      <style:paragraph-properties fo:text-align="justify" style:justify-single-word="false"/>
      <style:text-properties style:font-name="Courier New" fo:font-size="11pt" officeooo:rsid="00100ceb" officeooo:paragraph-rsid="003eb715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Courier New" fo:font-size="11pt" fo:font-weight="normal" officeooo:rsid="003eb715" officeooo:paragraph-rsid="003eb715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Courier New" fo:font-size="11pt" fo:font-weight="bold" officeooo:rsid="00408c46" officeooo:paragraph-rsid="00408c46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Courier New" fo:font-size="11pt" fo:font-weight="normal" officeooo:rsid="00408c46" officeooo:paragraph-rsid="00408c46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Courier New" fo:font-size="11pt" officeooo:rsid="00408c46" officeooo:paragraph-rsid="00408c46" style:font-size-asian="11pt" style:font-size-complex="11pt"/>
    </style:style>
    <style:style style:name="P37" style:family="paragraph" style:parent-style-name="Standard">
      <style:paragraph-properties fo:text-align="justify" style:justify-single-word="false"/>
      <style:text-properties style:font-name="Courier New" fo:font-size="11pt" officeooo:rsid="0040d64d" officeooo:paragraph-rsid="0040d64d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ourier New" fo:font-size="11pt" fo:font-weight="normal" officeooo:rsid="0040d754" officeooo:paragraph-rsid="0040d754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Courier New" fo:font-size="11pt" officeooo:rsid="0040d754" officeooo:paragraph-rsid="0040d754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ourier New" fo:font-size="11pt" fo:font-weight="bold" officeooo:rsid="00423415" officeooo:paragraph-rsid="00423415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justify" style:justify-single-word="false"/>
      <style:text-properties officeooo:rsid="00423415" officeooo:paragraph-rsid="00423415"/>
    </style:style>
    <style:style style:name="P42" style:family="paragraph" style:parent-style-name="Standard">
      <style:paragraph-properties fo:text-align="justify" style:justify-single-word="false"/>
      <style:text-properties officeooo:rsid="00423415" officeooo:paragraph-rsid="00457dd8"/>
    </style:style>
    <style:style style:name="P43" style:family="paragraph" style:parent-style-name="Standard">
      <style:paragraph-properties fo:text-align="justify" style:justify-single-word="false"/>
      <style:text-properties officeooo:rsid="00884b79" officeooo:paragraph-rsid="00884b79"/>
    </style:style>
    <style:style style:name="P44" style:family="paragraph" style:parent-style-name="Standard">
      <style:paragraph-properties fo:text-align="justify" style:justify-single-word="false"/>
      <style:text-properties fo:font-weight="bold" officeooo:rsid="008909e9" officeooo:paragraph-rsid="008909e9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officeooo:rsid="008909e9" officeooo:paragraph-rsid="008909e9"/>
    </style:style>
    <style:style style:name="P46" style:family="paragraph" style:parent-style-name="Standard">
      <style:paragraph-properties fo:text-align="justify" style:justify-single-word="false"/>
      <style:text-properties officeooo:rsid="008b2b6a" officeooo:paragraph-rsid="008b2b6a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8cc452" officeooo:paragraph-rsid="008cc452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officeooo:rsid="0090e862" officeooo:paragraph-rsid="0090e862"/>
    </style:style>
    <style:style style:name="T1" style:family="text">
      <style:text-properties fo:font-size="14pt" fo:font-weight="normal" officeooo:rsid="00100ceb" style:font-weight-asian="normal" style:font-weight-complex="normal"/>
    </style:style>
    <style:style style:name="T2" style:family="text">
      <style:text-properties officeooo:rsid="0019daca"/>
    </style:style>
    <style:style style:name="T3" style:family="text">
      <style:text-properties officeooo:rsid="0026347f"/>
    </style:style>
    <style:style style:name="T4" style:family="text">
      <style:text-properties officeooo:rsid="00164514"/>
    </style:style>
    <style:style style:name="T5" style:family="text">
      <style:text-properties officeooo:rsid="001cd4b0"/>
    </style:style>
    <style:style style:name="T6" style:family="text">
      <style:text-properties officeooo:rsid="0036cdf4"/>
    </style:style>
    <style:style style:name="T7" style:family="text">
      <style:text-properties officeooo:rsid="000bf140"/>
    </style:style>
    <style:style style:name="T8" style:family="text">
      <style:text-properties officeooo:rsid="001557ae"/>
    </style:style>
    <style:style style:name="T9" style:family="text">
      <style:text-properties officeooo:rsid="000e3fa9"/>
    </style:style>
    <style:style style:name="T10" style:family="text">
      <style:text-properties officeooo:rsid="007843c1"/>
    </style:style>
    <style:style style:name="T11" style:family="text">
      <style:text-properties fo:font-weight="normal" officeooo:rsid="001e001a" style:font-weight-asian="normal" style:font-weight-complex="normal"/>
    </style:style>
    <style:style style:name="T12" style:family="text">
      <style:text-properties fo:font-weight="normal" officeooo:rsid="0014b06c" style:font-weight-asian="normal" style:font-weight-complex="normal"/>
    </style:style>
    <style:style style:name="T13" style:family="text">
      <style:text-properties fo:font-weight="normal" officeooo:rsid="006faccc" style:font-weight-asian="normal" style:font-weight-complex="normal"/>
    </style:style>
    <style:style style:name="T14" style:family="text">
      <style:text-properties fo:font-weight="normal" officeooo:rsid="003546b5" style:font-weight-asian="normal" style:font-weight-complex="normal"/>
    </style:style>
    <style:style style:name="T15" style:family="text">
      <style:text-properties fo:font-weight="normal" officeooo:rsid="001557ae" style:font-weight-asian="normal" style:font-weight-complex="normal"/>
    </style:style>
    <style:style style:name="T16" style:family="text">
      <style:text-properties fo:font-weight="bold" officeooo:rsid="001557ae" style:font-weight-asian="bold" style:font-weight-complex="bold"/>
    </style:style>
    <style:style style:name="T17" style:family="text">
      <style:text-properties fo:font-weight="normal" officeooo:rsid="005c6a2b" style:font-weight-asian="normal" style:font-weight-complex="normal"/>
    </style:style>
    <style:style style:name="T18" style:family="text">
      <style:text-properties fo:font-weight="normal" officeooo:rsid="00164514" style:font-weight-asian="normal" style:font-weight-complex="normal"/>
    </style:style>
    <style:style style:name="T19" style:family="text">
      <style:text-properties fo:font-weight="normal" officeooo:rsid="00170794" style:font-weight-asian="normal" style:font-weight-complex="normal"/>
    </style:style>
    <style:style style:name="T20" style:family="text">
      <style:text-properties fo:font-weight="bold" officeooo:rsid="00170794" style:font-weight-asian="bold" style:font-weight-complex="bold"/>
    </style:style>
    <style:style style:name="T21" style:family="text">
      <style:text-properties fo:font-weight="normal" officeooo:rsid="002d2351" style:font-weight-asian="normal" style:font-weight-complex="normal"/>
    </style:style>
    <style:style style:name="T22" style:family="text">
      <style:text-properties fo:font-weight="normal" officeooo:rsid="001c5101" style:font-weight-asian="normal" style:font-weight-complex="normal"/>
    </style:style>
    <style:style style:name="T23" style:family="text">
      <style:text-properties officeooo:rsid="00118bae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731eed" style:font-weight-asian="bold" style:font-weight-complex="bold"/>
    </style:style>
    <style:style style:name="T26" style:family="text">
      <style:text-properties officeooo:rsid="00731eed"/>
    </style:style>
    <style:style style:name="T27" style:family="text">
      <style:text-properties officeooo:rsid="006864bc"/>
    </style:style>
    <style:style style:name="T28" style:family="text">
      <style:text-properties officeooo:rsid="004a2e5f"/>
    </style:style>
    <style:style style:name="T29" style:family="text">
      <style:text-properties officeooo:rsid="0069b8b8"/>
    </style:style>
    <style:style style:name="T30" style:family="text">
      <style:text-properties officeooo:rsid="005a606a"/>
    </style:style>
    <style:style style:name="T31" style:family="text">
      <style:text-properties officeooo:rsid="0069ffdb"/>
    </style:style>
    <style:style style:name="T32" style:family="text">
      <style:text-properties fo:font-weight="normal" officeooo:rsid="009467fd" style:font-weight-asian="normal" style:font-weight-complex="normal"/>
    </style:style>
    <style:style style:name="T33" style:family="text">
      <style:text-properties fo:font-weight="normal" officeooo:rsid="0026347f" style:font-weight-asian="normal" style:font-weight-complex="normal"/>
    </style:style>
    <style:style style:name="T34" style:family="text">
      <style:text-properties fo:font-weight="normal" officeooo:rsid="006bdc3c" style:font-weight-asian="normal" style:font-weight-complex="normal"/>
    </style:style>
    <style:style style:name="T35" style:family="text">
      <style:text-properties fo:font-weight="normal" officeooo:rsid="006d3c1e" style:font-weight-asian="normal" style:font-weight-complex="normal"/>
    </style:style>
    <style:style style:name="T36" style:family="text">
      <style:text-properties fo:font-weight="bold" officeooo:rsid="0075288f" style:font-weight-asian="bold" style:font-weight-complex="bold"/>
    </style:style>
    <style:style style:name="T37" style:family="text">
      <style:text-properties fo:font-weight="bold" officeooo:rsid="0028925e" style:font-weight-asian="bold" style:font-weight-complex="bold"/>
    </style:style>
    <style:style style:name="T38" style:family="text">
      <style:text-properties fo:font-weight="normal" officeooo:rsid="0028925e" style:font-weight-asian="normal" style:font-weight-complex="normal"/>
    </style:style>
    <style:style style:name="T39" style:family="text">
      <style:text-properties fo:font-weight="normal" officeooo:rsid="00336fff" style:font-weight-asian="normal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color="#e16173" loext:opacity="100%" fo:font-weight="bold" officeooo:rsid="0026347f" style:font-weight-asian="bold" style:font-weight-complex="bold"/>
    </style:style>
    <style:style style:name="T42" style:family="text">
      <style:text-properties fo:color="#e16173" loext:opacity="100%" fo:font-weight="bold" officeooo:rsid="00281141" style:font-weight-asian="bold" style:font-weight-complex="bold"/>
    </style:style>
    <style:style style:name="T43" style:family="text">
      <style:text-properties fo:color="#069a2e" loext:opacity="100%" fo:font-size="14pt" fo:font-weight="bold" officeooo:rsid="001cd4b0" style:font-weight-asian="bold" style:font-weight-complex="bold"/>
    </style:style>
    <style:style style:name="T44" style:family="text">
      <style:text-properties fo:color="#069a2e" loext:opacity="100%" fo:font-size="14pt" fo:font-weight="bold" officeooo:rsid="001e001a" style:font-weight-asian="bold" style:font-weight-complex="bold"/>
    </style:style>
    <style:style style:name="T45" style:family="text">
      <style:text-properties fo:font-size="14pt" fo:font-weight="normal" officeooo:rsid="001cd4b0" style:font-weight-asian="normal" style:font-weight-complex="normal"/>
    </style:style>
    <style:style style:name="T46" style:family="text">
      <style:text-properties fo:font-weight="normal" officeooo:rsid="008583d2" style:font-weight-asian="normal" style:font-weight-complex="normal"/>
    </style:style>
    <style:style style:name="T47" style:family="text">
      <style:text-properties fo:font-weight="normal" officeooo:rsid="0085a42d" style:font-weight-asian="normal" style:font-weight-complex="normal"/>
    </style:style>
    <style:style style:name="T48" style:family="text">
      <style:text-properties fo:font-weight="normal" officeooo:rsid="001eefc4" style:font-weight-asian="normal" style:font-weight-complex="normal"/>
    </style:style>
    <style:style style:name="T49" style:family="text">
      <style:text-properties officeooo:rsid="0011d35a"/>
    </style:style>
    <style:style style:name="T50" style:family="text">
      <style:text-properties officeooo:rsid="004f029e"/>
    </style:style>
    <style:style style:name="T51" style:family="text">
      <style:text-properties officeooo:rsid="007db985"/>
    </style:style>
    <style:style style:name="T52" style:family="text">
      <style:text-properties officeooo:rsid="00818615"/>
    </style:style>
    <style:style style:name="T53" style:family="text">
      <style:text-properties officeooo:rsid="007d98d3"/>
    </style:style>
    <style:style style:name="T54" style:family="text">
      <style:text-properties officeooo:rsid="00221479"/>
    </style:style>
    <style:style style:name="T55" style:family="text">
      <style:text-properties officeooo:rsid="00506586"/>
    </style:style>
    <style:style style:name="T56" style:family="text">
      <style:text-properties officeooo:rsid="00834a3c"/>
    </style:style>
    <style:style style:name="T57" style:family="text">
      <style:text-properties officeooo:rsid="002fbffd"/>
    </style:style>
    <style:style style:name="T58" style:family="text">
      <style:text-properties officeooo:rsid="0012f844"/>
    </style:style>
    <style:style style:name="T59" style:family="text">
      <style:text-properties officeooo:rsid="002399ad"/>
    </style:style>
    <style:style style:name="T60" style:family="text">
      <style:text-properties officeooo:rsid="00137677"/>
    </style:style>
    <style:style style:name="T61" style:family="text">
      <style:text-properties officeooo:rsid="00549d71"/>
    </style:style>
    <style:style style:name="T62" style:family="text">
      <style:text-properties officeooo:rsid="0028da19"/>
    </style:style>
    <style:style style:name="T63" style:family="text">
      <style:text-properties officeooo:rsid="007b7805"/>
    </style:style>
    <style:style style:name="T64" style:family="text">
      <style:text-properties fo:font-weight="bold" officeooo:rsid="007b7805" style:font-weight-asian="bold" style:font-weight-complex="bold"/>
    </style:style>
    <style:style style:name="T65" style:family="text">
      <style:text-properties fo:font-weight="normal" officeooo:rsid="0028da19" style:font-weight-asian="normal" style:font-weight-complex="normal"/>
    </style:style>
    <style:style style:name="T66" style:family="text">
      <style:text-properties officeooo:rsid="0083ade5"/>
    </style:style>
    <style:style style:name="T67" style:family="text">
      <style:text-properties officeooo:rsid="007fdc1a"/>
    </style:style>
    <style:style style:name="T68" style:family="text">
      <style:text-properties officeooo:rsid="0030afc4"/>
    </style:style>
    <style:style style:name="T69" style:family="text">
      <style:text-properties officeooo:rsid="003a59ec"/>
    </style:style>
    <style:style style:name="T70" style:family="text">
      <style:text-properties fo:font-weight="bold" officeooo:rsid="003a59ec" style:font-weight-asian="bold" style:font-weight-complex="bold"/>
    </style:style>
    <style:style style:name="T71" style:family="text">
      <style:text-properties fo:font-weight="bold" officeooo:rsid="0052ceb1" style:font-weight-asian="bold" style:font-weight-complex="bold"/>
    </style:style>
    <style:style style:name="T72" style:family="text">
      <style:text-properties fo:font-weight="normal" officeooo:rsid="008179b0" style:font-weight-asian="normal" style:font-weight-complex="normal"/>
    </style:style>
    <style:style style:name="T73" style:family="text">
      <style:text-properties fo:font-weight="normal" officeooo:rsid="003a59ec" style:font-weight-asian="normal" style:font-weight-complex="normal"/>
    </style:style>
    <style:style style:name="T74" style:family="text">
      <style:text-properties fo:font-weight="normal" officeooo:rsid="0057ae92" style:font-weight-asian="normal" style:font-weight-complex="normal"/>
    </style:style>
    <style:style style:name="T75" style:family="text">
      <style:text-properties officeooo:rsid="00953d2a"/>
    </style:style>
    <style:style style:name="T76" style:family="text">
      <style:text-properties fo:color="#ff0000" loext:opacity="100%" fo:font-size="14pt" fo:font-weight="bold" style:font-weight-asian="bold" style:font-weight-complex="bold"/>
    </style:style>
    <style:style style:name="T77" style:family="text">
      <style:text-properties officeooo:rsid="0067dc09"/>
    </style:style>
    <style:style style:name="T78" style:family="text">
      <style:text-properties officeooo:rsid="001e001a"/>
    </style:style>
    <style:style style:name="T79" style:family="text">
      <style:text-properties fo:font-weight="normal" officeooo:rsid="000e3fa9" style:font-weight-asian="normal" style:font-weight-complex="normal"/>
    </style:style>
    <style:style style:name="T80" style:family="text">
      <style:text-properties fo:font-weight="normal" officeooo:rsid="006665bd" style:font-weight-asian="normal" style:font-weight-complex="normal"/>
    </style:style>
    <style:style style:name="T81" style:family="text">
      <style:text-properties fo:font-weight="normal" officeooo:rsid="00649e59" style:font-weight-asian="normal" style:font-weight-complex="normal"/>
    </style:style>
    <style:style style:name="T82" style:family="text">
      <style:text-properties fo:font-weight="normal" officeooo:rsid="0067dc09" style:font-weight-asian="normal" style:font-weight-complex="normal"/>
    </style:style>
    <style:style style:name="T83" style:family="text">
      <style:text-properties fo:font-weight="normal" officeooo:rsid="0040d64d" style:font-weight-asian="normal" style:font-weight-complex="normal"/>
    </style:style>
    <style:style style:name="T84" style:family="text">
      <style:text-properties fo:font-weight="normal" officeooo:rsid="00457dd8" style:font-weight-asian="normal" style:font-weight-complex="normal"/>
    </style:style>
    <style:style style:name="T85" style:family="text">
      <style:text-properties fo:font-weight="normal" officeooo:rsid="0043fe72" style:font-weight-asian="normal" style:font-weight-complex="normal"/>
    </style:style>
    <style:style style:name="T86" style:family="text">
      <style:text-properties fo:font-weight="normal" officeooo:rsid="0092c91c" style:font-weight-asian="normal" style:font-weight-complex="normal"/>
    </style:style>
    <style:style style:name="T87" style:family="text">
      <style:text-properties fo:font-weight="normal" officeooo:rsid="00901b3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1</text:p>
      <text:p text:style-name="P2"/>
      <text:p text:style-name="P3"><text:span text:style-name="T1">C</text:span>riar no Banco de Dados Oracle, dentro da máquina virtual Oracle VM, dentro da nossa estrutura de laboratório, e portanto dentro do Ubuntu Linux 11, um esquema de banco de dados <text:span text:style-name="T2">chamado PROD </text:span><text:span text:style-name="T3">com senha PROD </text:span>que receba o cadastramento de pedidos feitos por um Web Server de E-Commerce <text:span text:style-name="T4">para carregamento de produtos para envio em uma de </text:span><text:span text:style-name="T5">3</text:span><text:span text:style-name="T4"> diferentes filiais </text:span><text:span text:style-name="T5">espalhadas geograficamente </text:span><text:span text:style-name="T6">(1, 2 e 3)</text:span>. <text:span text:style-name="T7">O esquema é relativamente simples, já que terá somente a seguinte estrutura de tabelas:</text:span></text:p>
      <text:p text:style-name="P4"/>
      <text:p text:style-name="P5">Tabela<text:tab/><text:tab/><text:tab/>Colunas<text:tab/><text:tab/>Null?</text:p>
      <text:p text:style-name="P6"/>
      <text:p text:style-name="P6">CLIENTE<text:tab/><text:tab/><text:tab/>COD_CLI<text:tab/><text:tab/>NOT NULL – PK</text:p>
      <text:p text:style-name="P6"><text:tab/><text:tab/><text:tab/><text:tab/>RAZAO_SOCIAL<text:tab/>NOT NULL</text:p>
      <text:p text:style-name="P6"><text:tab/><text:tab/><text:tab/><text:tab/><text:span text:style-name="T8">NOME_FANTASIA<text:tab/>NOT NULL</text:span></text:p>
      <text:p text:style-name="P6"><text:tab/><text:tab/><text:tab/></text:p>
      <text:p text:style-name="P6">PEDIDO<text:tab/><text:tab/><text:tab/>COD_PED<text:tab/><text:tab/>NOT NULL – PK</text:p>
      <text:p text:style-name="P6"><text:tab/><text:tab/><text:tab/><text:tab/>COD_CLI<text:tab/><text:tab/>NOT NULL – FK com CLIENTE</text:p>
      <text:p text:style-name="P6"><text:tab/><text:tab/><text:tab/><text:tab/><text:span text:style-name="T9">FILIAL<text:tab/><text:tab/>NOT NULL</text:span></text:p>
      <text:p text:style-name="P6"/>
      <text:p text:style-name="P7">ITEM_PEDIDO<text:tab/><text:tab/>COD_PED<text:tab/><text:tab/>NOT NULL – PK <text:span text:style-name="T10">e FK com PEDIDO</text:span></text:p>
      <text:p text:style-name="P7"><text:tab/><text:tab/><text:tab/><text:tab/>COD_PROD<text:tab/><text:tab/>NOT NULL – PK e FK com PRODUTO</text:p>
      <text:p text:style-name="P7"><text:tab/><text:tab/><text:tab/><text:tab/>NUM_ITEM<text:tab/><text:tab/>NOT NULL – PK</text:p>
      <text:p text:style-name="P7"><text:tab/><text:tab/><text:tab/><text:tab/>QTDE<text:tab/><text:tab/><text:tab/>NOT NULL</text:p>
      <text:p text:style-name="P7"/>
      <text:p text:style-name="P8">PRODUTO<text:tab/><text:tab/><text:tab/>COD_PROD<text:tab/><text:tab/>NOT NULL – PK</text:p>
      <text:p text:style-name="P9"><text:tab/><text:tab/><text:tab/><text:tab/><text:span text:style-name="T9">DESCRICAO<text:tab/><text:tab/>NOT NULL</text:span></text:p>
      <text:p text:style-name="P9"><text:tab/><text:tab/><text:tab/><text:tab/><text:span text:style-name="T9">VALOR<text:tab/><text:tab/>NOT NULL</text:span><text:tab/><text:tab/></text:p>
      <text:p text:style-name="P7"/>
      <text:p text:style-name="P10"><text:span text:style-name="T11">C</text:span><text:span text:style-name="T12">riar </text:span><text:span text:style-name="T13">dois </text:span><text:span text:style-name="T12">objetos </text:span><text:span text:style-name="T14">(uma trigger e uma stored procedure conforme descrito a seguir) </text:span><text:span text:style-name="T12">para fins de controle e automação de processamentos noturnos, simulando jobs que executam durante o período de menor uso do sistema, geralmente à noite. </text:span><text:span text:style-name="T15">Deverá haver uma </text:span><text:span text:style-name="T16">trigger after update </text:span><text:span text:style-name="T17">n</text:span><text:span text:style-name="T15">a tabela cliente que registre em uma tabela auxiliar o histórico de atualização dos campos RAZAO_SOCIAL e NOME_FANTASIA, para fins de registro. </text:span></text:p>
      <text:p text:style-name="P10"><text:span text:style-name="T15"/></text:p>
      <text:p text:style-name="P10"><text:span text:style-name="T18">Há um probleminha no nosso modelo (como se ele estivesse muito completo hehe) já que ao se cadastrar um pedido, </text:span><text:span text:style-name="T19">e amarrá-lo a uma filial, não há uma tabela com cadastro de cada filial, logo, o que irá identificar a filial é apenas o número dela informado no momento do pedido. Deverá haver, portanto, uma </text:span><text:span text:style-name="T20">stored procedure </text:span><text:span text:style-name="T19">que varra a tabela pedido buscando todos os pedido realizados para alguma filial que não existe (erro de digitação, por exemplo) </text:span><text:span text:style-name="T21">mostrando todos os dados desse pedido na tela, </text:span><text:span text:style-name="T19">para que o pessoa</text:span><text:span text:style-name="T22">l</text:span><text:span text:style-name="T19"> da TI faça a correção no dia seguinte. </text:span></text:p>
      <text:p text:style-name="P11"/>
      <text:p text:style-name="P12"><text:span text:style-name="T23">O </text:span>script <text:span text:style-name="T24">.</text:span><text:span text:style-name="T25">sh</text:span><text:span text:style-name="T26"> </text:span><text:span text:style-name="T23">a ser entregue deverá conter os comandos DDL para criação </text:span><text:span text:style-name="T27">do usuário PROD, </text:span><text:span text:style-name="T23">das tabelas e os comandos DML </text:span>para alimenta<text:span text:style-name="T27">çã</text:span>o das <text:span text:style-name="T23">mesmas</text:span>. <text:span text:style-name="T28">Esse script dever</text:span><text:span text:style-name="T29">á</text:span><text:span text:style-name="T28"> criar </text:span><text:span text:style-name="T29">o usuário, </text:span><text:span text:style-name="T28">as tabelas e inserir os dados por completo, ou seja, dever</text:span><text:span text:style-name="T29">á </text:span><text:span text:style-name="T28">estar sintaticamente correto já que, </text:span><text:span text:style-name="T30">na avaliação do trabalho,</text:span><text:span text:style-name="T28"> ser</text:span><text:span text:style-name="T29">á</text:span><text:span text:style-name="T28"> copiado para o Linux </text:span><text:span text:style-name="T26">e</text:span><text:span text:style-name="T28"> executado </text:span><text:span text:style-name="T30">para ver se funciona. </text:span><text:span text:style-name="T31">Este mesmo script também deverá criar a tabela usada pela trigger assim como a trigger e a stored procedure.</text:span></text:p>
      <text:p text:style-name="P13"/>
      <text:p text:style-name="P14"><text:span text:style-name="T19">Deverá ser entregue </text:span><text:span text:style-name="T32">por e-mail</text:span><text:span text:style-name="T33"> </text:span><text:span text:style-name="T19">ao professor </text:span><text:span text:style-name="T34">es</text:span><text:span text:style-name="T35">se</text:span><text:span text:style-name="T19"> script </text:span><text:span text:style-name="T20">.</text:span><text:span text:style-name="T36">sh</text:span><text:span text:style-name="T19">,</text:span><text:span text:style-name="T20"> </text:span><text:span text:style-name="T19">o arquivo </text:span><text:span text:style-name="T37">prod.dmp</text:span><text:span text:style-name="T20"> </text:span><text:span text:style-name="T19">com todos </text:span><text:span text:style-name="T34">os objetos do </text:span><text:span text:style-name="T19">usuário </text:span><text:span text:style-name="T34">PROD</text:span><text:span text:style-name="T19">, </text:span><text:span text:style-name="T38">e o arquivo de log d</text:span><text:span text:style-name="T34">essa </text:span><text:span text:style-name="T38">exportação </text:span><text:span text:style-name="T37">prod.log </text:span><text:span text:style-name="T39">(um único arquivo ZIP/RAR com tudo isso)</text:span><text:span text:style-name="T38">. </text:span></text:p>
      <text:p text:style-name="P14"><text:span text:style-name="T38"/></text:p>
      <text:p text:style-name="P15"><text:span text:style-name="T40">Somente um aluno do grupo precisa fazer a entrega do trabalho, inserindo no arquivo entregue o nome de todos os componentes do grupo. </text:span><text:span text:style-name="T19">F</text:span><text:span text:style-name="T33">alaremos mais adiante sobre como fazer a exportação de dados de um usuário para um arquivo DMP. Mas por ora, basta digitar no shell do Linux </text:span></text:p>
      <text:p text:style-name="P15"><text:span text:style-name="T41">$ exp </text:span><text:span text:style-name="T42">prod/prod file=prod.dmp log=prod.log </text:span></text:p>
      <text:p text:style-name="P16"><text:span text:style-name="T43"/></text:p>
      <text:p text:style-name="P16"><text:soft-page-break/><text:span text:style-name="T43">Trabalho </text:span><text:span text:style-name="T44">2</text:span></text:p>
      <text:p text:style-name="P17"><text:span text:style-name="T45"/></text:p>
      <text:p text:style-name="P18"><text:span text:style-name="T19"/></text:p>
      <text:p text:style-name="P18"><text:span text:style-name="T19">O </text:span><text:span text:style-name="T40">Trabalho 2 utiliza a mesma estrutura de tabelas do Trabalho 1. </text:span><text:span text:style-name="T46">Mais especificamente, utiliza as tabelas PEDIDO e ITEM_PEDIDO do usuário PROD. </text:span><text:span text:style-name="T47">Assim, para validar se tudo deu certo, você precisará dos dados que inseriu no usuário PROD quando fez o trabalho 1.</text:span></text:p>
      <text:p text:style-name="P18"><text:span text:style-name="T40"/></text:p>
      <text:p text:style-name="P19"><text:span text:style-name="T48">C</text:span><text:span text:style-name="T49">riar uma estrutura de replicação de dados </text:span><text:span text:style-name="T50">sabendo que há </text:span><text:span text:style-name="T51">agora somente DUAS</text:span><text:span text:style-name="T49"> filiais de carregamento na empresa fictícia que recebe os pedidos, </text:span><text:span text:style-name="T51">Filial </text:span><text:span text:style-name="T52">A</text:span><text:span text:style-name="T51"> e Filial </text:span><text:span text:style-name="T52">B</text:span><text:span text:style-name="T49">. As filiais serão representadas por usuários do mesmo banco de dados. Na prática, seriam usuários remotos, mas como não temos um banco de dados remoto faremos a implementação tendo usuários locais simulando as filiais remotas. Os snapshots de cada filial deverão receber somente os pedidos gerados para aquela filial </text:span><text:span text:style-name="T53">(logo, tabelas PEDIDO e ITEM_PEDIDO)</text:span><text:span text:style-name="T49">. </text:span><text:span text:style-name="T54">Por exemplo, se o pedido foi registrado para a Filial 1, este pedido será replicado para o usuário do BD </text:span><text:span text:style-name="T55">com nome </text:span><text:span text:style-name="T54">FILIAL</text:span><text:span text:style-name="T52">A</text:span><text:span text:style-name="T54">, </text:span><text:span text:style-name="T56">e </text:span><text:span text:style-name="T54">se for para a Filial 2, replicado para o usuário do BD </text:span><text:span text:style-name="T55">com nome </text:span><text:span text:style-name="T54">FILIAL</text:span><text:span text:style-name="T52">B</text:span><text:span text:style-name="T54">. <text:s/></text:span></text:p>
      <text:p text:style-name="P20"/>
      <text:p text:style-name="P20"><text:span text:style-name="T57">D</text:span><text:span text:style-name="T58">everá haver jobs de replicação au</text:span><text:span text:style-name="T59">to</text:span><text:span text:style-name="T58">máticos para que as réplicas </text:span><text:span text:style-name="T60">de pedidos </text:span><text:span text:style-name="T58">sejam atualizadas periodicamente (a cada 3 minutos). </text:span></text:p>
      <text:p text:style-name="P21"/>
      <text:p text:style-name="P22"><text:span text:style-name="T61">Você d</text:span>everá <text:span text:style-name="T61">criar </text:span><text:span text:style-name="T62">um </text:span><text:span text:style-name="T63">script </text:span><text:span text:style-name="T64">.sh </text:span><text:span text:style-name="T62">contendo </text:span><text:span text:style-name="T65">todos </text:span>o<text:span text:style-name="T62">s</text:span> <text:span text:style-name="T61">comandos</text:span> <text:span text:style-name="T62">solicitados. </text:span><text:span text:style-name="T63">Este script será validado pelo professor e deverá executar no shell do Linux realizando todos os passos abaixo</text:span><text:span text:style-name="T62">:</text:span></text:p>
      <text:p text:style-name="P22"/>
      <text:p text:style-name="P23">1) criação dos usuários FILIAL<text:span text:style-name="T66">A</text:span> <text:span text:style-name="T67">e</text:span> FILIAL<text:span text:style-name="T66">B</text:span></text:p>
      <text:p text:style-name="P23">2) criação dos snapshots</text:p>
      <text:p text:style-name="P22"><text:span text:style-name="T61">3) criação </text:span><text:span text:style-name="T68">dos jobs de replicação</text:span></text:p>
      <text:p text:style-name="P22"/>
      <text:p text:style-name="P22"><text:span text:style-name="T63">Para entregar ao professor, c</text:span><text:span text:style-name="T61">riar </text:span><text:span text:style-name="T62">um arquivo </text:span><text:span text:style-name="T24">.DMP </text:span>com <text:span text:style-name="T63">o script </text:span><text:span text:style-name="T64">.sh</text:span><text:span text:style-name="T63">, </text:span><text:span text:style-name="T69">os </text:span>usuários <text:span text:style-name="T70">PROD</text:span><text:span text:style-name="T69">, </text:span><text:span text:style-name="T70">FILIAL</text:span><text:span text:style-name="T71">1 </text:span><text:span text:style-name="T72">e</text:span><text:span text:style-name="T71"> </text:span><text:span text:style-name="T70">FILIAL</text:span><text:span text:style-name="T71">2 </text:span>do banco de dados <text:span text:style-name="T69">bem como </text:span><text:span text:style-name="T62">o arquivo de LOG dessa exportação. </text:span></text:p>
      <text:p text:style-name="P24"/>
      <text:p text:style-name="P22"><text:span text:style-name="T69">Deve ser gerado </text:span><text:span text:style-name="T39">um único arquivo ZIP/RAR com tudo isso </text:span><text:span text:style-name="T73">que foi pedido anteriormente</text:span><text:span text:style-name="T74">.</text:span> <text:span text:style-name="T75">Enviá-lo por e-mail. </text:span></text:p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7"><text:span text:style-name="T76">Dados a serem inseridos nas tabelas</text:span></text:p>
      <text:p text:style-name="P28"/>
      <text:p text:style-name="P28"/>
      <text:p text:style-name="P29">Clientes a serem inseridos:</text:p>
      <text:p text:style-name="P30"/>
      <text:p text:style-name="P30">1<text:tab/>Cliente Um<text:tab/><text:tab/><text:tab/>Lojas Um</text:p>
      <text:p text:style-name="P30">2<text:tab/>Cliente Dois<text:tab/><text:tab/>Magazine Dois</text:p>
      <text:p text:style-name="P30">3<text:tab/>Cliente Tres<text:tab/><text:tab/>Hipermercado Tres</text:p>
      <text:p text:style-name="P30">4<text:tab/>Cliente Quatro<text:tab/><text:tab/>Atacad<text:span text:style-name="T77">a</text:span>o Quatro</text:p>
      <text:p text:style-name="P30">5<text:tab/>Cliente Cinco<text:tab/><text:tab/>Distribuidora Cinco</text:p>
      <text:p text:style-name="P31"/>
      <text:p text:style-name="P32"><text:span text:style-name="T11"/></text:p>
      <text:p text:style-name="P32"><text:span text:style-name="T11"/></text:p>
      <text:p text:style-name="P29"><text:span text:style-name="T78">P</text:span>edidos a serem inseridos:</text:p>
      <text:p text:style-name="P32"><text:span text:style-name="T11"/></text:p>
      <text:p text:style-name="P30"><text:span text:style-name="T79">1</text:span><text:span text:style-name="T40">1<text:tab/>2<text:tab/>3</text:span></text:p>
      <text:p text:style-name="P33">12<text:tab/>4<text:tab/>1</text:p>
      <text:p text:style-name="P33">13<text:tab/>5<text:tab/>2</text:p>
      <text:p text:style-name="P33">14<text:tab/>3<text:tab/>2</text:p>
      <text:p text:style-name="P33">15<text:tab/>4<text:tab/>1</text:p>
      <text:p text:style-name="P33">16<text:tab/>2<text:tab/>3</text:p>
      <text:p text:style-name="P33">17<text:tab/>1<text:tab/>1</text:p>
      <text:p text:style-name="P33">18<text:tab/>2<text:tab/>3</text:p>
      <text:p text:style-name="P33">19<text:tab/>4<text:tab/>1</text:p>
      <text:p text:style-name="P33">20<text:tab/>1<text:tab/>1</text:p>
      <text:p text:style-name="P33">21<text:tab/>5<text:tab/>2</text:p>
      <text:p text:style-name="P30"><text:span text:style-name="T40">22<text:tab/>3<text:tab/></text:span><text:span text:style-name="T80">5</text:span></text:p>
      <text:p text:style-name="P33">23<text:tab/>5<text:tab/>2</text:p>
      <text:p text:style-name="P30"><text:span text:style-name="T40">24<text:tab/>3<text:tab/></text:span><text:span text:style-name="T81">4</text:span></text:p>
      <text:p text:style-name="P30"><text:span text:style-name="T40"/></text:p>
      <text:p text:style-name="P30"><text:span text:style-name="T40"/></text:p>
      <text:p text:style-name="P30"><text:span text:style-name="T40"/></text:p>
      <text:p text:style-name="P34">Produtos a serem inseridos:</text:p>
      <text:p text:style-name="P34"/>
      <text:p text:style-name="P35">111<text:tab/><text:tab/>Silicone Incolor 300g<text:tab/><text:tab/><text:tab/> 12.00</text:p>
      <text:p text:style-name="P35">112<text:tab/><text:tab/>Cimento Portland CP II 50 kg<text:tab/> 28.00</text:p>
      <text:p text:style-name="P36"><text:span text:style-name="T40">113<text:tab/><text:tab/>Tijolo cer</text:span><text:span text:style-name="T82">a</text:span><text:span text:style-name="T40">mico 6 furos<text:tab/><text:tab/> <text:s/>1.20</text:span></text:p>
      <text:p text:style-name="P36"><text:span text:style-name="T83">114<text:tab/><text:tab/></text:span><text:span text:style-name="T40">Telha cer</text:span><text:span text:style-name="T82">a</text:span><text:span text:style-name="T40">mica tipo romana<text:tab/><text:tab/> <text:s/></text:span><text:span text:style-name="T83">3.50</text:span></text:p>
      <text:p text:style-name="P37"><text:span text:style-name="T40">115<text:tab/><text:tab/>Tinta acr</text:span><text:span text:style-name="T82">i</text:span><text:span text:style-name="T40">lica branca 18L<text:tab/><text:tab/>230.00</text:span></text:p>
      <text:p text:style-name="P37"><text:span text:style-name="T40">116<text:tab/><text:tab/>Rejunte cer</text:span><text:span text:style-name="T82">a</text:span><text:span text:style-name="T40">mico 1kg<text:tab/><text:tab/><text:tab/> <text:s/>9.50</text:span></text:p>
      <text:p text:style-name="P38">117<text:tab/><text:tab/>Argamassa ACI 20Kg<text:tab/><text:tab/><text:tab/> 22.00</text:p>
      <text:p text:style-name="P38">118<text:tab/><text:tab/>Interruptor simples de embutir<text:tab/> 12.00</text:p>
      <text:p text:style-name="P39"><text:span text:style-name="T40">119<text:tab/><text:tab/>Tubo PVC sold</text:span><text:span text:style-name="T82">a</text:span><text:span text:style-name="T40">vel 25 mm 6m<text:tab/> <text:tab/> 32.00</text:span></text:p>
      <text:p text:style-name="P39"><text:span text:style-name="T40">120<text:tab/><text:tab/>Fechadura externa padr</text:span><text:span text:style-name="T82">a</text:span><text:span text:style-name="T40">o<text:tab/><text:tab/> 95.00</text:span></text:p>
      <text:p text:style-name="P39"><text:span text:style-name="T40"/></text:p>
      <text:p text:style-name="P39"><text:span text:style-name="T40"/></text:p>
      <text:p text:style-name="P39"><text:span text:style-name="T40"/></text:p>
      <text:p text:style-name="P39"><text:span text:style-name="T40"/></text:p>
      <text:p text:style-name="P39"><text:span text:style-name="T40"/></text:p>
      <text:p text:style-name="P39"><text:span text:style-name="T40"/></text:p>
      <text:p text:style-name="P39"><text:span text:style-name="T40"/></text:p>
      <text:p text:style-name="P39"><text:span text:style-name="T40"/></text:p>
      <text:p text:style-name="P39"><text:span text:style-name="T40"/></text:p>
      <text:p text:style-name="P39"><text:span text:style-name="T40"/></text:p>
      <text:p text:style-name="P39"><text:span text:style-name="T40"/></text:p>
      <text:p text:style-name="P39"><text:span text:style-name="T40"/></text:p>
      <text:p text:style-name="P39"><text:span text:style-name="T40"/></text:p>
      <text:p text:style-name="P39"><text:span text:style-name="T40"/></text:p>
      <text:p text:style-name="P39"><text:span text:style-name="T40"/></text:p>
      <text:p text:style-name="P39"><text:soft-page-break/><text:span text:style-name="T40"/></text:p>
      <text:p text:style-name="P40">Itens de pedido a serem inseridos:</text:p>
      <text:p text:style-name="P40"/>
      <text:p text:style-name="P41"><text:span text:style-name="T40">11<text:tab/>112<text:tab/></text:span><text:span text:style-name="T84">1<text:tab/>9</text:span></text:p>
      <text:p text:style-name="P41"><text:span text:style-name="T84">11</text:span><text:span text:style-name="T40"><text:tab/>118<text:tab/></text:span><text:span text:style-name="T84">2<text:tab/>5</text:span></text:p>
      <text:p text:style-name="P42"><text:span text:style-name="T40">12<text:tab/>120<text:tab/></text:span><text:span text:style-name="T84">1<text:tab/>3</text:span></text:p>
      <text:p text:style-name="P42"><text:span text:style-name="T84">12</text:span><text:span text:style-name="T40"><text:tab/>119<text:tab/></text:span><text:span text:style-name="T84">2<text:tab/>1</text:span></text:p>
      <text:p text:style-name="P42"><text:span text:style-name="T84">12</text:span><text:span text:style-name="T40"><text:tab/>111<text:tab/></text:span><text:span text:style-name="T84">3<text:tab/>2</text:span></text:p>
      <text:p text:style-name="P41"><text:span text:style-name="T40">13<text:tab/></text:span><text:span text:style-name="T85">113<text:tab/></text:span><text:span text:style-name="T84">1<text:tab/>6</text:span></text:p>
      <text:p text:style-name="P41"><text:span text:style-name="T84">13</text:span><text:span text:style-name="T85"><text:tab/>115<text:tab/></text:span><text:span text:style-name="T84">2<text:tab/>7</text:span></text:p>
      <text:p text:style-name="P41"><text:span text:style-name="T84">13</text:span><text:span text:style-name="T85"><text:tab/>120<text:tab/></text:span><text:span text:style-name="T84">3<text:tab/>3</text:span></text:p>
      <text:p text:style-name="P41"><text:span text:style-name="T84">13</text:span><text:span text:style-name="T85"><text:tab/>119<text:tab/></text:span><text:span text:style-name="T84">4<text:tab/>9</text:span></text:p>
      <text:p text:style-name="P41"><text:span text:style-name="T84">13</text:span><text:span text:style-name="T85"><text:tab/>111<text:tab/></text:span><text:span text:style-name="T84">5<text:tab/>8</text:span></text:p>
      <text:p text:style-name="P41"><text:span text:style-name="T40">14<text:tab/></text:span><text:span text:style-name="T85">120<text:tab/></text:span><text:span text:style-name="T84">1<text:tab/>6</text:span></text:p>
      <text:p text:style-name="P41"><text:span text:style-name="T40">15<text:tab/></text:span><text:span text:style-name="T85">117<text:tab/></text:span><text:span text:style-name="T84">1<text:tab/>7</text:span></text:p>
      <text:p text:style-name="P41"><text:span text:style-name="T84">15</text:span><text:span text:style-name="T85"><text:tab/>116<text:tab/></text:span><text:span text:style-name="T84">2<text:tab/>5</text:span></text:p>
      <text:p text:style-name="P41"><text:span text:style-name="T40">16<text:tab/></text:span><text:span text:style-name="T85">115<text:tab/></text:span><text:span text:style-name="T84">1<text:tab/>6</text:span></text:p>
      <text:p text:style-name="P41"><text:span text:style-name="T84">16</text:span><text:span text:style-name="T85"><text:tab/>114<text:tab/></text:span><text:span text:style-name="T84">2<text:tab/>6</text:span></text:p>
      <text:p text:style-name="P41"><text:span text:style-name="T84">16</text:span><text:span text:style-name="T85"><text:tab/>113<text:tab/></text:span><text:span text:style-name="T84">3<text:tab/>2</text:span></text:p>
      <text:p text:style-name="P41"><text:span text:style-name="T84">16</text:span><text:span text:style-name="T85"><text:tab/>111<text:tab/></text:span><text:span text:style-name="T84">4<text:tab/>3</text:span></text:p>
      <text:p text:style-name="P41"><text:span text:style-name="T40">17<text:tab/></text:span><text:span text:style-name="T85">117<text:tab/></text:span><text:span text:style-name="T84">1<text:tab/>1</text:span></text:p>
      <text:p text:style-name="P41"><text:span text:style-name="T84">17</text:span><text:span text:style-name="T85"><text:tab/>112<text:tab/></text:span><text:span text:style-name="T84">2<text:tab/>4</text:span></text:p>
      <text:p text:style-name="P41"><text:span text:style-name="T40">18<text:tab/></text:span><text:span text:style-name="T85">112<text:tab/></text:span><text:span text:style-name="T84">1<text:tab/>5</text:span></text:p>
      <text:p text:style-name="P41"><text:span text:style-name="T40">19<text:tab/></text:span><text:span text:style-name="T85">120</text:span><text:span text:style-name="T84"><text:tab/>1<text:tab/>3</text:span></text:p>
      <text:p text:style-name="P41"><text:span text:style-name="T84">19</text:span><text:span text:style-name="T85"><text:tab/>115<text:tab/></text:span><text:span text:style-name="T84">2<text:tab/>4</text:span></text:p>
      <text:p text:style-name="P41"><text:span text:style-name="T40">20<text:tab/></text:span><text:span text:style-name="T85">111<text:tab/></text:span><text:span text:style-name="T84">1<text:tab/>5</text:span></text:p>
      <text:p text:style-name="P41"><text:span text:style-name="T40">21<text:tab/></text:span><text:span text:style-name="T85">111<text:tab/></text:span><text:span text:style-name="T84">1<text:tab/>4</text:span></text:p>
      <text:p text:style-name="P41"><text:span text:style-name="T84">21</text:span><text:span text:style-name="T85"><text:tab/>112<text:tab/></text:span><text:span text:style-name="T84">2<text:tab/>7</text:span></text:p>
      <text:p text:style-name="P41"><text:span text:style-name="T40">22<text:tab/></text:span><text:span text:style-name="T85">119<text:tab/></text:span><text:span text:style-name="T84">1<text:tab/>2</text:span></text:p>
      <text:p text:style-name="P41"><text:span text:style-name="T84">22</text:span><text:span text:style-name="T85"><text:tab/>118<text:tab/></text:span><text:span text:style-name="T84">2<text:tab/>3</text:span></text:p>
      <text:p text:style-name="P41"><text:span text:style-name="T84">22</text:span><text:span text:style-name="T85"><text:tab/>117<text:tab/></text:span><text:span text:style-name="T84">3<text:tab/>1</text:span></text:p>
      <text:p text:style-name="P41"><text:span text:style-name="T40">23<text:tab/></text:span><text:span text:style-name="T85">115<text:tab/></text:span><text:span text:style-name="T84">1<text:tab/>2</text:span></text:p>
      <text:p text:style-name="P41"><text:span text:style-name="T84">23</text:span><text:span text:style-name="T85"><text:tab/>111<text:tab/></text:span><text:span text:style-name="T84">2<text:tab/>4</text:span></text:p>
      <text:p text:style-name="P41"><text:span text:style-name="T84">23</text:span><text:span text:style-name="T85"><text:tab/>112<text:tab/></text:span><text:span text:style-name="T84">3<text:tab/>3</text:span></text:p>
      <text:p text:style-name="P41"><text:span text:style-name="T40">24<text:tab/></text:span><text:span text:style-name="T85">113<text:tab/></text:span><text:span text:style-name="T84">1<text:tab/>2</text:span></text:p>
      <text:p text:style-name="P41"><text:span text:style-name="T40"/></text:p>
      <text:p text:style-name="P41"><text:span text:style-name="T40"/></text:p>
      <text:p text:style-name="P41"><text:span text:style-name="T40"/></text:p>
      <text:p text:style-name="P41"><text:span text:style-name="T40"/></text:p>
      <text:p text:style-name="P41"><text:span text:style-name="T40"/></text:p>
      <text:p text:style-name="P41"><text:span text:style-name="T40"/></text:p>
      <text:p text:style-name="P41"><text:span text:style-name="T40"/></text:p>
      <text:p text:style-name="P41"><text:span text:style-name="T40"/></text:p>
      <text:p text:style-name="P41"><text:span text:style-name="T40"/></text:p>
      <text:p text:style-name="P41"><text:span text:style-name="T40"/></text:p>
      <text:p text:style-name="P41"><text:span text:style-name="T40"/></text:p>
      <text:p text:style-name="P41"><text:span text:style-name="T40"/></text:p>
      <text:p text:style-name="P41"><text:span text:style-name="T40"/></text:p>
      <text:p text:style-name="P41"><text:span text:style-name="T40"/></text:p>
      <text:p text:style-name="P41"><text:span text:style-name="T40"/></text:p>
      <text:p text:style-name="P41"><text:span text:style-name="T40"/></text:p>
      <text:p text:style-name="P41"><text:span text:style-name="T40"/></text:p>
      <text:p text:style-name="P41"><text:span text:style-name="T40"/></text:p>
      <text:p text:style-name="P41"><text:span text:style-name="T40"/></text:p>
      <text:p text:style-name="P41"><text:span text:style-name="T40"/></text:p>
      <text:p text:style-name="P41"><text:soft-page-break/><text:span text:style-name="T40"/></text:p>
      <text:p text:style-name="P43"><text:span text:style-name="T40">Para avaliar a pontuação que você receberá, considere que sua nota parte de 10,0 e tem descontos conforme os critérios a seguir. </text:span><text:span text:style-name="T86">Outros problemas encontrados terão pontos descontados conforme a gravidade.</text:span></text:p>
      <text:p text:style-name="P43"><text:span text:style-name="T40"/></text:p>
      <text:p text:style-name="P44">Problema<text:tab/><text:tab/><text:tab/><text:tab/><text:tab/><text:tab/><text:tab/>Penalidade (perde em pontos)</text:p>
      <text:p text:style-name="P45"><text:span text:style-name="T40"/></text:p>
      <text:p text:style-name="P46"><text:span text:style-name="T40">Trigger não entregue<text:tab/><text:tab/><text:tab/><text:tab/><text:tab/><text:tab/>1,</text:span><text:span text:style-name="T87">5</text:span></text:p>
      <text:p text:style-name="P46"><text:span text:style-name="T40">Procedure não entregue<text:tab/><text:tab/><text:tab/><text:tab/><text:tab/>1,</text:span><text:span text:style-name="T87">5</text:span></text:p>
      <text:p text:style-name="P47">Atraso na entrega do trabalho<text:tab/><text:tab/><text:tab/><text:tab/>10% da nota por dia de atraso</text:p>
      <text:p text:style-name="P48"><text:span text:style-name="T4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1.401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11:26:18.685000000</meta:creation-date>
    <dc:date>2026-04-22T21:00:49.062000000</dc:date>
    <meta:editing-duration>P4DT6H13M34S</meta:editing-duration>
    <meta:editing-cycles>112</meta:editing-cycles>
    <meta:generator>LibreOffice/24.8.4.2$Windows_X86_64 LibreOffice_project/bb3cfa12c7b1bf994ecc5649a80400d06cd71002</meta:generator>
    <meta:document-statistic meta:table-count="0" meta:image-count="0" meta:object-count="0" meta:page-count="5" meta:paragraph-count="104" meta:word-count="1094" meta:character-count="5998" meta:non-whitespace-character-count="4869"/>
  </office:meta>
</office:document-meta>
</file>