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WW8Num1">
      <style:text-properties style:font-size-complex="8pt"/>
    </style:style>
    <style:style style:name="P3" style:family="paragraph" style:parent-style-name="Standard">
      <style:paragraph-properties fo:margin-left="1.905cm" fo:margin-right="0cm" fo:text-indent="0cm" style:auto-text-indent="false"/>
      <style:text-properties style:font-size-complex="8pt"/>
    </style:style>
    <style:style style:name="P4" style:family="paragraph" style:parent-style-name="Standard">
      <style:text-properties fo:color="#000000" loext:opacity="100%" style:font-name="Courier New1" fo:font-size="9pt" fo:language="en" fo:country="US" officeooo:rsid="001ad608" officeooo:paragraph-rsid="00091c2b" style:font-size-asian="9pt" style:font-size-complex="9pt"/>
    </style:style>
    <style:style style:name="P5" style:family="paragraph" style:parent-style-name="Standard">
      <style:text-properties style:font-name="Courier New1" fo:font-size="9pt" officeooo:paragraph-rsid="00091c2b" style:font-size-asian="9pt" style:font-size-complex="9pt"/>
    </style:style>
    <style:style style:name="P6" style:family="paragraph" style:parent-style-name="Standard">
      <style:text-properties style:font-name="Courier New1" fo:font-size="9pt" style:font-size-asian="9pt" style:font-name-complex="Courier New" style:font-size-complex="9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Courier New1" fo:font-size="9pt" fo:language="en" fo:country="US" style:font-size-asian="9pt" style:font-name-complex="Courier New" style:font-size-complex="9pt"/>
    </style:style>
    <style:style style:name="P8" style:family="paragraph" style:parent-style-name="Standard">
      <style:paragraph-properties fo:margin-left="6.265cm" fo:margin-right="0cm" fo:text-indent="1.228cm" style:auto-text-indent="false"/>
      <style:text-properties style:font-name="Courier New1" fo:font-size="9pt" fo:language="en" fo:country="US" style:font-size-asian="9pt" style:font-name-complex="Courier New" style:font-size-complex="9pt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size-asian="10pt" style:font-name-complex="Courier New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Courier New1" fo:font-size="9pt" style:font-size-asian="9pt" style:font-name-complex="Courier New" style:font-size-complex="9pt"/>
    </style:style>
    <style:style style:name="P11" style:family="paragraph" style:parent-style-name="Standard">
      <style:paragraph-properties fo:margin-left="1.27cm" fo:margin-right="0cm" fo:text-indent="1.228cm" style:auto-text-indent="false"/>
      <style:text-properties style:font-name="Courier New1" fo:font-size="9pt" style:font-size-asian="9pt" style:font-name-complex="Courier New" style:font-size-complex="9pt"/>
    </style:style>
    <style:style style:name="P12" style:family="paragraph" style:parent-style-name="Standard">
      <style:paragraph-properties fo:margin-left="1.27cm" fo:margin-right="0cm" fo:text-indent="1.228cm" style:auto-text-indent="false"/>
      <style:text-properties style:font-name="Courier New1" fo:font-size="9pt" fo:language="en" fo:country="US" style:font-size-asian="9pt" style:font-name-complex="Courier New" style:font-size-complex="9pt"/>
    </style:style>
    <style:style style:name="P13" style:family="paragraph" style:parent-style-name="Standard">
      <style:paragraph-properties fo:margin-left="3.768cm" fo:margin-right="0cm" fo:text-indent="1.228cm" style:auto-text-indent="false"/>
      <style:text-properties style:font-name="Courier New1" fo:font-size="9pt" fo:language="en" fo:country="US" style:font-size-asian="9pt" style:font-name-complex="Courier New" style:font-size-complex="9pt"/>
    </style:style>
    <style:style style:name="P14" style:family="paragraph" style:parent-style-name="Standard">
      <style:paragraph-properties fo:margin-left="1.249cm" fo:margin-right="0cm" fo:text-indent="1.249cm" style:auto-text-indent="false"/>
      <style:text-properties style:font-name="Courier New1" fo:font-size="9pt" fo:language="en" fo:country="US" style:font-size-asian="9pt" style:font-name-complex="Courier New" style:font-size-complex="9pt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091c2b" style:font-size-asian="10pt" style:font-name-complex="Courier New" style:font-size-complex="10pt"/>
    </style:style>
    <style:style style:name="P17" style:family="paragraph" style:parent-style-name="Standard">
      <style:paragraph-properties fo:margin-left="1.27cm" fo:margin-right="0cm" fo:text-indent="1.228cm" style:auto-text-indent="false"/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margin-left="1.27cm" fo:margin-right="0cm" fo:text-indent="1.228cm" style:auto-text-indent="false"/>
      <style:text-properties style:font-name="Courier New" fo:font-size="10pt" fo:language="en" fo:country="US" style:font-size-asian="10pt" style:font-name-complex="Courier New" style:font-size-complex="10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Courier New" fo:font-size="10pt" style:font-size-asian="10pt" style:font-name-complex="Courier New" style:font-size-complex="10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Courier New" fo:font-size="9pt" style:font-size-asian="9pt" style:font-name-complex="Courier New" style:font-size-complex="9pt"/>
    </style:style>
    <style:style style:name="P21" style:family="paragraph" style:parent-style-name="Standard">
      <style:paragraph-properties fo:margin-left="1.27cm" fo:margin-right="0cm" fo:text-indent="1.228cm" style:auto-text-indent="false"/>
      <style:text-properties style:font-name="Courier New1" fo:font-size="9pt" fo:language="en" fo:country="US" style:font-name-asian="Courier New" style:font-size-asian="9pt" style:font-name-complex="Courier New" style:font-size-complex="9pt"/>
    </style:style>
    <style:style style:name="P22" style:family="paragraph" style:parent-style-name="Standard">
      <style:paragraph-properties fo:margin-left="3.747cm" fo:margin-right="0cm" fo:text-indent="1.249cm" style:auto-text-indent="false"/>
      <style:text-properties style:font-name="Courier New1" fo:font-size="9pt" fo:language="en" fo:country="US" style:font-size-asian="9pt" style:font-name-complex="Courier New" style:font-size-complex="9pt"/>
    </style:style>
    <style:style style:name="P23" style:family="paragraph" style:parent-style-name="Standard">
      <style:paragraph-properties fo:margin-left="4.995cm" fo:margin-right="0cm" fo:text-indent="0cm" style:auto-text-indent="false"/>
      <style:text-properties style:font-name="Courier New1" fo:font-size="9pt" fo:language="en" fo:country="US" style:font-size-asian="9pt" style:font-name-complex="Courier New" style:font-size-complex="9pt"/>
    </style:style>
    <style:style style:name="P24" style:family="paragraph" style:parent-style-name="Standard">
      <style:text-properties style:font-name="Courier New1" fo:font-size="9pt" fo:language="en" fo:country="US" style:font-size-asian="9pt" style:font-name-complex="Courier New" style:font-size-complex="9pt"/>
    </style:style>
    <style:style style:name="P25" style:family="paragraph" style:parent-style-name="Standard">
      <style:text-properties style:font-name="Courier New" fo:font-size="9pt" fo:language="en" fo:country="US" style:font-size-asian="9pt" style:font-name-complex="Courier New" style:font-size-complex="9pt"/>
    </style:style>
    <style:style style:name="P26" style:family="paragraph" style:parent-style-name="Standard">
      <style:text-properties style:font-name="Courier New1" fo:font-size="9pt" style:font-size-asian="9pt" style:font-size-complex="9pt"/>
    </style:style>
    <style:style style:name="P27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Courier New" fo:font-size="9pt" fo:language="en" fo:country="US" style:font-size-asian="9pt" style:font-name-complex="Courier New" style:font-size-complex="9pt"/>
    </style:style>
    <style:style style:name="P29" style:family="paragraph" style:parent-style-name="Standard">
      <style:text-properties style:font-name="Courier New1" fo:font-size="9pt" fo:language="en" fo:country="US" officeooo:rsid="000c357d" officeooo:paragraph-rsid="000c357d" style:font-size-asian="9pt" style:font-name-complex="Courier New" style:font-size-complex="9pt"/>
    </style:style>
    <style:style style:name="P30" style:family="paragraph" style:parent-style-name="Standard">
      <style:text-properties style:font-name="Courier New1" fo:font-size="9pt" fo:language="en" fo:country="US" officeooo:rsid="000cc220" officeooo:paragraph-rsid="000d8457" style:font-size-asian="9pt" style:font-name-complex="Courier New" style:font-size-complex="9pt"/>
    </style:style>
    <style:style style:name="P31" style:family="paragraph" style:parent-style-name="Standard">
      <style:text-properties style:use-window-font-color="true" loext:opacity="0%" style:font-name="Courier New1" fo:font-size="9pt" fo:language="en" fo:country="US" officeooo:rsid="000cc220" officeooo:paragraph-rsid="000d8457" fo:background-color="transparent" style:font-size-asian="9pt" style:font-name-complex="Courier New" style:font-size-complex="9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Courier New1" fo:font-size="9pt" fo:language="en" fo:country="US" officeooo:paragraph-rsid="000d8457" fo:background-color="transparent" style:font-size-asian="9pt" style:font-name-complex="Courier New" style:font-size-complex="9pt"/>
    </style:style>
    <style:style style:name="P33" style:family="paragraph" style:parent-style-name="Standard">
      <style:paragraph-properties fo:margin-left="1.27cm" fo:margin-right="0cm" fo:text-indent="1.228cm" style:auto-text-indent="false"/>
      <style:text-properties fo:color="#b2b2b2" loext:opacity="100%" style:font-name="Courier New1" fo:font-size="9pt" fo:language="en" fo:country="US" officeooo:paragraph-rsid="000d8457" fo:background-color="#b2b2b2" style:font-size-asian="9pt" style:font-name-complex="Courier New" style:font-size-complex="9pt"/>
    </style:style>
    <style:style style:name="T1" style:family="text">
      <style:text-properties fo:color="#000000" loext:opacity="100%" fo:language="en" fo:country="US" officeooo:rsid="001ad608"/>
    </style:style>
    <style:style style:name="T2" style:family="text">
      <style:text-properties fo:color="#000000" loext:opacity="100%" fo:language="en" fo:country="US" officeooo:rsid="00091c2b"/>
    </style:style>
    <style:style style:name="T3" style:family="text">
      <style:text-properties officeooo:rsid="00091c2b"/>
    </style:style>
    <style:style style:name="T4" style:family="text">
      <style:text-properties officeooo:rsid="0007cc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1"/>
    </style:style>
    <style:style style:name="T7" style:family="text">
      <style:text-properties style:font-name-complex="Courier New"/>
    </style:style>
    <style:style style:name="T8" style:family="text">
      <style:text-properties fo:language="en" fo:country="US" style:font-name-complex="Courier New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officeooo:rsid="000ce5c7" style:font-size-asian="12pt" style:font-size-complex="12pt"/>
    </style:style>
    <style:style style:name="T11" style:family="text">
      <style:text-properties style:use-window-font-color="true" loext:opacity="0%" style:font-name="Times New Roman" fo:font-size="12pt" fo:background-color="transparent" loext:char-shading-value="0" style:font-size-asian="12pt" style:font-size-complex="12pt"/>
    </style:style>
    <style:style style:name="T12" style:family="text">
      <style:text-properties style:font-name="Times New Roman" fo:font-size="12pt" officeooo:rsid="000d8457" style:font-size-asian="12pt" style:font-size-complex="12pt"/>
    </style:style>
    <style:style style:name="T13" style:family="text">
      <style:text-properties fo:color="#b2b2b2" loext:opacity="100%" style:font-name="Courier New1" officeooo:rsid="000d8457" fo:background-color="#b2b2b2" loext:char-shading-value="0"/>
    </style:style>
    <style:style style:name="T14" style:family="text">
      <style:text-properties officeooo:rsid="000d8457"/>
    </style:style>
    <style:style style:name="T15" style:family="text">
      <style:text-properties fo:color="#b2b2b2" loext:opacity="100%" officeooo:rsid="000d8457" fo:background-color="#b2b2b2" loext:char-shading-value="0"/>
    </style:style>
    <style:style style:name="T16" style:family="text">
      <style:text-properties fo:color="#b2b2b2" loext:opacity="100%" fo:background-color="#b2b2b2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sh Back Queries</text:p>
      <text:p text:style-name="P1"/>
      <text:list text:style-name="WW8Num1">
        <text:list-item>
          <text:p text:style-name="P2">Para testar o funcionamento das Flash Back Queries, vamos criar uma tabela de testes. Conectar, então, no usuário POS: </text:p>
        </text:list-item>
      </text:list>
      <text:p text:style-name="P3"/>
      <text:p text:style-name="P4"><text:tab/>oracle@Ub11Exer:~$ </text:p>
      <text:p text:style-name="P4"><text:tab/></text:p>
      <text:p text:style-name="P5"><text:span text:style-name="T1"><text:tab/></text:span><text:span text:style-name="T2">sqlplus </text:span>pos/pos</text:p>
      <text:p text:style-name="P6"/>
      <text:p text:style-name="P6"><text:tab/><text:span text:style-name="T3">SQL&gt; </text:span></text:p>
      <text:p text:style-name="P6"/>
      <text:p text:style-name="P7">create table ESTOQUE ( <text:tab/><text:tab/>cod <text:tab/><text:tab/>number <text:tab/><text:tab/>not null,</text:p>
      <text:p text:style-name="P7"><text:tab/><text:tab/><text:tab/><text:tab/><text:tab/>descricao<text:tab/>varchar2(40)<text:tab/><text:tab/>not null,</text:p>
      <text:p text:style-name="P7"><text:tab/><text:tab/><text:tab/><text:tab/><text:tab/>qtde <text:tab/><text:tab/>number<text:tab/><text:tab/><text:tab/>not null,</text:p>
      <text:p text:style-name="P7"><text:tab/><text:tab/><text:tab/><text:tab/><text:tab/>usuario<text:tab/>varchar2(15),</text:p>
      <text:p text:style-name="P8">data_hora<text:tab/>date<text:tab/><text:tab/><text:tab/>not null);</text:p>
      <text:p text:style-name="P7"/>
      <text:p text:style-name="P9">Obs.: esperar alguns segundos antes de inserir ou atualizar cada uma das linhas <text:span text:style-name="T4">abaixo:</text:span></text:p>
      <text:p text:style-name="P9"/>
      <text:p text:style-name="P10"><text:s/><text:tab/>insert into ESTOQUE </text:p>
      <text:p text:style-name="P11">values ( 1,'Diclofenaco Potassico 50mg' ,10,'Elaine', sysdate );</text:p>
      <text:p text:style-name="P11">commit;</text:p>
      <text:p text:style-name="P11"/>
      <text:p text:style-name="P11">insert into ESTOQUE </text:p>
      <text:p text:style-name="P11">values ( 2,'Noripurum Infantil' , <text:s text:c="7"/>20,'Marcia', sysdate );</text:p>
      <text:p text:style-name="P11">commit;</text:p>
      <text:p text:style-name="P11"/>
      <text:p text:style-name="P11">insert into ESTOQUE </text:p>
      <text:p text:style-name="P12">values ( 3,'Tylenol Baby' , <text:s text:c="13"/>30,'Elaine', sysdate );</text:p>
      <text:p text:style-name="P12">commit;</text:p>
      <text:p text:style-name="P12"/>
      <text:p text:style-name="P7"><text:s/></text:p>
      <text:p text:style-name="P7"><text:tab/>set lines 100</text:p>
      <text:p text:style-name="P7"><text:s text:c="6"/><text:tab/>col cod for 999 </text:p>
      <text:p text:style-name="P7"><text:tab/>col descricao for a35</text:p>
      <text:p text:style-name="P7"><text:s text:c="6"/><text:tab/>col qtde for 999</text:p>
      <text:p text:style-name="P7"><text:s text:c="6"/><text:tab/>col usuario for a7</text:p>
      <text:p text:style-name="P7"><text:tab/>col data for a22</text:p>
      <text:p text:style-name="P7"><text:tab/></text:p>
      <text:p text:style-name="P7"><text:tab/>select <text:tab/>cod,</text:p>
      <text:p text:style-name="P13">descricao,</text:p>
      <text:p text:style-name="P13">qtde,</text:p>
      <text:p text:style-name="P13">usuario,</text:p>
      <text:p text:style-name="P13">to_char(data_hora, 'DD-MON-YYYY HH24:MI:ss') data</text:p>
      <text:p text:style-name="P14">from ESTOQUE;</text:p>
      <text:p text:style-name="P15"/>
      <text:p text:style-name="P16">Obs.: Vamos guardar o resultado desta consulta para validarmos os testes a seguir.</text:p>
      <text:p text:style-name="P17"/>
      <text:p text:style-name="P11">update estoque set qtde=0, data_hora=sysdate, usuario='Marcia'</text:p>
      <text:p text:style-name="P11">where cod=1;</text:p>
      <text:p text:style-name="P11">commit;</text:p>
      <text:p text:style-name="P11"/>
      <text:p text:style-name="P11">update estoque set qtde=qtde+100, data_hora=sysdate, usuario='Marcia'</text:p>
      <text:p text:style-name="P12">where cod=2;</text:p>
      <text:p text:style-name="P12">commit;</text:p>
      <text:p text:style-name="P18"/>
      <text:p text:style-name="P12">update estoque set qtde=qtde-29, data_hora=sysdate, usuario='Marcia'</text:p>
      <text:p text:style-name="P12">where cod=3;</text:p>
      <text:p text:style-name="P12">commit;</text:p>
      <text:p text:style-name="P12"/>
      <text:p text:style-name="P12"/>
      <text:p text:style-name="P12"/>
      <text:p text:style-name="P7"><text:soft-page-break/><text:tab/>select <text:tab/>cod,</text:p>
      <text:p text:style-name="P13">descricao,</text:p>
      <text:p text:style-name="P13">qtde,</text:p>
      <text:p text:style-name="P13">usuario,</text:p>
      <text:p text:style-name="P13">to_char(data_hora, 'DD-MON-YYYY HH24:MI:ss') data</text:p>
      <text:p text:style-name="P14">from ESTOQUE;</text:p>
      <text:p text:style-name="P15"/>
      <text:p text:style-name="P16">Obs.: Vamos guardar o resultado desta consulta para validarmos os testes a seguir.</text:p>
      <text:p text:style-name="P19"/>
      <text:p text:style-name="P19">Consultar a posição do estoque logo após a <text:span text:style-name="T5">inserção</text:span> do terceiro produto. Vamos voltar no tempo, então, para alguns segundos <text:span text:style-name="T5">após</text:span> a inserção do produto com código 3.</text:p>
      <text:p text:style-name="P19"/>
      <text:p text:style-name="P20"><text:s/><text:span text:style-name="T6"><text:tab/>select * </text:span></text:p>
      <text:p text:style-name="P11">from estoque</text:p>
      <text:p text:style-name="P12">as of timestamp to_timestamp ('2023-05-18 10:27:00','YYYY-MM-DD HH24:MI:SS');</text:p>
      <text:p text:style-name="P21"><text:s/></text:p>
      <text:p text:style-name="P12">update estoque</text:p>
      <text:p text:style-name="P12">set qtde = ( </text:p>
      <text:p text:style-name="P22">select qtde</text:p>
      <text:p text:style-name="P22">from estoque</text:p>
      <text:p text:style-name="P22">as of timestamp </text:p>
      <text:p text:style-name="P23">to_timestamp ('2023-05-18 10:27:00','YYYY-MM-DD HH24:MI:SS')</text:p>
      <text:p text:style-name="P23">where cod=3</text:p>
      <text:p text:style-name="P23">)</text:p>
      <text:p text:style-name="P24"><text:tab/><text:tab/>where cod=3;</text:p>
      <text:p text:style-name="P24"><text:tab/><text:tab/></text:p>
      <text:p text:style-name="P24"><text:tab/><text:tab/>commit;</text:p>
      <text:p text:style-name="P25"/>
      <text:p text:style-name="P7"><text:tab/>select <text:tab/>cod,</text:p>
      <text:p text:style-name="P13">descricao,</text:p>
      <text:p text:style-name="P13">qtde,</text:p>
      <text:p text:style-name="P13">usuario,</text:p>
      <text:p text:style-name="P13">to_char(data_hora, 'DD-MON-YYYY HH24:MI:ss') data</text:p>
      <text:p text:style-name="P14">from ESTOQUE;</text:p>
      <text:p text:style-name="P7"/>
      <text:p text:style-name="P26"><text:span text:style-name="T7"><text:tab/></text:span><text:span text:style-name="T8"> <text:tab/>delete from ESTOQUE;</text:span></text:p>
      <text:p text:style-name="P24"><text:tab/><text:tab/>commit;</text:p>
      <text:p text:style-name="P24"/>
      <text:p text:style-name="P24"><text:tab/> <text:tab/>select * from ESTOQUE;</text:p>
      <text:p text:style-name="P27"/>
      <text:p text:style-name="P9"/>
      <text:p text:style-name="P9">Consultar a posição do estoque logo após a inserção do segundo produto. Vamos voltar no tempo, então, para alguns segundos após a inserção do produto com código 2.</text:p>
      <text:p text:style-name="P28"/>
      <text:p text:style-name="P7"><text:s/><text:tab/>select * </text:p>
      <text:p text:style-name="P12">from estoque</text:p>
      <text:p text:style-name="P12">as of timestamp to_timestamp ('2023-05-18 10:27:00','YYYY-MM-DD HH24:MI:SS');</text:p>
      <text:p text:style-name="P24"/>
      <text:p text:style-name="P29"/>
      <text:p text:style-name="P29"><text:span text:style-name="T9">Exercícios</text:span></text:p>
      <text:p text:style-name="P29"><text:span text:style-name="T9"/></text:p>
      <text:p text:style-name="P29"><text:span text:style-name="T9">1) Neste ponto, a tabela ESTOQUE está vazia. Você deve restaurar os dados da mesma com a posição imediatamente seguinte às inserções dos 3 produtos. Ou seja, devem voltar para a tabela os produtos 1, 2 e 3 com as suas respectivas quantidades 10, 20 e 30.</text:span></text:p>
      <text:p text:style-name="P29"><text:span text:style-name="T9"/></text:p>
      <text:p text:style-name="P30"><text:span text:style-name="T9">R</text:span><text:span text:style-name="T10">esposta</text:span><text:span text:style-name="T9">: </text:span><text:span text:style-name="T11"><text:tab/></text:span></text:p>
      <text:p text:style-name="P31"><text:span text:style-name="T12"><text:tab/><text:tab/></text:span><text:span text:style-name="T13">INSERT into ESTOQUE</text:span></text:p>
      <text:p text:style-name="P32"><text:span text:style-name="T14"><text:tab/></text:span><text:span text:style-name="T15">SELECT</text:span><text:span text:style-name="T16"> * </text:span></text:p>
      <text:p text:style-name="P33"><text:span text:style-name="T14">FROM</text:span> estoque</text:p>
      <text:p text:style-name="P33">as of timestamp to_timestamp ('2023-05-18 10:27:00','YYYY-MM-DD HH24:MI:SS');</text:p>
      <text:p text:style-name="P30"><text:span text:style-name="T14"><text:tab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AE - Faculdade Anglicana de Erechim</dc:title>
    <dc:subject/>
    <meta:keyword/>
    <dc:description/>
    <meta:initial-creator>Berbau</meta:initial-creator>
    <meta:creation-date>2007-05-21T14:21:00</meta:creation-date>
    <dc:date>2025-06-05T11:12:31.877000000</dc:date>
    <meta:editing-cycles>147</meta:editing-cycles>
    <meta:editing-duration>PT10H8M50S</meta:editing-duration>
    <meta:generator>LibreOffice/24.8.4.2$Windows_X86_64 LibreOffice_project/bb3cfa12c7b1bf994ecc5649a80400d06cd71002</meta:generator>
    <meta:document-statistic meta:table-count="0" meta:image-count="0" meta:object-count="0" meta:page-count="2" meta:paragraph-count="89" meta:word-count="380" meta:character-count="2698" meta:non-whitespace-character-count="2278"/>
  </office:meta>
</office:document-meta>
</file>