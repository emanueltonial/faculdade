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paragraph-properties fo:text-align="justify" style:justify-single-word="false"/>
      <style:text-properties fo:language="pt" fo:country="BR"/>
    </style:style>
    <style:style style:name="P3" style:family="paragraph" style:parent-style-name="Standard">
      <style:paragraph-properties fo:text-align="justify" style:justify-single-word="false"/>
      <style:text-properties style:font-name="Courier New" fo:language="pt" fo:country="BR" style:font-name-complex="Courier New"/>
    </style:style>
    <style:style style:name="P4" style:family="paragraph" style:parent-style-name="Standard">
      <style:paragraph-properties fo:margin-right="0cm" fo:text-align="justify" style:justify-single-word="false" fo:text-indent="1.249cm" style:auto-text-indent="false"/>
      <style:text-properties style:font-name="Courier New" fo:language="pt" fo:country="BR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language="pt" fo:country="BR" officeooo:paragraph-rsid="0008e10c" style:font-name-complex="Courier New"/>
    </style:style>
    <style:style style:name="P6" style:family="paragraph" style:parent-style-name="Standard">
      <style:paragraph-properties fo:text-align="center" style:justify-single-word="false"/>
      <style:text-properties fo:font-size="16pt" fo:language="pt" fo:country="BR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Courier New" fo:language="pt" fo:country="BR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language="pt" fo:country="BR" officeooo:paragraph-rsid="0008ad6c" style:font-name-complex="Courier New"/>
    </style:style>
    <style:style style:name="T1" style:family="text">
      <style:text-properties style:font-name="Courier New" style:font-name-complex="Courier New"/>
    </style:style>
    <style:style style:name="T2" style:family="text">
      <style:text-properties officeooo:rsid="00082d79"/>
    </style:style>
    <style:style style:name="T3" style:family="text">
      <style:text-properties fo:font-weight="bold" officeooo:rsid="00082d7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riação de Snapshots</text:p>
      <text:p text:style-name="P6"/>
      <text:p text:style-name="P2">Em nosso exercício, vamos assumir a existência de um ambiente de replicação de dados entre uma matriz e sua filial. A base de dados da matriz será representada em nosso banco de dados pelo usuário ‘matriz’, assim como a filial será representada pelo usuário ‘filial’. <text:span text:style-name="T2">Perceba que, nesses nossos testes, são dois usuários (schemas) do mesmo banco de dados, mas poderiam ser usuários de bancos de dados remotos. Por exemplo, a matriz poderia ser brasileira e a filial japonesa, sendo que o ajuste seria somente feito no arquivo </text:span><text:span text:style-name="T3">tnsnames.ora </text:span><text:span text:style-name="T2">estudado nos exercícios anteriores. Obviamente que tudo isso só funcionaria mediante a existência de infraestrutura de rede montada para este fim.</text:span></text:p>
      <text:p text:style-name="P2"/>
      <text:p text:style-name="P2">Assim, para criarmos as réplicas, iniciamos com a conexão no usuário ‘filial’ para criação do dblink para o banco de dados da matriz e dos snapshots propriamente ditos.</text:p>
      <text:p text:style-name="P2"/>
      <text:p text:style-name="P3">SQL&gt;</text:p>
      <text:p text:style-name="P4">conn filial1/filial1</text:p>
      <text:p text:style-name="P3"/>
      <text:p text:style-name="P3">SQL&gt; </text:p>
      <text:p text:style-name="P4">create database link BancoMatriz <text:span text:style-name="T1"/></text:p>
      <text:p text:style-name="P4">connect to matriz <text:span text:style-name="T1"/></text:p>
      <text:p text:style-name="P4">identified by matriz <text:span text:style-name="T1"/></text:p>
      <text:p text:style-name="P4">using 'XE';</text:p>
      <text:p text:style-name="P3"/>
      <text:p text:style-name="P3">SQL&gt;<text:span text:style-name="T1"/></text:p>
      <text:p text:style-name="P3"><text:tab/>create snapshot pedido</text:p>
      <text:p text:style-name="P3"><text:tab/>refresh fast</text:p>
      <text:p text:style-name="P3"><text:tab/>as <text:tab/>select * from pedido@bancomatriz </text:p>
      <text:p text:style-name="P3"><text:tab/><text:tab/>where filial = 1;</text:p>
      <text:p text:style-name="P3"/>
      <text:p text:style-name="P3">A criação do snapshot acima deve ter abortado com a ocorrência do erro ORA-23413. Precisamos, antes, criar o log de alterações na tabela de origem, no usuário 'matriz'.</text:p>
      <text:p text:style-name="P3"/>
      <text:p text:style-name="P3">SQL&gt;</text:p>
      <text:p text:style-name="P3"><text:tab/>conn matriz/matriz</text:p>
      <text:p text:style-name="P3"/>
      <text:p text:style-name="P3"><text:tab/>create snapshot log on pedido;</text:p>
      <text:p text:style-name="P3"/>
      <text:p text:style-name="P3">SQL&gt;</text:p>
      <text:p text:style-name="P4">conn filial1/filial1</text:p>
      <text:p text:style-name="P3"/>
      <text:p text:style-name="P3"><text:tab/>create snapshot pedido</text:p>
      <text:p text:style-name="P3"><text:tab/>refresh fast</text:p>
      <text:p text:style-name="P3"><text:tab/>as <text:tab/>select * from pedido@bancomatriz </text:p>
      <text:p text:style-name="P3"><text:tab/><text:tab/>where filial = 1;</text:p>
      <text:p text:style-name="P3"/>
      <text:p text:style-name="P3"><text:tab/>select * from pedido;</text:p>
      <text:p text:style-name="P3"/>
      <text:p text:style-name="P2">O que acontece agora é que a cada operação de INSERT, DELETE ou UPDATE na tabela ‘pedido’ do usuário ‘matriz’, uma entrada registrando a mudança é feita no log de alterações. Isto possibilita a <text:soft-page-break/>propagação dessas alterações para todas as réplicas que a tabela possuir em quaisquer bancos de dados, remotos ou não.</text:p>
      <text:p text:style-name="P2"/>
      <text:p text:style-name="P2">Vamos conectar no usuário ‘matriz’ e verificar a posição do log neste momento e depois de fazermos alguma alteração na tabela:</text:p>
      <text:p text:style-name="P2"/>
      <text:p text:style-name="P3">SQL&gt;</text:p>
      <text:p text:style-name="P3"><text:tab/>conn matriz/matriz</text:p>
      <text:p text:style-name="P3"/>
      <text:p text:style-name="P3"><text:tab/>select * from mlog$_pedido;</text:p>
      <text:p text:style-name="P3"/>
      <text:p text:style-name="P8"><text:tab/>insert into pedido </text:p>
      <text:p text:style-name="P8"><text:tab/>values ( 200850,<text:tab/>155,<text:tab/>4044,<text:tab/>10,<text:tab/>sysdate,<text:tab/>1);</text:p>
      <text:p text:style-name="P3"><text:tab/>commit;</text:p>
      <text:p text:style-name="P3"><text:tab/></text:p>
      <text:p text:style-name="P3"><text:tab/>select * from mlog$_pedido;</text:p>
      <text:p text:style-name="P3"/>
      <text:p text:style-name="P2">Vamos agora forçar uma atualização do snapshot ‘pedido’ da filial 1 , consultar os dados e, em seguida, verificar novamente o log de alterações. </text:p>
      <text:p text:style-name="P2"/>
      <text:p text:style-name="P3">SQL&gt;</text:p>
      <text:p text:style-name="P2"><text:span text:style-name="T1"><text:tab/>conn filial1/filial1</text:span><text:span text:style-name="T1"/></text:p>
      <text:p text:style-name="P3"><text:tab/></text:p>
      <text:p text:style-name="P5"><text:tab/>exec dbms_snapshot.refresh('PEDIDO','F');</text:p>
      <text:p text:style-name="P3"/>
      <text:p text:style-name="P3"><text:tab/>select * from pedido order by codped;</text:p>
      <text:p text:style-name="P3"/>
      <text:p text:style-name="P3">SQL&gt;</text:p>
      <text:p text:style-name="P3"><text:tab/>conn matriz/matriz</text:p>
      <text:p text:style-name="P3"/>
      <text:p text:style-name="P3"><text:tab/>select * from mlog$_pedido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8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AE - Faculdade Anglicana de Erechim</dc:title>
    <dc:subject/>
    <meta:keyword/>
    <dc:description/>
    <meta:initial-creator>Berbau</meta:initial-creator>
    <meta:creation-date>2007-05-21T14:21:00</meta:creation-date>
    <dc:date>2024-02-23T13:48:30.947000000</dc:date>
    <meta:editing-cycles>295</meta:editing-cycles>
    <meta:editing-duration>PT16H35M43S</meta:editing-duration>
    <meta:generator>LibreOffice/7.6.4.1$Windows_X86_64 LibreOffice_project/e19e193f88cd6c0525a17fb7a176ed8e6a3e2aa1</meta:generator>
    <meta:document-statistic meta:table-count="0" meta:image-count="0" meta:object-count="0" meta:page-count="2" meta:paragraph-count="45" meta:word-count="369" meta:character-count="2336" meta:non-whitespace-character-count="1974"/>
  </office:meta>
</office:document-meta>
</file>