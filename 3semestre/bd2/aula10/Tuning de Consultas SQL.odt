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Heading_20_2">
      <style:paragraph-properties fo:text-align="justify" style:justify-single-word="false"/>
      <style:text-properties style:font-name="Times New Roman" fo:font-size="12pt" fo:font-style="normal" style:font-size-asian="12pt" style:font-style-asian="normal" style:font-name-complex="Times New Roman" style:font-size-complex="12pt"/>
    </style:style>
    <style:style style:name="P3" style:family="paragraph" style:parent-style-name="Standard">
      <style:paragraph-properties fo:text-align="justify" style:justify-single-word="false"/>
      <style:text-properties fo:font-size="12pt" fo:font-style="normal" fo:font-weight="bold" style:font-size-asian="12pt" style:font-style-asian="normal" style:font-weight-asian="bold" style:font-name-complex="Times New Roman" style:font-size-complex="12pt"/>
    </style:style>
    <style:style style:name="P4" style:family="paragraph" style:parent-style-name="Standard">
      <style:paragraph-properties fo:text-align="justify" style:justify-single-word="false"/>
    </style:style>
    <style:style style:name="P5" style:family="paragraph" style:parent-style-name="Heading_20_2">
      <style:text-properties style:font-name="Times New Roman" fo:font-size="12pt" fo:font-style="normal" style:font-size-asian="12pt" style:font-style-asian="normal" style:font-name-complex="Times New Roman" style:font-size-complex="12pt"/>
    </style:style>
    <style:style style:name="P6" style:family="paragraph" style:parent-style-name="Standard">
      <style:text-properties fo:font-size="12pt" fo:font-style="normal" style:font-size-asian="12pt" style:font-style-asian="normal" style:font-name-complex="Times New Roman" style:font-size-complex="12pt"/>
    </style:style>
    <style:style style:name="P7" style:family="paragraph" style:parent-style-name="Standard" style:list-style-name="WW8Num3">
      <style:paragraph-properties fo:text-align="justify" style:justify-single-word="false"/>
    </style:style>
    <style:style style:name="P8" style:family="paragraph" style:parent-style-name="Standard">
      <style:paragraph-properties fo:margin-right="0cm" fo:text-indent="0.318cm" style:auto-text-indent="false"/>
      <style:text-properties fo:font-size="10pt" style:font-size-asian="10pt" style:font-size-complex="10pt"/>
    </style:style>
    <style:style style:name="P9" style:family="paragraph" style:parent-style-name="Standard">
      <style:paragraph-properties fo:margin-right="0cm" fo:text-indent="0.318cm" style:auto-text-indent="false"/>
    </style:style>
    <style:style style:name="P10" style:family="paragraph" style:parent-style-name="Standard">
      <style:paragraph-properties fo:text-align="justify" style:justify-single-word="false"/>
      <style:text-properties fo:font-size="10pt" style:font-size-asian="10pt" style:font-size-complex="10pt"/>
    </style:style>
    <style:style style:name="P11" style:family="paragraph" style:parent-style-name="Standard">
      <style:paragraph-properties fo:text-align="justify" style:justify-single-word="false"/>
      <style:text-properties fo:language="en" fo:country="US" fo:font-weight="bold" style:font-weight-asian="bold"/>
    </style:style>
    <style:style style:name="P12" style:family="paragraph" style:parent-style-name="Standard">
      <style:paragraph-properties fo:text-align="justify" style:justify-single-word="false"/>
      <style:text-properties style:font-name="Courier New" fo:font-size="18pt" fo:language="en" fo:country="US" fo:font-weight="bold" style:font-size-asian="18pt" style:font-weight-asian="bold" style:font-name-complex="Courier New" style:font-size-complex="18pt"/>
    </style:style>
    <style:style style:name="P13" style:family="paragraph" style:parent-style-name="Standard">
      <style:paragraph-properties fo:text-align="justify" style:justify-single-word="false"/>
      <style:text-properties style:font-name="Courier New" style:font-name-complex="Courier New"/>
    </style:style>
    <style:style style:name="P14" style:family="paragraph" style:parent-style-name="Standard">
      <style:paragraph-properties fo:text-align="justify" style:justify-single-word="false"/>
      <style:text-properties style:font-name="Courier New" fo:language="en" fo:country="US" style:font-name-complex="Courier New"/>
    </style:style>
    <style:style style:name="P15" style:family="paragraph" style:parent-style-name="Standard">
      <style:paragraph-properties fo:text-align="justify" style:justify-single-word="false"/>
      <style:text-properties style:font-name="Courier New" fo:language="en" fo:country="US" officeooo:paragraph-rsid="00130f5a" style:font-name-complex="Courier New"/>
    </style:style>
    <style:style style:name="P16" style:family="paragraph" style:parent-style-name="Standard">
      <style:paragraph-properties fo:text-align="justify" style:justify-single-word="false"/>
      <style:text-properties officeooo:paragraph-rsid="00130f5a"/>
    </style:style>
    <style:style style:name="P17" style:family="paragraph" style:parent-style-name="Standard">
      <style:paragraph-properties fo:text-align="justify" style:justify-single-word="false"/>
      <style:text-properties style:font-name="Courier New" fo:language="en" fo:country="US" fo:font-weight="bold" style:font-weight-asian="bold" style:font-name-complex="Courier New"/>
    </style:style>
    <style:style style:name="P18" style:family="paragraph" style:parent-style-name="Standard">
      <style:paragraph-properties fo:text-align="justify" style:justify-single-word="false"/>
      <style:text-properties officeooo:paragraph-rsid="00150182"/>
    </style:style>
    <style:style style:name="P19" style:family="paragraph" style:parent-style-name="Standard">
      <style:paragraph-properties fo:text-align="justify" style:justify-single-word="false"/>
      <style:text-properties style:font-name="Courier New" officeooo:rsid="00177206" officeooo:paragraph-rsid="00177206" style:font-name-complex="Courier New"/>
    </style:style>
    <style:style style:name="P20" style:family="paragraph" style:parent-style-name="Standard">
      <style:paragraph-properties fo:margin-right="0cm" fo:text-align="justify" style:justify-single-word="false" fo:text-indent="1.249cm" style:auto-text-indent="false"/>
      <style:text-properties style:font-name="Courier New" fo:language="en" fo:country="US" style:font-name-complex="Courier New"/>
    </style:style>
    <style:style style:name="P21" style:family="paragraph" style:parent-style-name="Standard">
      <style:paragraph-properties fo:margin-right="0cm" fo:text-align="justify" style:justify-single-word="false" fo:text-indent="1.249cm" style:auto-text-indent="false"/>
      <style:text-properties style:font-name="Courier New" style:font-name-complex="Courier New"/>
    </style:style>
    <style:style style:name="P22" style:family="paragraph" style:parent-style-name="Standard">
      <style:paragraph-properties fo:text-align="justify" style:justify-single-word="false"/>
      <style:text-properties officeooo:paragraph-rsid="0019aa36"/>
    </style:style>
    <style:style style:name="P23" style:family="paragraph" style:parent-style-name="Standard">
      <style:paragraph-properties fo:margin-right="0cm" fo:text-align="justify" style:justify-single-word="false" fo:text-indent="1.249cm" style:auto-text-indent="false"/>
      <style:text-properties style:font-name="Courier New" fo:language="en" fo:country="US" officeooo:paragraph-rsid="001da7fb" style:font-name-complex="Courier New"/>
    </style:style>
    <style:style style:name="P24" style:family="paragraph" style:parent-style-name="Standard">
      <style:paragraph-properties fo:text-align="justify" style:justify-single-word="false"/>
      <style:text-properties style:font-name="Courier New" fo:font-weight="bold" style:font-weight-asian="bold" style:font-name-complex="Courier New"/>
    </style:style>
    <style:style style:name="P25" style:family="paragraph" style:parent-style-name="Standard">
      <style:paragraph-properties fo:margin-right="0cm" fo:text-align="justify" style:justify-single-word="false" fo:text-indent="1.249cm" style:auto-text-indent="false"/>
    </style:style>
    <style:style style:name="P26" style:family="paragraph" style:parent-style-name="Standard">
      <style:paragraph-properties fo:text-align="justify" style:justify-single-word="false"/>
      <style:text-properties style:font-name="Courier New" officeooo:paragraph-rsid="002232cf" style:font-name-complex="Courier New"/>
    </style:style>
    <style:style style:name="P27" style:family="paragraph" style:parent-style-name="Standard">
      <style:paragraph-properties fo:margin-right="0cm" fo:text-align="justify" style:justify-single-word="false" fo:text-indent="1.249cm" style:auto-text-indent="false"/>
      <style:text-properties style:font-name="Courier New" fo:language="en" fo:country="US" fo:font-weight="bold" style:font-weight-asian="bold" style:font-name-complex="Courier New"/>
    </style:style>
    <style:style style:name="P28" style:family="paragraph" style:parent-style-name="Standard">
      <style:paragraph-properties fo:text-align="justify" style:justify-single-word="false"/>
      <style:text-properties officeooo:paragraph-rsid="002414f1"/>
    </style:style>
    <style:style style:name="P29" style:family="paragraph" style:parent-style-name="Standard">
      <style:paragraph-properties fo:text-align="justify" style:justify-single-word="false"/>
      <style:text-properties style:font-name="Courier New" officeooo:paragraph-rsid="002414f1" style:font-name-complex="Courier New"/>
    </style:style>
    <style:style style:name="P30" style:family="paragraph" style:parent-style-name="Standard">
      <style:paragraph-properties fo:text-align="justify" style:justify-single-word="false"/>
      <style:text-properties style:font-name="Courier New" officeooo:rsid="00261de6" officeooo:paragraph-rsid="00261de6" style:font-name-complex="Courier New"/>
    </style:style>
    <style:style style:name="P31" style:family="paragraph" style:parent-style-name="Standard">
      <style:paragraph-properties fo:text-align="justify" style:justify-single-word="false"/>
      <style:text-properties style:font-name="Courier New" officeooo:rsid="0027bd17" officeooo:paragraph-rsid="0027bd17" style:font-name-complex="Courier New"/>
    </style:style>
    <style:style style:name="P32" style:family="paragraph" style:parent-style-name="Standard">
      <style:paragraph-properties fo:text-align="justify" style:justify-single-word="false"/>
      <style:text-properties style:font-name="Courier New" fo:font-size="18pt" fo:font-weight="bold" style:font-size-asian="18pt" style:font-weight-asian="bold" style:font-name-complex="Courier New" style:font-size-complex="18pt"/>
    </style:style>
    <style:style style:name="P33" style:family="paragraph" style:parent-style-name="Standard">
      <style:paragraph-properties fo:text-align="justify" style:justify-single-word="false"/>
      <style:text-properties officeooo:paragraph-rsid="002c4ecb"/>
    </style:style>
    <style:style style:name="P34" style:family="paragraph" style:parent-style-name="Standard">
      <style:paragraph-properties fo:text-align="justify" style:justify-single-word="false"/>
      <style:text-properties style:font-name="Courier New" officeooo:paragraph-rsid="002c4ecb" style:font-name-complex="Courier New"/>
    </style:style>
    <style:style style:name="P35" style:family="paragraph" style:parent-style-name="Standard">
      <style:paragraph-properties fo:margin-left="1.249cm" fo:margin-right="0cm" fo:text-align="justify" style:justify-single-word="false" fo:text-indent="1.249cm" style:auto-text-indent="false"/>
    </style:style>
    <style:style style:name="P36" style:family="paragraph" style:parent-style-name="Standard">
      <style:paragraph-properties fo:text-align="justify" style:justify-single-word="false"/>
      <style:text-properties officeooo:paragraph-rsid="002e8820"/>
    </style:style>
    <style:style style:name="P37" style:family="paragraph" style:parent-style-name="Standard">
      <style:paragraph-properties fo:text-align="justify" style:justify-single-word="false"/>
      <style:text-properties style:font-name="Courier New" officeooo:paragraph-rsid="002e8820" style:font-name-complex="Courier New"/>
    </style:style>
    <style:style style:name="P38" style:family="paragraph" style:parent-style-name="Standard">
      <style:paragraph-properties fo:margin-left="2.498cm" fo:margin-right="0cm" fo:text-align="justify" style:justify-single-word="false" fo:text-indent="1.249cm" style:auto-text-indent="false"/>
      <style:text-properties style:font-name="Courier New" fo:language="en" fo:country="US" style:font-name-complex="Courier New"/>
    </style:style>
    <style:style style:name="P39" style:family="paragraph" style:parent-style-name="Standard">
      <style:paragraph-properties fo:margin-left="3.747cm" fo:margin-right="0cm" fo:text-align="justify" style:justify-single-word="false"/>
      <style:text-properties style:font-name="Courier New" fo:language="en" fo:country="US" style:font-name-complex="Courier New"/>
    </style:style>
    <style:style style:name="P40" style:family="paragraph" style:parent-style-name="Standard">
      <style:paragraph-properties fo:text-align="justify" style:justify-single-word="false"/>
      <style:text-properties fo:font-size="12pt" fo:font-style="normal" style:font-size-asian="12pt" style:font-style-asian="normal" style:font-name-complex="Times New Roman" style:font-size-complex="12pt"/>
    </style:style>
    <style:style style:name="P41" style:family="paragraph" style:parent-style-name="Standard" style:list-style-name="WW8Num2">
      <style:paragraph-properties fo:text-align="justify" style:justify-single-word="false"/>
    </style:style>
    <style:style style:name="P42" style:family="paragraph" style:parent-style-name="Standard">
      <style:paragraph-properties fo:margin-left="1.244cm" fo:margin-right="0cm" fo:text-align="justify" style:justify-single-word="false"/>
      <style:text-properties style:text-underline-style="solid" style:text-underline-width="auto" style:text-underline-color="font-color"/>
    </style:style>
    <style:style style:name="P43"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style>
    <style:style style:name="P44" style:family="paragraph" style:parent-style-name="Standard">
      <style:paragraph-properties fo:margin-right="0cm" fo:text-align="justify" style:justify-single-word="false" fo:text-indent="1.249cm" style:auto-text-indent="false"/>
      <style:text-properties style:font-name="Courier New" fo:language="en" fo:country="US" officeooo:rsid="0038c85c" officeooo:paragraph-rsid="0038c85c" style:font-name-complex="Courier New"/>
    </style:style>
    <style:style style:name="P45" style:family="paragraph" style:parent-style-name="Standard">
      <style:paragraph-properties fo:margin-right="0cm" fo:text-align="justify" style:justify-single-word="false" fo:text-indent="1.249cm" style:auto-text-indent="false"/>
      <style:text-properties style:font-name="Courier New" fo:language="en" fo:country="US" officeooo:paragraph-rsid="0038c85c" style:font-name-complex="Courier New"/>
    </style:style>
    <style:style style:name="P46" style:family="paragraph" style:parent-style-name="Standard">
      <style:paragraph-properties fo:text-align="justify" style:justify-single-word="false"/>
      <style:text-properties style:font-name="Courier New" style:text-underline-style="solid" style:text-underline-width="auto" style:text-underline-color="font-color" style:font-name-complex="Courier New"/>
    </style:style>
    <style:style style:name="P47" style:family="paragraph" style:parent-style-name="Standard">
      <style:paragraph-properties fo:text-align="justify" style:justify-single-word="false"/>
      <style:text-properties style:font-name="Courier New" fo:font-size="10pt" fo:language="en" fo:country="US" fo:font-weight="bold" style:font-size-asian="10pt" style:font-weight-asian="bold" style:font-name-complex="Courier New" style:font-size-complex="10pt" style:font-weight-complex="bold"/>
    </style:style>
    <style:style style:name="T1" style:family="text">
      <style:text-properties style:font-name="Times New Roman" fo:font-size="12pt" fo:font-style="normal" style:font-size-asian="12pt" style:font-style-asian="normal" style:font-name-complex="Times New Roman" style:font-size-complex="12pt"/>
    </style:style>
    <style:style style:name="T2" style:family="text">
      <style:text-properties fo:font-size="12pt" fo:font-style="normal" fo:font-weight="bold" style:font-size-asian="12pt" style:font-style-asian="normal" style:font-weight-asian="bold" style:font-name-complex="Times New Roman" style:font-size-complex="12pt"/>
    </style:style>
    <style:style style:name="T3" style:family="text">
      <style:text-properties fo:font-style="italic" style:font-style-asian="italic"/>
    </style:style>
    <style:style style:name="T4" style:family="text">
      <style:text-properties fo:font-size="12pt" fo:font-style="normal" style:font-size-asian="12pt" style:font-style-asian="normal" style:font-name-complex="Times New Roman" style:font-size-complex="12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style>
    <style:style style:name="T7" style:family="text">
      <style:text-properties officeooo:rsid="0019a72c"/>
    </style:style>
    <style:style style:name="T8" style:family="text">
      <style:text-properties fo:language="en" fo:country="US" fo:font-weight="bold" style:font-weight-asian="bold"/>
    </style:style>
    <style:style style:name="T9" style:family="text">
      <style:text-properties fo:language="en" fo:country="US" fo:font-weight="normal" officeooo:rsid="0019a72c" style:font-weight-asian="normal" style:font-weight-complex="normal"/>
    </style:style>
    <style:style style:name="T10" style:family="text">
      <style:text-properties style:font-name="Courier New" fo:font-size="18pt" fo:language="en" fo:country="US" fo:font-weight="bold" style:font-size-asian="18pt" style:font-weight-asian="bold" style:font-name-complex="Courier New" style:font-size-complex="18pt"/>
    </style:style>
    <style:style style:name="T11" style:family="text">
      <style:text-properties style:font-name="Courier New" fo:language="en" fo:country="US" style:font-name-complex="Courier New"/>
    </style:style>
    <style:style style:name="T12" style:family="text">
      <style:text-properties style:font-name="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fo:language="en" fo:country="US" style:font-name-asian="Courier New" style:font-name-complex="Courier New"/>
    </style:style>
    <style:style style:name="T15" style:family="text">
      <style:text-properties style:font-name="Courier New" fo:font-weight="normal" officeooo:rsid="00150182" style:font-weight-asian="normal" style:font-name-complex="Courier New" style:font-weight-complex="normal"/>
    </style:style>
    <style:style style:name="T16" style:family="text">
      <style:text-properties style:font-name="Courier New" fo:font-weight="normal" style:font-weight-asian="normal" style:font-name-complex="Courier New" style:font-weight-complex="normal"/>
    </style:style>
    <style:style style:name="T17" style:family="text">
      <style:text-properties style:font-name="Courier New" fo:font-weight="bold" style:font-weight-asian="bold" style:font-name-complex="Courier New"/>
    </style:style>
    <style:style style:name="T18" style:family="text">
      <style:text-properties style:font-name="Courier New" fo:language="en" fo:country="US" fo:font-weight="bold" style:font-weight-asian="bold" style:font-name-complex="Courier New"/>
    </style:style>
    <style:style style:name="T19" style:family="text">
      <style:text-properties style:font-name="Courier New" fo:language="en" fo:country="US" fo:font-weight="normal" officeooo:rsid="00150182" style:font-weight-asian="normal" style:font-name-complex="Courier New" style:font-weight-complex="normal"/>
    </style:style>
    <style:style style:name="T20" style:family="text">
      <style:text-properties fo:color="#c9211e" loext:opacity="100%" style:font-name="Courier New" style:text-underline-style="none" fo:font-weight="bold" style:font-weight-asian="bold" style:font-name-complex="Courier New"/>
    </style:style>
    <style:style style:name="T21" style:family="text">
      <style:text-properties fo:color="#c9211e" loext:opacity="100%" style:font-name="Courier New" style:text-underline-style="none" fo:font-weight="bold" officeooo:rsid="00154ea7" style:font-weight-asian="bold" style:font-name-complex="Courier New"/>
    </style:style>
    <style:style style:name="T22" style:family="text">
      <style:text-properties fo:color="#000000" loext:opacity="100%" style:font-name="Courier New" style:text-underline-style="none" fo:font-weight="normal" officeooo:rsid="0018d924" style:font-weight-asian="normal" style:font-name-complex="Courier New" style:font-weight-complex="normal"/>
    </style:style>
    <style:style style:name="T23" style:family="text">
      <style:text-properties style:font-name="Courier New" fo:font-weight="normal" officeooo:rsid="0019aa36" style:font-weight-asian="normal" style:font-name-complex="Courier New" style:font-weight-complex="normal"/>
    </style:style>
    <style:style style:name="T24" style:family="text">
      <style:text-properties fo:color="#c9211e" loext:opacity="100%" style:font-name="Courier New" style:text-underline-style="none" fo:font-weight="bold" officeooo:rsid="0019aa36" style:font-weight-asian="bold" style:font-name-complex="Courier New" style:font-weight-complex="bold"/>
    </style:style>
    <style:style style:name="T25" style:family="text">
      <style:text-properties fo:color="#c9211e" loext:opacity="100%" style:font-name="Courier New" style:text-underline-style="none" fo:font-weight="bold" style:font-weight-asian="bold" style:font-name-complex="Courier New" style:font-weight-complex="bold"/>
    </style:style>
    <style:style style:name="T26" style:family="text">
      <style:text-properties fo:color="#c9211e" loext:opacity="100%" style:font-name="Courier New" style:text-underline-style="none" fo:font-weight="bold" officeooo:rsid="001c7497" style:font-weight-asian="bold" style:font-name-complex="Courier New" style:font-weight-complex="bold"/>
    </style:style>
    <style:style style:name="T27" style:family="text">
      <style:text-properties fo:color="#000000" loext:opacity="100%" style:font-name="Courier New" style:text-underline-style="none" fo:font-weight="normal" officeooo:rsid="001b34cb" style:font-weight-asian="normal" style:font-name-complex="Courier New" style:font-weight-complex="normal"/>
    </style:style>
    <style:style style:name="T28" style:family="text">
      <style:text-properties fo:color="#c9211e" loext:opacity="100%" style:font-name="Courier New" style:text-underline-style="none" fo:font-weight="bold" officeooo:rsid="002414f1" style:font-weight-asian="bold" style:font-name-complex="Courier New" style:font-weight-complex="bold"/>
    </style:style>
    <style:style style:name="T29" style:family="text">
      <style:text-properties fo:font-weight="bold" style:font-weight-asian="bold" style:font-weight-complex="bold"/>
    </style:style>
    <style:style style:name="T30" style:family="text">
      <style:text-properties officeooo:rsid="0026fdb5"/>
    </style:style>
    <style:style style:name="T31" style:family="text">
      <style:text-properties style:font-name="Courier New" fo:font-size="18pt" fo:font-weight="bold" style:font-size-asian="18pt" style:font-weight-asian="bold" style:font-name-complex="Courier New" style:font-size-complex="18pt"/>
    </style:style>
    <style:style style:name="T32" style:family="text">
      <style:text-properties fo:color="#c9211e" loext:opacity="100%" style:font-name="Courier New" style:text-underline-style="none" fo:font-weight="bold" officeooo:rsid="002c4ecb" style:font-weight-asian="bold" style:font-name-complex="Courier New" style:font-weight-complex="bold"/>
    </style:style>
    <style:style style:name="T33" style:family="text">
      <style:text-properties fo:color="#c9211e" loext:opacity="100%" style:font-name="Courier New" style:text-underline-style="none" fo:font-weight="bold" officeooo:rsid="002e8820" style:font-weight-asian="bold" style:font-name-complex="Courier New" style:font-weight-complex="bold"/>
    </style:style>
    <style:style style:name="T34" style:family="text">
      <style:text-properties officeooo:rsid="00337969"/>
    </style:style>
    <style:style style:name="T35" style:family="text">
      <style:text-properties officeooo:rsid="0034fa02"/>
    </style:style>
    <style:style style:name="T36" style:family="text">
      <style:text-properties officeooo:rsid="0036d7c6"/>
    </style:style>
    <style:style style:name="T37" style:family="text">
      <style:text-properties officeooo:rsid="003519f1"/>
    </style:style>
    <style:style style:name="T38" style:family="text">
      <style:text-properties officeooo:rsid="0035a7cd"/>
    </style:style>
    <style:style style:name="T39" style:family="text">
      <style:text-properties style:text-underline-style="solid" style:text-underline-width="auto" style:text-underline-color="font-color"/>
    </style:style>
    <style:style style:name="T40" style:family="text">
      <style:text-properties fo:font-size="12pt" fo:font-weight="bold" style:font-size-asian="12pt" style:font-weight-asian="bold" style:font-name-complex="Times New Roman" style:font-size-complex="12pt"/>
    </style:style>
    <style:style style:name="T41" style:family="text">
      <style:text-properties style:font-name="Times New Roman" fo:font-size="12pt" fo:font-weight="bold" style:font-size-asian="12pt" style:font-weight-asian="bold" style:font-name-complex="Times New Roman" style:font-size-complex="12pt"/>
    </style:style>
    <style:style style:name="T42" style:family="text">
      <style:text-properties style:font-name="Courier New" style:text-underline-style="solid" style:text-underline-width="auto" style:text-underline-color="font-color" style:font-name-complex="Courier New"/>
    </style:style>
    <style:style style:name="T43" style:family="text">
      <style:text-properties style:font-name="Courier New" fo:font-size="10pt" fo:font-weight="bold" style:font-size-asian="10pt" style:font-weight-asian="bold" style:font-name-complex="Courier New" style:font-size-complex="10pt" style:font-weight-complex="bold"/>
    </style:style>
    <style:style style:name="T44" style:family="text">
      <style:text-properties style:font-name="Courier New" fo:font-size="10pt" fo:language="en" fo:country="US" fo:font-weight="bold" style:font-size-asian="10pt" style:font-weight-asian="bold" style:font-name-complex="Courier New"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ning de Consultas SQL<text:span text:style-name="T1"/></text:p>
      <text:h text:style-name="P2" text:outline-level="2" loext:marker-style-name="T2">Comparando a performance<text:span text:style-name="T2"/></text:h>
      <text:p text:style-name="P3"/>
      <text:p text:style-name="P4">Vamos verificar agora qual a vantagem da indexação. Existem algumas formas de verificar e dimensionar o ganho obtido de performance de uma consulta pela criação de um índice, como o número de leituras físicas/lógicas executadas. Porém, o mais prático é observar o tempo de execução antes e depois, para saber se o ganho de performance foi significativo ou não. É muito importante destacar que nem sempre a criação de um índice, mesmo que ele passe a ser usado pelo otimizador, trará melhorias de performance. Podem facilmente ocorrer situações em que a criação de um índice piore a performance. Ou ainda, mantenha o tempo de processamento igual. É preciso ter paciência e uma boa metodologia na condução de qualquer trabalho de <text:span text:style-name="T3">tuning </text:span>de consultas SQL para que os objetivos sejam alcançados.</text:p>
      <text:p text:style-name="P4"/>
      <text:h text:style-name="P5" text:outline-level="2" loext:marker-style-name="T4">Otimizadores<text:span text:style-name="T4"/></text:h>
      <text:p text:style-name="P6"/>
      <text:p text:style-name="P4">Existem vários métodos e caminhos de acesso para executar uma sentença SQL. Cabe ao otimizador decidir o melhor a ser usado. Até a versão 9 do Oracle, existiam 2 tipos de otimizadores que podiam ser usados: RBO (rule-based optimizer) e o CBO (cost-based optimizer). O primeiro, montava o plano de acesso baseado em regras. O segundo, monta o plano de acesso baseado nas estatísticas conhecidas sobre os objetos envolvidos na sentença SQL. A partir da versão 10 somente o CBO passou a ser usado. Para fins didáticos, estaremos estudando inicialmente o RBO, já que fica mais fácil entender o funcionamento e uso de índices com este otimizador. Depois, faremos os mesmo exercícios usando o otimizador por custo - CBO - para verificar suas vantagens. </text:p>
      <text:p text:style-name="P4"/>
      <text:p text:style-name="P4">O otimizador pode fazer uso de várias informações para escolher o melhor plano de acesso:</text:p>
      <text:list text:style-name="WW8Num3">
        <text:list-item>
          <text:p text:style-name="P7">pistas informadas pelo desenvolvedor</text:p>
        </text:list-item>
        <text:list-item>
          <text:p text:style-name="P7">estatísticas</text:p>
        </text:list-item>
        <text:list-item>
          <text:p text:style-name="P7">informações do dicionário de dados</text:p>
        </text:list-item>
        <text:list-item>
          <text:p text:style-name="P7">a cláusula WHERE</text:p>
        </text:list-item>
      </text:list>
      <text:p text:style-name="P4"/>
      <text:p text:style-name="P4">Pelo parâmetro <text:span text:style-name="T3">autotrace, </text:span>usado no SQL Plus (acessível em nossos exercícios pelo atalho “Executar Linha de Comandos SQL”), podemos conhecer os planos de acesso escolhidos pelo otimizador para cada sentença SQL.</text:p>
      <text:p text:style-name="P4"/>
      <text:p text:style-name="P8">set autotrace on <text:s text:c="2"/>(ativa a exibição dos planos de acesso e estatísticas mostrando o resultado das consultas SQL)<text:span text:style-name="T5"/></text:p>
      <text:p text:style-name="P8">set autotrace off <text:s text:c="2"/>(desativa a exibição dos planos de acesso e estatísticas)<text:span text:style-name="T5"/></text:p>
      <text:p text:style-name="P8">set autotrace traceonly <text:s/>(ativa a exibição dos planos de acesso e estatísticas sem mostrar o resultado das consultas SQL)<text:span text:style-name="T5"/></text:p>
      <text:p text:style-name="P8">set autotrace traceonly explain <text:s/>(ativa a exibição só dos planos de acesso sem mostrar o resultado das consultas SQL)<text:span text:style-name="T5"/></text:p>
      <text:p text:style-name="P8">set autotrace traceonly statistics <text:s/>(ativa a exibição somente das estatísticas sem mostrar o resultado das consultas SQL)<text:span text:style-name="T5"/></text:p>
      <text:p text:style-name="P9"><text:span text:style-name="T5">show autotrace <text:s/>(mostra a configuração para o </text:span><text:span text:style-name="T6">autotrace </text:span><text:span text:style-name="T5">válida no momento) </text:span></text:p>
      <text:p text:style-name="P10"/>
      <text:p text:style-name="P4"/>
      <text:p text:style-name="P4"/>
      <text:p text:style-name="P4">Também é possível definir, dentro da sessão, o otimizador que deve ser usado na resolução da consulta SQL, pelo<text:span text:style-name="T7">s</text:span> comando<text:span text:style-name="T7">s </text:span><text:span text:style-name="T8">alter system set optimizer_mode = RULE; </text:span><text:span text:style-name="T9">ou </text:span><text:span text:style-name="T8">alter system set optimizer_mode = CHOOSE;</text:span></text:p>
      <text:p text:style-name="P11"/>
      <text:p text:style-name="P4"><text:soft-page-break/>Nosso modelo de dados possui uma tabela chamada TNFS_SAIDA_HIST que guarda os dados históricos de notas fiscais. Ela encontra-se desindexada. Sobre ela, precisamos executar algumas consultas conforme abaixo:</text:p>
      <text:p text:style-name="P4"/>
      <text:p text:style-name="P12"/>
      <text:p text:style-name="P12">Situação 1<text:span text:style-name="T10"/></text:p>
      <text:p text:style-name="P12"/>
      <text:p text:style-name="P13">Obter a soma do peso bruto das notas fiscais, mês a mês, emitidas entre Nov/2002 e Nov/2004, para clientes do RS, que já tenham sido impressas, cujo peso liquido tenha sido maior que 100.000kg.</text:p>
      <text:p text:style-name="P13"/>
      <text:p text:style-name="P14"/>
      <text:p text:style-name="P15">SQL&gt; </text:p>
      <text:p text:style-name="P16"><text:span text:style-name="T11"/></text:p>
      <text:p text:style-name="P16"><text:span text:style-name="T11"><text:s/></text:span><text:span text:style-name="T12">conn pos/pos</text:span></text:p>
      <text:p text:style-name="P13"/>
      <text:p text:style-name="P13">--Dropamos os índices para garantir que nenhum índice esteja criado</text:p>
      <text:p text:style-name="P13"/>
      <text:p text:style-name="P4"><text:span text:style-name="T13"><text:s/></text:span><text:span text:style-name="T11">drop index tnfs_saida_hist_ix1;</text:span></text:p>
      <text:p text:style-name="P4"><text:span text:style-name="T14"><text:s/></text:span><text:span text:style-name="T11">drop index tnfs_saida_hist_ix2;</text:span></text:p>
      <text:p text:style-name="P4"><text:span text:style-name="T14"><text:s/></text:span><text:span text:style-name="T11">drop index tnfs_saida_hist_ix3;</text:span></text:p>
      <text:p text:style-name="P4"><text:span text:style-name="T14"><text:s/></text:span><text:span text:style-name="T11">drop index tnfs_saida_hist_ix4;</text:span></text:p>
      <text:p text:style-name="P14"/>
      <text:p text:style-name="P17"/>
      <text:p text:style-name="P18"><text:span text:style-name="T15">A situação </text:span><text:span text:style-name="T16">atual de acesso </text:span><text:span text:style-name="T15">aos dados da </text:span><text:span text:style-name="T16">tabela</text:span><text:span text:style-name="T17"> </text:span><text:span text:style-name="T18">tnfs_saida_hist </text:span><text:span text:style-name="T19">pode ser vista ao abrirmos o arquivo </text:span><text:a xlink:type="simple" xlink:href="../NFSsSemOrdem.xls" text:style-name="Internet_20_link" text:visited-style-name="Visited_20_Internet_20_Link"><text:span text:style-name="Internet_20_link"><text:span text:style-name="T20">NFSsSemOrdem.</text:span></text:span></text:a><text:span text:style-name="Internet_20_link"><text:span text:style-name="T21">ods </text:span></text:span><text:span text:style-name="Internet_20_link"><text:span text:style-name="T22">existente na mesma pasta deste exercício.</text:span></text:span></text:p>
      <text:p text:style-name="P13"/>
      <text:p text:style-name="P19">Executar, então, a consulta abaixo para avaliarmos:</text:p>
      <text:p text:style-name="P13"/>
      <text:p text:style-name="P13">SQL&gt; </text:p>
      <text:p text:style-name="P20">set timing on<text:span text:style-name="T11"/></text:p>
      <text:p text:style-name="P20">set autotrace on<text:span text:style-name="T11"/></text:p>
      <text:p text:style-name="P14"/>
      <text:p text:style-name="P21">select <text:tab/>trunc(dt_emis, 'MM') Emissao, sum(peso_brt) PesoBruto</text:p>
      <text:p text:style-name="P20">from<text:tab/><text:tab/>tnfs_saida_hist<text:span text:style-name="T11"/></text:p>
      <text:p text:style-name="P20">where<text:tab/>dt_emis between '30-NOV-02' and '30-NOV-04' and<text:span text:style-name="T11"/></text:p>
      <text:p text:style-name="P14"><text:tab/><text:tab/><text:tab/>uf = 'RS' and<text:span text:style-name="T11"/></text:p>
      <text:p text:style-name="P14"><text:tab/><text:tab/><text:tab/>sit_nf = 'I' and<text:span text:style-name="T11"/></text:p>
      <text:p text:style-name="P14"><text:tab/><text:tab/><text:tab/>peso_liq &gt; 100000<text:span text:style-name="T11"/></text:p>
      <text:p text:style-name="P20">group by trunc(dt_emis, 'MM')<text:span text:style-name="T12"/></text:p>
      <text:p text:style-name="P21">order by 1;<text:span text:style-name="T12"/></text:p>
      <text:p text:style-name="P13"/>
      <text:p text:style-name="P13">Tempo de execução da consulta: ______________________<text:span text:style-name="T12"/></text:p>
      <text:p text:style-name="P13">Índice usado: _______________________________________<text:span text:style-name="T12"/></text:p>
      <text:p text:style-name="P13"/>
      <text:p text:style-name="P13"><text:soft-page-break/>Aparentemente, se criarmos um índice com exatamente os campos usados como filtro, poderíamos ter agilidade no retorno da informação. Este é o teste que vamos fazer:<text:span text:style-name="T12"/></text:p>
      <text:p text:style-name="P13"/>
      <text:p text:style-name="P14">SQL&gt; <text:span text:style-name="T11"/></text:p>
      <text:p text:style-name="P20">create index tnfs_saida_hist_ix1<text:span text:style-name="T11"/></text:p>
      <text:p text:style-name="P20">on tnfs_saida_hist (dt_emis, uf, sit_nf, peso_liq);</text:p>
      <text:p text:style-name="P14"/>
      <text:p text:style-name="P17"/>
      <text:p text:style-name="P22"><text:span text:style-name="T23">Vamos analisar o arquivo </text:span><text:span text:style-name="T24">N</text:span><text:span text:style-name="Internet_20_link"><text:span text:style-name="T25">FSsIx1.</text:span></text:span><text:span text:style-name="Internet_20_link"><text:span text:style-name="T24">od</text:span></text:span><text:span text:style-name="Internet_20_link"><text:span text:style-name="T26">s</text:span></text:span><text:span text:style-name="Internet_20_link"><text:span text:style-name="T25"> </text:span></text:span><text:span text:style-name="Internet_20_link"><text:span text:style-name="T22">existente na mesma pasta deste exercício </text:span></text:span><text:span text:style-name="Internet_20_link"><text:span text:style-name="T27">para entender o que acabamos de fazer com os dados.</text:span></text:span></text:p>
      <text:p text:style-name="P13"/>
      <text:p text:style-name="P13"/>
      <text:p text:style-name="P13">Após, executamos a consulta novamente para avaliar:<text:span text:style-name="T12"/></text:p>
      <text:p text:style-name="P13"/>
      <text:p text:style-name="P13">SQL&gt; <text:span text:style-name="T12"/></text:p>
      <text:p text:style-name="P21">select <text:tab/>trunc(dt_emis, 'MM') Emissao, sum(peso_brt) PesoBruto</text:p>
      <text:p text:style-name="P20">from<text:tab/><text:tab/>tnfs_saida_hist<text:span text:style-name="T11"/></text:p>
      <text:p text:style-name="P20">where<text:tab/>dt_emis between '30-NOV-02'and '30-NOV-04' and<text:span text:style-name="T11"/></text:p>
      <text:p text:style-name="P14"><text:tab/><text:tab/><text:tab/>uf = 'RS' and<text:span text:style-name="T11"/></text:p>
      <text:p text:style-name="P14"><text:tab/><text:tab/><text:tab/>sit_nf = 'I' and<text:span text:style-name="T11"/></text:p>
      <text:p text:style-name="P14"><text:tab/><text:tab/><text:tab/>peso_liq &gt; 100000<text:span text:style-name="T11"/></text:p>
      <text:p text:style-name="P20">group by trunc(dt_emis, 'MM')<text:span text:style-name="T12"/></text:p>
      <text:p text:style-name="P21">order by 1;<text:span text:style-name="T12"/></text:p>
      <text:p text:style-name="P13"/>
      <text:p text:style-name="P13">Tempo de execução da consulta: ______________________<text:span text:style-name="T12"/></text:p>
      <text:p text:style-name="P13">Índice usado: _______________________________________<text:span text:style-name="T12"/></text:p>
      <text:p text:style-name="P13"/>
      <text:p text:style-name="P13"/>
      <text:p text:style-name="P13"/>
      <text:p text:style-name="P13">É esperada uma redução de 75% no tempo de execução. Mas não basta apenas observar a cláusula WHERE como critério para a criação de índices. Vamos observar a seletividade dos campos em questão, bem como o número de linhas retornadas por cada filtro:<text:span text:style-name="T18"/></text:p>
      <text:p text:style-name="P17"/>
      <text:p text:style-name="P17">Campo DT_EMIS:<text:span text:style-name="T11"/></text:p>
      <text:p text:style-name="P14">SQL&gt; <text:span text:style-name="T11"/></text:p>
      <text:p text:style-name="P20">set timing off<text:span text:style-name="T11"/></text:p>
      <text:p text:style-name="P20">set autotrace off<text:span text:style-name="T11"/></text:p>
      <text:p text:style-name="P14"/>
      <text:p text:style-name="P20">select dt_emis, count(*) <text:span text:style-name="T11"/></text:p>
      <text:p text:style-name="P20">from tnfs_saida_hist <text:span text:style-name="T11"/></text:p>
      <text:p text:style-name="P20">group by dt_emis order by 2;<text:span text:style-name="T11"/></text:p>
      <text:p text:style-name="P20"/>
      <text:p text:style-name="P21">Total de linhas na tabela: 4.204.223</text:p>
      <text:p text:style-name="P21">Linhas retornadas: ______________<text:span text:style-name="T12"/></text:p>
      <text:p text:style-name="P21"/>
      <text:p text:style-name="P20"/>
      <text:p text:style-name="P20">select count(*) <text:span text:style-name="T11"/></text:p>
      <text:p text:style-name="P20"><text:soft-page-break/>from tnfs_saida_hist<text:span text:style-name="T11"/></text:p>
      <text:p text:style-name="P23">where dt_emis between '30-NOV-02' and '30-NOV-04';<text:span text:style-name="T11"/></text:p>
      <text:p text:style-name="P20"/>
      <text:p text:style-name="P21">Linhas que atendem ao filtro: __________</text:p>
      <text:p text:style-name="P24"/>
      <text:p text:style-name="P24"/>
      <text:p text:style-name="P24">Campo UF: <text:span text:style-name="T11"/></text:p>
      <text:p text:style-name="P14">SQL&gt; <text:span text:style-name="T11"/></text:p>
      <text:p text:style-name="P20">set timing off<text:span text:style-name="T11"/></text:p>
      <text:p text:style-name="P20">set autotrace off<text:span text:style-name="T11"/></text:p>
      <text:p text:style-name="P14"/>
      <text:p text:style-name="P20">select uf, count(*) </text:p>
      <text:p text:style-name="P20">from tnfs_saida_hist <text:span text:style-name="T11"/></text:p>
      <text:p text:style-name="P20">group by uf order by 2;<text:span text:style-name="T11"/></text:p>
      <text:p text:style-name="P20"/>
      <text:p text:style-name="P21">Total de linhas na tabela: 4.204.223</text:p>
      <text:p text:style-name="P21">Linhas retornadas: ______________<text:span text:style-name="T12"/></text:p>
      <text:p text:style-name="P13"/>
      <text:p text:style-name="P20">select count(*) <text:span text:style-name="T11"/></text:p>
      <text:p text:style-name="P20">from tnfs_saida_hist<text:span text:style-name="T11"/></text:p>
      <text:p text:style-name="P20">where uf = 'RS';<text:span text:style-name="T11"/></text:p>
      <text:p text:style-name="P14"/>
      <text:p text:style-name="P21">Linhas que atendem ao filtro: __________</text:p>
      <text:p text:style-name="P13"/>
      <text:p text:style-name="P24"/>
      <text:p text:style-name="P24">Campos SIT_NF:<text:span text:style-name="T11"/></text:p>
      <text:p text:style-name="P14">SQL&gt; <text:span text:style-name="T11"/></text:p>
      <text:p text:style-name="P20">set timing off<text:span text:style-name="T11"/></text:p>
      <text:p text:style-name="P20">set autotrace off<text:span text:style-name="T11"/></text:p>
      <text:p text:style-name="P14"/>
      <text:p text:style-name="P20">select sit_nf, count(*) </text:p>
      <text:p text:style-name="P20">from tnfs_saida_hist <text:span text:style-name="T11"/></text:p>
      <text:p text:style-name="P20">group by sit_nf order by 2;<text:span text:style-name="T11"/></text:p>
      <text:p text:style-name="P14"/>
      <text:p text:style-name="P21">Total de linhas na tabela: 4.204.223</text:p>
      <text:p text:style-name="P21">Linhas retornadas: ______________<text:span text:style-name="T12"/></text:p>
      <text:p text:style-name="P13"/>
      <text:p text:style-name="P20">select count(*) </text:p>
      <text:p text:style-name="P20">from tnfs_saida_hist</text:p>
      <text:p text:style-name="P25"><text:span text:style-name="T12">where </text:span><text:span text:style-name="T11">sit_nf = 'I'</text:span><text:span text:style-name="T12">;</text:span></text:p>
      <text:p text:style-name="P13"/>
      <text:p text:style-name="P21">Linhas que atendem ao filtro: __________</text:p>
      <text:p text:style-name="P13"/>
      <text:p text:style-name="P24"/>
      <text:p text:style-name="P24">Campo PESO_LIQ:<text:span text:style-name="T11"/></text:p>
      <text:p text:style-name="P14">SQL&gt; <text:span text:style-name="T11"/></text:p>
      <text:p text:style-name="P20">set timing off<text:span text:style-name="T11"/></text:p>
      <text:p text:style-name="P20">set autotrace off<text:span text:style-name="T11"/></text:p>
      <text:p text:style-name="P14"/>
      <text:p text:style-name="P25"><text:soft-page-break/><text:span text:style-name="T11">select peso_liq, count(*) </text:span></text:p>
      <text:p text:style-name="P20">from tnfs_saida_hist <text:span text:style-name="T11"/></text:p>
      <text:p text:style-name="P20">group by peso_liq order by 2 desc;<text:span text:style-name="T11"/></text:p>
      <text:p text:style-name="P14"/>
      <text:p text:style-name="P21">Total de linhas na tabela: 4.204.223</text:p>
      <text:p text:style-name="P20">Linhas retornadas: ______________<text:span text:style-name="T11"/></text:p>
      <text:p text:style-name="P14"/>
      <text:p text:style-name="P20">select count(*) <text:span text:style-name="T11"/></text:p>
      <text:p text:style-name="P20">from tnfs_saida_hist<text:span text:style-name="T11"/></text:p>
      <text:p text:style-name="P20">where peso_liq &gt; 100000;<text:span text:style-name="T11"/></text:p>
      <text:p text:style-name="P20"/>
      <text:p text:style-name="P21">Linhas que atendem ao filtro: __________</text:p>
      <text:p text:style-name="P13"/>
      <text:p text:style-name="P13"/>
      <text:p text:style-name="P13"/>
      <text:p text:style-name="P13">Também o fato do índice atual (TNFS_SAIDA_HIST_IX1) ter sido montado sobre os quatro campos da clausula WHERE, faz com que ele tenha um tamanho um pouco maior do que um índice com menos campos:<text:span text:style-name="T12"/></text:p>
      <text:p text:style-name="P13"/>
      <text:p text:style-name="P13"/>
      <text:p text:style-name="P13">SQL&gt;<text:span text:style-name="T12"/></text:p>
      <text:p text:style-name="P13"><text:tab/>select sum(bytes)/1024/1024 Mb</text:p>
      <text:p text:style-name="P13"><text:tab/>from user_segments<text:span text:style-name="T12"/></text:p>
      <text:p text:style-name="P4"><text:span text:style-name="T12"><text:tab/></text:span><text:span text:style-name="T11">where segment_name='TNFS_SAIDA_HIST_IX1';</text:span></text:p>
      <text:p text:style-name="P14"/>
      <text:p text:style-name="P4"><text:span text:style-name="T11"><text:tab/></text:span><text:span text:style-name="T12">Tamanho do índice: _________</text:span></text:p>
      <text:p text:style-name="P13"/>
      <text:p text:style-name="P13"/>
      <text:p text:style-name="P4"><text:span text:style-name="T12">Vamos experimentar criar um índice somente sobre o campo PESO_LIQ, que, além de ser mais seletivo, </text:span><text:span text:style-name="T17">para esta consulta específica </text:span><text:span text:style-name="T12">determina o maior critério de restrição de linhas.</text:span></text:p>
      <text:p text:style-name="P13"/>
      <text:p text:style-name="P13"/>
      <text:p text:style-name="P26">SQL&gt;<text:tab/></text:p>
      <text:p text:style-name="P26"/>
      <text:p text:style-name="P26"><text:s text:c="5"/>-- dropar o índice TNFS_SAIDA_HIST_IX1<text:span text:style-name="T12"/></text:p>
      <text:p text:style-name="P4"><text:span text:style-name="T12"><text:tab/></text:span><text:span text:style-name="T11">DROP INDEX TNFS_SAIDA_HIST_IX1;</text:span></text:p>
      <text:p text:style-name="P14"/>
      <text:p text:style-name="P20">create index tnfs_saida_hist_ix2<text:span text:style-name="T11"/></text:p>
      <text:p text:style-name="P20">on tnfs_saida_hist (peso_liq);</text:p>
      <text:p text:style-name="P27"/>
      <text:p text:style-name="P28"><text:span text:style-name="T23"/></text:p>
      <text:p text:style-name="P28"><text:span text:style-name="T23">Vamos analisar o arquivo </text:span><text:span text:style-name="T24">N</text:span><text:span text:style-name="Internet_20_link"><text:span text:style-name="T25">FSsIx</text:span></text:span><text:span text:style-name="Internet_20_link"><text:span text:style-name="T28">2</text:span></text:span><text:span text:style-name="Internet_20_link"><text:span text:style-name="T25">.</text:span></text:span><text:span text:style-name="Internet_20_link"><text:span text:style-name="T24">od</text:span></text:span><text:span text:style-name="Internet_20_link"><text:span text:style-name="T26">s</text:span></text:span><text:span text:style-name="Internet_20_link"><text:span text:style-name="T25"> </text:span></text:span><text:span text:style-name="Internet_20_link"><text:span text:style-name="T22">existente na mesma pasta deste exercício </text:span></text:span><text:span text:style-name="Internet_20_link"><text:span text:style-name="T27">para entender o que acabamos de fazer com os dados.</text:span></text:span></text:p>
      <text:p text:style-name="P29"/>
      <text:p text:style-name="P29"/>
      <text:p text:style-name="P29"/>
      <text:p text:style-name="P29"/>
      <text:p text:style-name="P4"><text:span text:style-name="T12"><text:tab/></text:span><text:span text:style-name="T11">select sum(bytes)/1024/1024 Mb</text:span></text:p>
      <text:p text:style-name="P14"><text:soft-page-break/><text:tab/>from user_segments<text:span text:style-name="T11"/></text:p>
      <text:p text:style-name="P14"><text:tab/>where segment_name='TNFS_SAIDA_HIST_IX2';<text:span text:style-name="T11"/></text:p>
      <text:p text:style-name="P14"/>
      <text:p text:style-name="P4"><text:span text:style-name="T11"><text:tab/></text:span><text:span text:style-name="T12">Tamanho do índice: _________</text:span></text:p>
      <text:p text:style-name="P13"/>
      <text:p text:style-name="P30">Qual índice ocupa menos espaço, o <text:span text:style-name="T29">IX2</text:span> criado agora ou o <text:span text:style-name="T29">IX1</text:span> criado anteriormente? <text:span text:style-name="T30">Por quê?</text:span></text:p>
      <text:p text:style-name="P31">____________________________________________________________________</text:p>
      <text:p text:style-name="P13"/>
      <text:p text:style-name="P13"/>
      <text:p text:style-name="P13">Refazer, então, os testes com a consulta original:<text:span text:style-name="T12"/></text:p>
      <text:p text:style-name="P13"/>
      <text:p text:style-name="P14">SQL&gt; <text:span text:style-name="T11"/></text:p>
      <text:p text:style-name="P20">set timing on<text:span text:style-name="T11"/></text:p>
      <text:p text:style-name="P20">set autotrace on<text:span text:style-name="T11"/></text:p>
      <text:p text:style-name="P14"/>
      <text:p text:style-name="P20">select <text:tab/>trunc(dt_emis, 'MM') Emissao, sum(peso_brt) PesoBruto</text:p>
      <text:p text:style-name="P20">from<text:tab/><text:tab/>tnfs_saida_hist<text:span text:style-name="T11"/></text:p>
      <text:p text:style-name="P20">where<text:tab/>dt_emis between '30-NOV-02'and '30-NOV-04' and<text:span text:style-name="T11"/></text:p>
      <text:p text:style-name="P14"><text:tab/><text:tab/><text:tab/>uf = 'RS' and<text:span text:style-name="T11"/></text:p>
      <text:p text:style-name="P14"><text:tab/><text:tab/><text:tab/>sit_nf = 'I' and<text:span text:style-name="T11"/></text:p>
      <text:p text:style-name="P14"><text:tab/><text:tab/><text:tab/>peso_liq &gt; 100000<text:span text:style-name="T11"/></text:p>
      <text:p text:style-name="P20">group by trunc(dt_emis, 'MM')<text:span text:style-name="T12"/></text:p>
      <text:p text:style-name="P21">order by 1;<text:span text:style-name="T12"/></text:p>
      <text:p text:style-name="P13"/>
      <text:p text:style-name="P13">Tempo de execução da consulta: ______________________<text:span text:style-name="T12"/></text:p>
      <text:p text:style-name="P13">Índice usado: _______________________________________<text:span text:style-name="T31"/></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ituação 2</text:p>
      <text:p text:style-name="P32"/>
      <text:p text:style-name="P13">Obter a soma do valor total, mostrando a UF e a CIDADE, de notas fiscais canceladas emitidas em Mar/2004, cuja soma do valor total ultrapasse R$ 1.000.000 por cidade para aquele mês. </text:p>
      <text:p text:style-name="P13"/>
      <text:p text:style-name="P13">SQL&gt; <text:span text:style-name="T12"/></text:p>
      <text:p text:style-name="P21">conn pos/pos<text:span text:style-name="T12"/></text:p>
      <text:p text:style-name="P13"/>
      <text:p text:style-name="P13"/>
      <text:p text:style-name="P13">Dropamos os índices na sessão apenas para garantir que nenhum índice esteja criado.<text:span text:style-name="T12"/></text:p>
      <text:p text:style-name="P13"/>
      <text:p text:style-name="P14">SQL&gt;<text:span text:style-name="T14"/></text:p>
      <text:p text:style-name="P25"><text:span text:style-name="T14"><text:s/></text:span><text:span text:style-name="T11">drop index tnfs_saida_hist_ix1;</text:span></text:p>
      <text:p text:style-name="P25"><text:span text:style-name="T14"><text:s/></text:span><text:span text:style-name="T11">drop index tnfs_saida_hist_ix2;</text:span></text:p>
      <text:p text:style-name="P25"><text:span text:style-name="T14"><text:s/></text:span><text:span text:style-name="T11">drop index tnfs_saida_hist_ix3;</text:span></text:p>
      <text:p text:style-name="P25"><text:span text:style-name="T14"><text:s/></text:span><text:span text:style-name="T11">drop index tnfs_saida_hist_ix4;</text:span></text:p>
      <text:p text:style-name="P14"/>
      <text:p text:style-name="P14"/>
      <text:p text:style-name="P13">Vamos considerar a existência do índice tnfs_saida_hist_ix3 , montado sobre os campos VLR_TOTAL, SIT_NF, e DT_EMIS.</text:p>
      <text:p text:style-name="P13"/>
      <text:p text:style-name="P14">SQL&gt;<text:span text:style-name="T11"/></text:p>
      <text:p text:style-name="P20">create index tnfs_saida_hist_ix3<text:span text:style-name="T11"/></text:p>
      <text:p text:style-name="P20">on tnfs_saida_hist (vlr_total, sit_nf, dt_emis);</text:p>
      <text:p text:style-name="P14"/>
      <text:p text:style-name="P14"/>
      <text:p text:style-name="P33"><text:span text:style-name="T23">Vamos analisar o arquivo </text:span><text:span text:style-name="T24">N</text:span><text:span text:style-name="Internet_20_link"><text:span text:style-name="T25">FSsIx</text:span></text:span><text:span text:style-name="Internet_20_link"><text:span text:style-name="T32">3</text:span></text:span><text:span text:style-name="Internet_20_link"><text:span text:style-name="T25">.</text:span></text:span><text:span text:style-name="Internet_20_link"><text:span text:style-name="T24">od</text:span></text:span><text:span text:style-name="Internet_20_link"><text:span text:style-name="T26">s</text:span></text:span><text:span text:style-name="Internet_20_link"><text:span text:style-name="T25"> </text:span></text:span><text:span text:style-name="Internet_20_link"><text:span text:style-name="T22">existente na mesma pasta deste exercício </text:span></text:span><text:span text:style-name="Internet_20_link"><text:span text:style-name="T27">para entender o que acabamos de fazer com os dados.</text:span></text:span></text:p>
      <text:p text:style-name="P34"><text:span text:style-name="Internet_20_link"><text:span text:style-name="T18"/></text:span></text:p>
      <text:p text:style-name="P20"/>
      <text:p text:style-name="P20">set timing on<text:span text:style-name="T11"/></text:p>
      <text:p text:style-name="P20">set autotrace on<text:span text:style-name="T11"/></text:p>
      <text:p text:style-name="P20"/>
      <text:p text:style-name="P20">col cidade for a30<text:span text:style-name="T11"/></text:p>
      <text:p text:style-name="P20">set lines 1000<text:span text:style-name="T11"/></text:p>
      <text:p text:style-name="P20">set pages 1000<text:span text:style-name="T11"/></text:p>
      <text:p text:style-name="P20"/>
      <text:p text:style-name="P20">select uf, cidade, sum(vlr_total)<text:span text:style-name="T11"/></text:p>
      <text:p text:style-name="P14"><text:tab/>from tnfs_saida_hist<text:span text:style-name="T11"/></text:p>
      <text:p text:style-name="P14"><text:tab/>where dt_emis between '01-MAR-04' and '31-MAR-04' <text:span text:style-name="T14"/></text:p>
      <text:p text:style-name="P35"><text:span text:style-name="T14"><text:s/></text:span><text:span text:style-name="T11">and sit_nf = 'C'</text:span></text:p>
      <text:p text:style-name="P14"><text:tab/>group by uf, cidade<text:span text:style-name="T11"/></text:p>
      <text:p text:style-name="P14"><text:tab/>having sum(vlr_total) &gt; 1000000;<text:span text:style-name="T11"/></text:p>
      <text:p text:style-name="P14"/>
      <text:p text:style-name="P14"/>
      <text:p text:style-name="P13">Tempo de execução da consulta: ______________________</text:p>
      <text:p text:style-name="P13"><text:soft-page-break/>Índice usado: _______________________________________<text:span text:style-name="T12"/></text:p>
      <text:p text:style-name="P13"/>
      <text:p text:style-name="P13">Apesar dos campos DT_EMIS e SIT_NF fazerem parte do índice, ele não é usado pois o campo que o precede na ordem do índice não foi usado como filtro (VLR_TOTAL). Podemos influenciar a execução da consulta forçando um filtro desde que não afete-a semanticamente:<text:span text:style-name="T12"/></text:p>
      <text:p text:style-name="P13"/>
      <text:p text:style-name="P14">SQL&gt; <text:span text:style-name="T11"/></text:p>
      <text:p text:style-name="P20">set timing on<text:span text:style-name="T11"/></text:p>
      <text:p text:style-name="P20">set autotrace on<text:span text:style-name="T11"/></text:p>
      <text:p text:style-name="P20"/>
      <text:p text:style-name="P21">select uf, cidade, sum(vlr_total)</text:p>
      <text:p text:style-name="P4"><text:span text:style-name="T12"><text:tab/></text:span><text:span text:style-name="T11">from tnfs_saida_hist</text:span></text:p>
      <text:p text:style-name="P14"><text:tab/>where dt_emis between '01-MAR-04' and '31-MAR-04' <text:span text:style-name="T14"/></text:p>
      <text:p text:style-name="P35"><text:span text:style-name="T14"><text:s/></text:span><text:span text:style-name="T11">and sit_nf = 'C'</text:span></text:p>
      <text:p text:style-name="P17"><text:tab/><text:tab/> and vlr_total &gt; 0<text:span text:style-name="T11"/></text:p>
      <text:p text:style-name="P14"><text:tab/>group by uf, cidade<text:span text:style-name="T11"/></text:p>
      <text:p text:style-name="P14"><text:tab/>having sum(vlr_total) &gt; 1000000;<text:span text:style-name="T11"/></text:p>
      <text:p text:style-name="P14"/>
      <text:p text:style-name="P13">Tempo de execução da consulta: ______________________</text:p>
      <text:p text:style-name="P13">Índice usado: _______________________________________<text:span text:style-name="T11"/></text:p>
      <text:p text:style-name="P1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ituação 3</text:p>
      <text:p text:style-name="P12"/>
      <text:p text:style-name="P13">Obter a soma do valor total, a soma do peso líquido e a soma do peso bruto de todas as notas fiscais emitidas no primeiro decêndio de 2004 agrupadas por mês. </text:p>
      <text:p text:style-name="P13"/>
      <text:p text:style-name="P13">SQL&gt; <text:span text:style-name="T12"/></text:p>
      <text:p text:style-name="P21"/>
      <text:p text:style-name="P21">conn pos/pos<text:span text:style-name="T12"/></text:p>
      <text:p text:style-name="P13"/>
      <text:p text:style-name="P13"/>
      <text:p text:style-name="P13">Dropamos os índices na sessão apenas para garantir que nenhum índice esteja criado.<text:span text:style-name="T12"/></text:p>
      <text:p text:style-name="P13"/>
      <text:p text:style-name="P14"/>
      <text:p text:style-name="P14">SQL&gt;<text:span text:style-name="T14"/></text:p>
      <text:p text:style-name="P25"><text:span text:style-name="T14"><text:s/></text:span><text:span text:style-name="T11">drop index tnfs_saida_hist_ix1;</text:span></text:p>
      <text:p text:style-name="P25"><text:span text:style-name="T14"><text:s/></text:span><text:span text:style-name="T11">drop index tnfs_saida_hist_ix2;</text:span></text:p>
      <text:p text:style-name="P25"><text:span text:style-name="T14"><text:s/></text:span><text:span text:style-name="T11">drop index tnfs_saida_hist_ix3;</text:span></text:p>
      <text:p text:style-name="P25"><text:span text:style-name="T14"><text:s/></text:span><text:span text:style-name="T11">drop index tnfs_saida_hist_ix4;</text:span></text:p>
      <text:p text:style-name="P14"/>
      <text:p text:style-name="P14"/>
      <text:p text:style-name="P13">Vamos considerar a existência do índice tnfs_saida_hist_ix4 , montado sobre os campos DT_EMIS, VLR_TOTAL e PESO_LIQ.</text:p>
      <text:p text:style-name="P13"/>
      <text:p text:style-name="P14">SQL&gt;<text:span text:style-name="T11"/></text:p>
      <text:p text:style-name="P20"/>
      <text:p text:style-name="P20">create index tnfs_saida_hist_ix4<text:span text:style-name="T11"/></text:p>
      <text:p text:style-name="P20">on tnfs_saida_hist (dt_emis, vlr_total, peso_liq);</text:p>
      <text:p text:style-name="P17"/>
      <text:p text:style-name="P27"/>
      <text:p text:style-name="P36"><text:span text:style-name="T23">Vamos analisar o arquivo </text:span><text:span text:style-name="T24">N</text:span><text:span text:style-name="Internet_20_link"><text:span text:style-name="T25">FSsIx</text:span></text:span><text:span text:style-name="Internet_20_link"><text:span text:style-name="T33">4</text:span></text:span><text:span text:style-name="Internet_20_link"><text:span text:style-name="T25">.</text:span></text:span><text:span text:style-name="Internet_20_link"><text:span text:style-name="T24">od</text:span></text:span><text:span text:style-name="Internet_20_link"><text:span text:style-name="T26">s</text:span></text:span><text:span text:style-name="Internet_20_link"><text:span text:style-name="T25"> </text:span></text:span><text:span text:style-name="Internet_20_link"><text:span text:style-name="T22">existente na mesma pasta deste exercício </text:span></text:span><text:span text:style-name="Internet_20_link"><text:span text:style-name="T27">para entender o que acabamos de fazer com os dados.</text:span></text:span></text:p>
      <text:p text:style-name="P37"><text:span text:style-name="Internet_20_link"><text:span text:style-name="T18"/></text:span></text:p>
      <text:p text:style-name="P20"/>
      <text:p text:style-name="P20">set timing on<text:span text:style-name="T11"/></text:p>
      <text:p text:style-name="P20">set autotrace on<text:span text:style-name="T11"/></text:p>
      <text:p text:style-name="P20"/>
      <text:p text:style-name="P20">select <text:tab/>dt_emis<text:tab/><text:tab/><text:tab/>Mes,<text:span text:style-name="T11"/></text:p>
      <text:p text:style-name="P38">sum(vlr_total)<text:tab/><text:tab/>VlrTotal,<text:span text:style-name="T11"/></text:p>
      <text:p text:style-name="P39">sum(peso_liq)<text:tab/><text:tab/>PesoLiq,<text:span text:style-name="T11"/></text:p>
      <text:p text:style-name="P39">sum(peso_brt)<text:tab/><text:tab/>PesoBrt<text:span text:style-name="T11"/></text:p>
      <text:p text:style-name="P14"><text:tab/>from tnfs_saida_hist<text:span text:style-name="T11"/></text:p>
      <text:p text:style-name="P14"><text:tab/>where dt_emis between '01-JAN-04' and '10-JAN-04'<text:span text:style-name="T11"/></text:p>
      <text:p text:style-name="P20">group by dt_emis<text:span text:style-name="T11"/></text:p>
      <text:p text:style-name="P20">order by 1;<text:span text:style-name="T11"/></text:p>
      <text:p text:style-name="P14"><text:tab/><text:span text:style-name="T12"/></text:p>
      <text:p text:style-name="P13">Tempo de execução da consulta: ______________________<text:span text:style-name="T12"/></text:p>
      <text:p text:style-name="P13"><text:soft-page-break/>Índice usado: _______________________________________<text:span text:style-name="T12"/></text:p>
      <text:p text:style-name="P13"/>
      <text:p text:style-name="P13"/>
      <text:p text:style-name="P13">Questionando a necessidade de apresentar o peso bruto no resultado da consulta, se fosse possível omitir esta informação, teríamos a seguinte consulta:<text:span text:style-name="T12"/></text:p>
      <text:p text:style-name="P13"/>
      <text:p text:style-name="P13"/>
      <text:p text:style-name="P14">SQL&gt; <text:span text:style-name="T11"/></text:p>
      <text:p text:style-name="P20">set timing on<text:span text:style-name="T11"/></text:p>
      <text:p text:style-name="P20">set autotrace on<text:span text:style-name="T11"/></text:p>
      <text:p text:style-name="P20"/>
      <text:p text:style-name="P20">select <text:tab/>dt_emis<text:tab/><text:tab/><text:tab/>Dia,<text:span text:style-name="T11"/></text:p>
      <text:p text:style-name="P38">sum(vlr_total)<text:tab/><text:tab/>VlrTotal,<text:span text:style-name="T11"/></text:p>
      <text:p text:style-name="P39">sum(peso_liq)<text:tab/><text:tab/>PesoLiq<text:span text:style-name="T11"/></text:p>
      <text:p text:style-name="P14"><text:tab/>from tnfs_saida_hist<text:span text:style-name="T11"/></text:p>
      <text:p text:style-name="P14"><text:tab/>where dt_emis between '01-JAN-04' and '10-JAN-04'<text:span text:style-name="T11"/></text:p>
      <text:p text:style-name="P20">group by dt_emis<text:span text:style-name="T11"/></text:p>
      <text:p text:style-name="P20">order by 1;<text:span text:style-name="T11"/></text:p>
      <text:p text:style-name="P14"><text:tab/><text:span text:style-name="T11"/></text:p>
      <text:p text:style-name="P14"/>
      <text:p text:style-name="P14"/>
      <text:p text:style-name="P13">Tempo de execução da consulta: ______________________</text:p>
      <text:p text:style-name="P13">Índice usado: _______________________________________<text:span text:style-name="T12"/></text:p>
      <text:p text:style-name="P13"/>
      <text:p text:style-name="P13"/>
      <text:p text:style-name="P13"/>
      <text:p text:style-name="P13"/>
      <text:h text:style-name="P5" text:outline-level="2" loext:marker-style-name="T4">O otimizador por custo (CBO)<text:span text:style-name="T4"/></text:h>
      <text:p text:style-name="P40"/>
      <text:p text:style-name="P4">O otimizador por custo <text:span text:style-name="T34">passou a ser </text:span>o único otimizador <text:span text:style-name="T34">disponível em versões posteriores à versão 10 do Banco de Dados Oracle. O </text:span>otimizador por regra <text:span text:style-name="T34">foi mantido em algumas </text:span><text:span text:style-name="T35">dessas </text:span><text:span text:style-name="T34">versões </text:span><text:span text:style-name="T35">posteriores </text:span><text:span text:style-name="T34">apenas para fins de compatibilidade. </text:span>Es<text:span text:style-name="T36">t</text:span><text:span text:style-name="T37">e</text:span> otimizador <text:span text:style-name="T36">por custo </text:span>foi introduzido ainda na versão 7 do <text:span text:style-name="T38">B</text:span>anco de dados Oracle, e funciona baseado na estimativa do custo da execução de uma sentença SQL. Isto é feito usando como base as estatísticas sobre os dados armazenadas no dicionário de dados. Para o cálculo do custo, o otimizador considera o seguinte:</text:p>
      <text:p text:style-name="P4"/>
      <text:list text:style-name="WW8Num2">
        <text:list-item>
          <text:p text:style-name="P41">o número de leituras lógicas</text:p>
        </text:list-item>
        <text:list-item>
          <text:p text:style-name="P41">a utilização de CPU</text:p>
        </text:list-item>
        <text:list-item>
          <text:p text:style-name="P41" loext:marker-style-name="T39">o tráfego de rede<text:span text:style-name="T39"/></text:p>
        </text:list-item>
      </text:list>
      <text:p text:style-name="P42"/>
      <text:p text:style-name="P4">O funcionamento do otimizador por custo foi continuamente melhorado com as novas versões do banco de dados. Em algumas versões anteriores, existiam casos em que os cálculos de custo não eram feitos da melhor forma, fazendo com que o otimizador optasse, às vezes, por planos piores que planos escolhidos pelo otimizador por regra.</text:p>
      <text:p text:style-name="P4"/>
      <text:p text:style-name="P4"/>
      <text:h text:style-name="Heading_20_9" text:outline-level="9" loext:marker-style-name="T40"><text:soft-page-break/><text:span text:style-name="T41">Estatísticas e histogramas</text:span></text:h>
      <text:p text:style-name="P43"/>
      <text:p text:style-name="P4">As estatísticas coletadas sobre os dados dizem respeito ao número de linhas das tabelas, número de blocos ocupados fisicamente em disco, número de blocos vazios, média de espaço livre, média de tamanho ocupado fisicamente por cada registro da tabela, etc ... Os histogramas, por sua vez, interessam ao otimizador pois trazem com mais precisão informações sobre a distribuição dos valores nos campos das tabelas. De posse dos histogramas e dos predicados das consultas, o otimizador pode calcular melhor a seletividade, impactando diretamente na performace.</text:p>
      <text:p text:style-name="P4"/>
      <text:p text:style-name="P13"/>
      <text:p text:style-name="P13">Exercício 1:<text:span text:style-name="T12"/></text:p>
      <text:p text:style-name="P13"/>
      <text:p text:style-name="P13">Verificar se existem estatísticas coletadas para alguma das tabelas de nosso esquema:<text:span text:style-name="T12"/></text:p>
      <text:p text:style-name="P13"/>
      <text:p text:style-name="P14">SQL&gt; <text:span text:style-name="T11"/></text:p>
      <text:p text:style-name="P44">conn pos/pos</text:p>
      <text:p text:style-name="P45"/>
      <text:p text:style-name="P45">set autotrace off<text:span text:style-name="T11"/></text:p>
      <text:p text:style-name="P14"/>
      <text:p text:style-name="P14"><text:tab/>select table_name, num_rows <text:span text:style-name="T11"/></text:p>
      <text:p text:style-name="P20">from user_tables;<text:span text:style-name="T11"/></text:p>
      <text:p text:style-name="P14"/>
      <text:p text:style-name="P14"/>
      <text:p text:style-name="P13"/>
      <text:p text:style-name="P13">Exercício 2:<text:span text:style-name="T42"/></text:p>
      <text:p text:style-name="P46"/>
      <text:p text:style-name="P13">Verificar se existem histogramas coletados para alguma das tabelas de nosso esquema:</text:p>
      <text:p text:style-name="P13"/>
      <text:p text:style-name="P4"><text:span text:style-name="T13"><text:s/></text:span><text:span text:style-name="T12"><text:tab/></text:span><text:span text:style-name="T11">set lines 2000</text:span></text:p>
      <text:p text:style-name="P20">set pages 1000<text:span text:style-name="T11"/></text:p>
      <text:p text:style-name="P20">col table_name for a20<text:span text:style-name="T11"/></text:p>
      <text:p text:style-name="P20">col column_name for a20<text:span text:style-name="T11"/></text:p>
      <text:p text:style-name="P20"/>
      <text:p text:style-name="P20">select * from user_histograms<text:span text:style-name="T12"/></text:p>
      <text:p text:style-name="P21">order by 1,2,3;<text:span text:style-name="T12"/></text:p>
      <text:p text:style-name="P13"/>
      <text:p text:style-name="P13"/>
      <text:p text:style-name="P13">Caso existam estatísticas ou histogramas, podemos excluí-los de várias formas. Uma delas é através da execução de um package do banco de dados chamado DBMS_STATS.<text:span text:style-name="T12"/></text:p>
      <text:p text:style-name="P13"/>
      <text:p text:style-name="P13">O comando abaixo exclui todas as estatísticas de todos os objetos do esquema informado entre apóstrofes:<text:span text:style-name="T12"/></text:p>
      <text:p text:style-name="P13"/>
      <text:p text:style-name="P13"/>
      <text:p text:style-name="P13">Exercício 3:<text:span text:style-name="T12"/></text:p>
      <text:p text:style-name="P13"/>
      <text:p text:style-name="P13"><text:soft-page-break/>Excluir estatísticas dos objetos do usuário POS:<text:span text:style-name="T12"/></text:p>
      <text:p text:style-name="P21"/>
      <text:p text:style-name="P20">exec DBMS_STATS.delete_schema_stats('POS')<text:span text:style-name="T11"/></text:p>
      <text:p text:style-name="P14"/>
      <text:p text:style-name="P14"/>
      <text:p text:style-name="P13">Exercício 4:</text:p>
      <text:p text:style-name="P13"/>
      <text:p text:style-name="P13">Vamos coletar estatísticas, agora, para algumas tabelas do esquema. Existem, também, várias formas e parâmetros para se fazer uma coleta de estatísticas. <text:span text:style-name="T12"/></text:p>
      <text:p text:style-name="P13"/>
      <text:p text:style-name="P13">Executar, então, os seguintes comandos:<text:span text:style-name="T12"/></text:p>
      <text:p text:style-name="P13"/>
      <text:p text:style-name="P4"><text:span text:style-name="T43"><text:tab/></text:span><text:span text:style-name="T44">analyze table TNFS_SAIDA compute statistics FOR ALL INDEXED COLUMNS;</text:span></text:p>
      <text:p text:style-name="P47"><text:tab/>analyze table TCLIENTES compute statistics;<text:span text:style-name="T44"/></text:p>
      <text:p text:style-name="P47"/>
      <text:p text:style-name="P13"/>
      <text:p text:style-name="P13"/>
      <text:p text:style-name="P13">Exercício 5:<text:span text:style-name="T42"/></text:p>
      <text:p text:style-name="P46"/>
      <text:p text:style-name="P13">Verificar novamente se existem estatísticas coletadas para alguma das tabelas de nosso esquema:</text:p>
      <text:p text:style-name="P13"/>
      <text:p text:style-name="P14">SQL&gt; <text:span text:style-name="T11"/></text:p>
      <text:p text:style-name="P14"><text:tab/>select table_name, num_rows <text:span text:style-name="T11"/></text:p>
      <text:p text:style-name="P20">from user_tables;<text:span text:style-name="T11"/></text:p>
      <text:p text:style-name="P20"/>
      <text:p text:style-name="P14"/>
      <text:p text:style-name="P13">Exercício 6:</text:p>
      <text:p text:style-name="P46"/>
      <text:p text:style-name="P13">Verificar novamente se existem histogramas coletados para as tabelas de nosso esquema:</text:p>
      <text:p text:style-name="P13"/>
      <text:p text:style-name="P4"><text:span text:style-name="T13"><text:s/></text:span><text:span text:style-name="T12"><text:tab/></text:span><text:span text:style-name="T11">set lines 2000</text:span></text:p>
      <text:p text:style-name="P20">set pages 50<text:span text:style-name="T11"/></text:p>
      <text:p text:style-name="P20">col table_name for a20<text:span text:style-name="T11"/></text:p>
      <text:p text:style-name="P20">col column_name for a20<text:span text:style-name="T11"/></text:p>
      <text:p text:style-name="P20"/>
      <text:p text:style-name="P20">select * from user_histograms<text:span text:style-name="T11"/></text:p>
      <text:p text:style-name="P20">order by 1,2,3;<text:span text:style-name="T11"/></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bsatz-Standardschriftart" style:family="text"/>
    <style:style style:name="WW8Num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1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AE - Faculdade Anglicana de Erechim</dc:title>
    <meta:initial-creator>Berbau</meta:initial-creator>
    <meta:creation-date>2007-05-21T14:21:00</meta:creation-date>
    <dc:date>2026-01-26T14:06:31.909000000</dc:date>
    <meta:editing-cycles>325</meta:editing-cycles>
    <meta:editing-duration>PT23H28M33S</meta:editing-duration>
    <meta:generator>LibreOffice/24.8.4.2$Windows_X86_64 LibreOffice_project/bb3cfa12c7b1bf994ecc5649a80400d06cd71002</meta:generator>
    <meta:document-statistic meta:table-count="0" meta:image-count="0" meta:object-count="0" meta:page-count="12" meta:paragraph-count="275" meta:word-count="2057" meta:character-count="13931" meta:non-whitespace-character-count="12011"/>
  </office:meta>
</office:document-meta>
</file>