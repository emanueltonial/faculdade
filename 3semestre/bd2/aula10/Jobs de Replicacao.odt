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1.249cm" fo:margin-right="0cm"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0pt" style:font-size-asian="10pt" style:font-name-complex="Courier New" style:font-size-complex="10pt"/>
    </style:style>
    <style:style style:name="P6" style:family="paragraph" style:parent-style-name="Standard">
      <style:paragraph-properties fo:margin-right="0cm" fo:text-align="justify" style:justify-single-word="false" fo:text-indent="1.249cm" style:auto-text-indent="false"/>
      <style:text-properties style:font-name="Courier New" fo:font-size="10pt" style:font-size-asian="10pt" style:font-name-complex="Courier New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8" style:family="paragraph" style:parent-style-name="Standard">
      <style:paragraph-properties fo:margin-right="0cm" fo:text-align="justify" style:justify-single-word="false" fo:text-indent="1.249cm" style:auto-text-indent="false"/>
      <style:text-properties style:font-name="Courier New" fo:font-size="10pt" fo:language="en" fo:country="US" style:font-size-asian="10pt" style:font-name-complex="Courier New" style:font-size-complex="10pt"/>
    </style:style>
    <style:style style:name="P9" style:family="paragraph" style:parent-style-name="Standard">
      <style:paragraph-properties fo:margin-left="1.249cm" fo:margin-right="0cm"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3" style:family="text">
      <style:text-properties style:font-name="Courier New" fo:font-size="10pt" fo:language="en" fo:country="US" officeooo:rsid="0006d0d3" style:font-size-asian="10pt" style:font-name-complex="Courier New" style:font-size-complex="10pt"/>
    </style:style>
    <style:style style:name="T4" style:family="text"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6" style:family="text">
      <style:text-properties officeooo:rsid="0007a58e"/>
    </style:style>
    <style:style style:name="T7" style:family="text">
      <style:text-properties officeooo:rsid="00084a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ação de Jobs de Replicação<text:span text:style-name="T1"/></text:p>
      <text:p text:style-name="P2"/>
      <text:p text:style-name="P3">O<text:span text:style-name="T6">s</text:span> jobs servem para automatizar a execução de tarefas dentro do banco de dados. Não são associados somente aos snapshots, mas sim, a qualquer tipo de processo que tenha que ser programado para ser executado, uma vez ou mais, diariamente, semanalmente, <text:span text:style-name="T7">etc., como as procedures por exemplo.</text:span></text:p>
      <text:p text:style-name="P3"/>
      <text:p text:style-name="P3">Para nosso exemplo, queremos programar a atualização dos dados do snapshot de PEDIDO para cada 3 minutos, trazendo somente as alterações efetuadas na tabela PEDIDO original em ‘MATRIZ’.</text:p>
      <text:p text:style-name="P3"/>
      <text:p text:style-name="P5">SQL&gt;</text:p>
      <text:p text:style-name="P6">conn filial1/filial1</text:p>
      <text:p text:style-name="P5"/>
      <text:p text:style-name="P7">SQL&gt; </text:p>
      <text:p text:style-name="P7"/>
      <text:p text:style-name="P9">var x number;</text:p>
      <text:p text:style-name="P8">begin</text:p>
      <text:p text:style-name="P4"><text:span text:style-name="T2">dbms_job.submit(:x,'dbms_snapshot.refresh(''PEDIDO'',''F'');',</text:span><text:span text:style-name="T2"/></text:p>
      <text:p text:style-name="P4"><text:span text:style-name="T4"><text:s text:c="26"/></text:span><text:span text:style-name="T2">SYSDATE + </text:span><text:span text:style-name="T3">1</text:span><text:span text:style-name="T2">/1440,</text:span></text:p>
      <text:p text:style-name="P4"><text:span text:style-name="T4"><text:s text:c="24"/></text:span><text:span text:style-name="T2">' SYSDATE + 3/1440');</text:span></text:p>
      <text:p text:style-name="P8">end;</text:p>
      <text:p text:style-name="P8">/</text:p>
      <text:p text:style-name="P7"/>
      <text:p text:style-name="P7"/>
      <text:p text:style-name="P10">Consultas úteis:<text:span text:style-name="T5"/></text:p>
      <text:p text:style-name="P10"/>
      <text:p text:style-name="P5">-- Mostra todos os JOBS programados do usuário atual</text:p>
      <text:p text:style-name="P7">set lines 80<text:span text:style-name="T2"/></text:p>
      <text:p text:style-name="P7">col job for 999</text:p>
      <text:p text:style-name="P7">col what for a40</text:p>
      <text:p text:style-name="P7">col failures for 9<text:span text:style-name="T2"/></text:p>
      <text:p text:style-name="P7">col interval for a20<text:span text:style-name="T2"/></text:p>
      <text:p text:style-name="P7">select job,</text:p>
      <text:p text:style-name="P3"><text:span text:style-name="T4"><text:s text:c="7"/></text:span><text:span text:style-name="T2">what,</text:span></text:p>
      <text:p text:style-name="P3"><text:span text:style-name="T4"><text:s text:c="7"/></text:span><text:span text:style-name="T2">interval,</text:span></text:p>
      <text:p text:style-name="P3"><text:span text:style-name="T4"><text:s text:c="7"/></text:span><text:span text:style-name="T2">next_date,</text:span></text:p>
      <text:p text:style-name="P3"><text:span text:style-name="T4"><text:s text:c="7"/></text:span><text:span text:style-name="T2">next_sec,</text:span></text:p>
      <text:p text:style-name="P3"><text:span text:style-name="T4"><text:s text:c="7"/></text:span><text:span text:style-name="T2">last_date,</text:span></text:p>
      <text:p text:style-name="P3"><text:span text:style-name="T4"><text:s text:c="7"/></text:span><text:span text:style-name="T2">last_sec,</text:span></text:p>
      <text:p text:style-name="P3"><text:span text:style-name="T4"><text:s text:c="7"/></text:span><text:span text:style-name="T2">failures</text:span></text:p>
      <text:p text:style-name="P7">from user_jobs</text:p>
      <text:p text:style-name="P7">order by what;</text:p>
      <text:p text:style-name="P7"/>
      <text:p text:style-name="P5">-- Remove um job pelo seu número</text:p>
      <text:p text:style-name="P7">exec dbms_job.remove(21);</text:p>
      <text:p text:style-name="P7"/>
      <text:p text:style-name="P5">-- Consulta os jobs sendo executados no momento</text:p>
      <text:p text:style-name="P7">select * from dba_jobs_running;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8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FAE - Faculdade Anglicana de Erechim</dc:title>
    <dc:subject/>
    <meta:keyword/>
    <dc:description/>
    <meta:initial-creator>Berbau</meta:initial-creator>
    <meta:creation-date>2007-05-21T14:21:00</meta:creation-date>
    <dc:date>2024-04-02T09:05:16.170000000</dc:date>
    <meta:editing-cycles>304</meta:editing-cycles>
    <meta:editing-duration>PT17H13M56S</meta:editing-duration>
    <meta:generator>LibreOffice/7.6.4.1$Windows_X86_64 LibreOffice_project/e19e193f88cd6c0525a17fb7a176ed8e6a3e2aa1</meta:generator>
    <meta:document-statistic meta:table-count="0" meta:image-count="0" meta:object-count="0" meta:page-count="1" meta:paragraph-count="34" meta:word-count="163" meta:character-count="1137" meta:non-whitespace-character-count="908"/>
  </office:meta>
</office:document-meta>
</file>