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Normal" style:font-family-generic="roman" style:font-pitch="variable"/>
  </office:font-face-decls>
  <office:automatic-styles>
    <style:style style:name="P1" style:family="paragraph" style:parent-style-name="Standard">
      <style:paragraph-properties fo:text-align="center" style:justify-single-word="false"/>
      <style:text-properties fo:font-size="14pt" fo:font-weight="bold" officeooo:paragraph-rsid="0019d5d9"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14pt" officeooo:paragraph-rsid="0019d5d9" style:font-size-asian="16pt" style:font-size-complex="16pt"/>
    </style:style>
    <style:style style:name="P3" style:family="paragraph" style:parent-style-name="Standard">
      <style:paragraph-properties fo:text-align="center" style:justify-single-word="false"/>
      <style:text-properties fo:font-size="12pt" officeooo:paragraph-rsid="0019d5d9" style:font-size-asian="12pt" style:font-size-complex="12pt"/>
    </style:style>
    <style:style style:name="P4" style:family="paragraph" style:parent-style-name="Standard">
      <style:paragraph-properties fo:text-align="center" style:justify-single-word="false"/>
      <style:text-properties fo:font-size="12pt" fo:font-weight="bold" officeooo:paragraph-rsid="0019d5d9" style:font-size-asian="12pt" style:font-weight-asian="bold" style:font-size-complex="12pt" style:font-weight-complex="bold"/>
    </style:style>
    <style:style style:name="P5" style:family="paragraph" style:parent-style-name="Standard">
      <style:paragraph-properties fo:text-align="center" style:justify-single-word="false"/>
      <style:text-properties fo:font-size="10pt" officeooo:paragraph-rsid="0019d5d9" style:font-size-asian="12pt" style:font-size-complex="12pt"/>
    </style:style>
    <style:style style:name="P6" style:family="paragraph" style:parent-style-name="Standard">
      <style:paragraph-properties fo:text-align="center" style:justify-single-word="false"/>
      <style:text-properties fo:font-size="10pt" officeooo:rsid="0019d5d9" officeooo:paragraph-rsid="0019d5d9" style:font-size-asian="12pt" style:font-size-complex="12pt"/>
    </style:style>
    <style:style style:name="P7" style:family="paragraph" style:parent-style-name="Standard">
      <style:paragraph-properties fo:text-align="justify" style:justify-single-word="false"/>
      <style:text-properties fo:font-size="10pt" officeooo:paragraph-rsid="0019d5d9" style:font-size-asian="12pt" style:font-size-complex="12pt"/>
    </style:style>
    <style:style style:name="P8" style:family="paragraph" style:parent-style-name="Standard">
      <style:text-properties fo:color="#069a2e" loext:opacity="100%" fo:font-size="18pt" officeooo:paragraph-rsid="0042eadb" style:font-size-asian="16pt" style:font-size-complex="16pt"/>
    </style:style>
    <style:style style:name="P9" style:family="paragraph" style:parent-style-name="Standard">
      <style:paragraph-properties fo:text-align="justify" style:justify-single-word="false"/>
      <style:text-properties fo:font-size="10pt" officeooo:rsid="001a0558" officeooo:paragraph-rsid="001a0558" style:font-size-asian="12pt" style:font-size-complex="12pt"/>
    </style:style>
    <style:style style:name="P10" style:family="paragraph" style:parent-style-name="Standard">
      <style:paragraph-properties fo:text-align="justify" style:justify-single-word="false"/>
      <style:text-properties fo:font-size="10pt" officeooo:rsid="0031b20b" officeooo:paragraph-rsid="007460be" style:font-size-asian="12pt" style:font-size-complex="12pt"/>
    </style:style>
    <style:style style:name="P11" style:family="paragraph" style:parent-style-name="Standard">
      <style:paragraph-properties fo:text-align="justify" style:justify-single-word="false"/>
      <style:text-properties fo:font-size="10pt" officeooo:rsid="0031b20b" officeooo:paragraph-rsid="0031b20b" style:font-size-asian="12pt" style:font-size-complex="12pt"/>
    </style:style>
    <style:style style:name="P12" style:family="paragraph" style:parent-style-name="Standard">
      <style:paragraph-properties fo:text-align="justify" style:justify-single-word="false"/>
      <style:text-properties fo:font-size="10pt" officeooo:rsid="0033aaa7" officeooo:paragraph-rsid="0033aaa7" style:font-size-asian="12pt" style:font-size-complex="12pt"/>
    </style:style>
    <style:style style:name="P13" style:family="paragraph" style:parent-style-name="Standard">
      <style:paragraph-properties fo:text-align="justify" style:justify-single-word="false"/>
      <style:text-properties fo:font-size="10pt" officeooo:rsid="0033f64a" officeooo:paragraph-rsid="0033f64a" style:font-size-asian="12pt" style:font-size-complex="12pt"/>
    </style:style>
    <style:style style:name="P14" style:family="paragraph" style:parent-style-name="Standard">
      <style:text-properties fo:font-size="18pt" officeooo:paragraph-rsid="0042eadb" style:font-size-asian="16pt" style:font-size-complex="16pt"/>
    </style:style>
    <style:style style:name="P15" style:family="paragraph" style:parent-style-name="Standard">
      <style:paragraph-properties fo:text-align="justify" style:justify-single-word="false"/>
      <style:text-properties fo:font-size="10pt" officeooo:rsid="0040fec7" officeooo:paragraph-rsid="0040fec7" style:font-size-asian="12pt" style:font-size-complex="12pt"/>
    </style:style>
    <style:style style:name="P16" style:family="paragraph" style:parent-style-name="Standard">
      <style:paragraph-properties fo:text-align="justify" style:justify-single-word="false"/>
      <style:text-properties fo:font-size="10pt" officeooo:rsid="00469fda" officeooo:paragraph-rsid="00469fda" style:font-size-asian="12pt" style:font-size-complex="12pt"/>
    </style:style>
    <style:style style:name="P17" style:family="paragraph" style:parent-style-name="Standard">
      <style:paragraph-properties fo:text-align="justify" style:justify-single-word="false"/>
      <style:text-properties fo:font-size="10pt" officeooo:rsid="004ab574" officeooo:paragraph-rsid="004ab574" style:font-size-asian="12pt" style:font-size-complex="12pt"/>
    </style:style>
    <style:style style:name="P18" style:family="paragraph" style:parent-style-name="Standard">
      <style:paragraph-properties fo:text-align="justify" style:justify-single-word="false"/>
      <style:text-properties fo:font-size="10pt" officeooo:rsid="004ab574" officeooo:paragraph-rsid="004ab574" style:font-size-asian="10pt" style:font-size-complex="10pt"/>
    </style:style>
    <style:style style:name="P19" style:family="paragraph" style:parent-style-name="Standard">
      <style:paragraph-properties fo:text-align="justify" style:justify-single-word="false"/>
      <style:text-properties fo:font-size="10pt" officeooo:rsid="004d145f" officeooo:paragraph-rsid="004d145f" style:font-size-asian="10pt" style:font-size-complex="10pt"/>
    </style:style>
    <style:style style:name="P20" style:family="paragraph" style:parent-style-name="Standard">
      <style:paragraph-properties fo:margin-left="2.501cm" fo:text-indent="0cm" style:auto-text-indent="false"/>
      <style:text-properties style:font-name="Courier New1" fo:font-size="8pt" fo:language="en" fo:country="US" officeooo:paragraph-rsid="004d145f" style:font-size-asian="10pt" style:font-size-complex="10pt"/>
    </style:style>
    <style:style style:name="P21" style:family="paragraph" style:parent-style-name="Standard">
      <style:paragraph-properties fo:margin-left="2.501cm" fo:text-indent="0cm" style:auto-text-indent="false"/>
      <style:text-properties style:font-name="Courier New1" fo:font-size="8pt" officeooo:paragraph-rsid="004d145f" style:font-size-asian="10pt" style:font-size-complex="10pt"/>
    </style:style>
    <style:style style:name="P22" style:family="paragraph" style:parent-style-name="Standard">
      <style:paragraph-properties fo:margin-left="0cm" fo:text-indent="0cm" style:auto-text-indent="false"/>
      <style:text-properties style:font-name="Courier New1" fo:font-size="10pt" fo:language="en" fo:country="US" officeooo:paragraph-rsid="004d145f" style:font-size-asian="10pt" style:font-size-complex="10pt"/>
    </style:style>
    <style:style style:name="P23" style:family="paragraph" style:parent-style-name="Standard">
      <style:paragraph-properties fo:margin-left="0cm" fo:text-indent="0cm" style:auto-text-indent="false"/>
      <style:text-properties fo:font-size="10pt" fo:language="en" fo:country="US" officeooo:rsid="0050b01e" officeooo:paragraph-rsid="0050b01e" style:font-size-asian="10pt" style:font-size-complex="10pt"/>
    </style:style>
    <style:style style:name="P24" style:family="paragraph" style:parent-style-name="Standard">
      <style:paragraph-properties fo:margin-left="0cm" fo:text-indent="0cm" style:auto-text-indent="false"/>
      <style:text-properties fo:font-size="10pt" officeooo:rsid="0050b01e" officeooo:paragraph-rsid="0050b01e" style:font-size-asian="10pt" style:font-size-complex="10pt"/>
    </style:style>
    <style:style style:name="P25" style:family="paragraph" style:parent-style-name="Standard">
      <style:paragraph-properties fo:margin-left="1.251cm" fo:text-indent="0cm" style:auto-text-indent="false"/>
      <style:text-properties style:font-name="Courier New1" fo:font-size="8pt" fo:language="en" fo:country="US" officeooo:paragraph-rsid="0050b01e" style:font-size-asian="10pt" style:font-size-complex="10pt"/>
    </style:style>
    <style:style style:name="P26" style:family="paragraph" style:parent-style-name="Standard">
      <style:paragraph-properties fo:margin-left="1.251cm" fo:text-indent="0cm" style:auto-text-indent="false"/>
      <style:text-properties style:font-name="Courier New1" fo:font-size="8pt" officeooo:paragraph-rsid="0050b01e" style:font-size-asian="10pt" style:font-size-complex="10pt"/>
    </style:style>
    <style:style style:name="P27" style:family="paragraph" style:parent-style-name="Standard">
      <style:text-properties fo:font-size="10pt" fo:font-weight="bold" officeooo:paragraph-rsid="0050b01e" style:font-size-asian="10pt" style:font-weight-asian="bold" style:font-size-complex="10pt"/>
    </style:style>
    <style:style style:name="P28" style:family="paragraph" style:parent-style-name="Standard">
      <style:paragraph-properties fo:text-align="justify" style:justify-single-word="false"/>
      <style:text-properties fo:font-size="10pt" officeooo:rsid="0050b01e" officeooo:paragraph-rsid="0050b01e" style:font-size-asian="10pt" style:font-size-complex="10pt"/>
    </style:style>
    <style:style style:name="P29" style:family="paragraph" style:parent-style-name="Standard">
      <style:paragraph-properties fo:text-align="justify" style:justify-single-word="false"/>
      <style:text-properties fo:font-size="10pt" officeooo:rsid="00552aaf" officeooo:paragraph-rsid="00552aaf" style:font-size-asian="10pt" style:font-size-complex="10pt"/>
    </style:style>
    <style:style style:name="P30" style:family="paragraph" style:parent-style-name="Standard">
      <style:paragraph-properties fo:text-align="justify" style:justify-single-word="false"/>
      <style:text-properties fo:font-size="10pt" officeooo:rsid="00582387" officeooo:paragraph-rsid="00582387" style:font-size-asian="10pt" style:font-size-complex="10pt"/>
    </style:style>
    <style:style style:name="P31" style:family="paragraph" style:parent-style-name="Standard">
      <style:paragraph-properties fo:text-align="justify" style:justify-single-word="false"/>
      <style:text-properties fo:font-size="10pt" style:text-underline-style="none" officeooo:rsid="0044705d" officeooo:paragraph-rsid="00582387" style:font-size-asian="12pt" style:font-size-complex="12pt"/>
    </style:style>
    <style:style style:name="P32" style:family="paragraph" style:parent-style-name="Standard">
      <style:paragraph-properties fo:margin-left="1.251cm" fo:text-indent="0cm" style:auto-text-indent="false"/>
      <style:text-properties style:font-name="Courier New1" fo:font-size="8pt" officeooo:paragraph-rsid="00582387" style:font-size-asian="8pt" style:font-size-complex="8pt"/>
    </style:style>
    <style:style style:name="P33" style:family="paragraph" style:parent-style-name="Standard">
      <style:paragraph-properties fo:margin-left="1.251cm" fo:text-indent="0cm" style:auto-text-indent="false"/>
      <style:text-properties style:font-name="Courier New1" fo:font-size="8pt" fo:language="en" fo:country="US" officeooo:paragraph-rsid="00582387" style:font-size-asian="8pt" style:font-size-complex="8pt"/>
    </style:style>
    <style:style style:name="P34" style:family="paragraph" style:parent-style-name="Standard">
      <style:paragraph-properties fo:margin-left="1.251cm" fo:text-align="justify" style:justify-single-word="false" fo:text-indent="0cm" style:auto-text-indent="false"/>
      <style:text-properties fo:color="#000000" loext:opacity="100%" style:font-name="Courier New1" fo:font-size="8pt" fo:language="en" fo:country="US" fo:font-weight="normal" officeooo:rsid="00582387" officeooo:paragraph-rsid="00582387" style:font-size-asian="8pt" style:font-weight-asian="normal" style:font-size-complex="8pt" style:font-weight-complex="normal"/>
    </style:style>
    <style:style style:name="P35" style:family="paragraph" style:parent-style-name="Standard">
      <style:paragraph-properties fo:margin-left="1.251cm" fo:text-align="justify" style:justify-single-word="false" fo:text-indent="0cm" style:auto-text-indent="false"/>
      <style:text-properties style:font-name="Times New Roman" fo:font-size="8pt" fo:language="en" fo:country="US" officeooo:rsid="00582387" officeooo:paragraph-rsid="00582387" style:font-size-asian="8pt" style:font-size-complex="8pt"/>
    </style:style>
    <style:style style:name="P36" style:family="paragraph" style:parent-style-name="Standard">
      <style:paragraph-properties fo:text-align="justify" style:justify-single-word="false"/>
      <style:text-properties fo:color="#000000" loext:opacity="100%" style:font-name="Times New Roman" fo:font-size="10pt" fo:language="en" fo:country="US" fo:font-weight="normal" officeooo:rsid="00582387" officeooo:paragraph-rsid="00582387" style:font-size-asian="10pt" style:font-weight-asian="normal" style:font-size-complex="10pt" style:font-weight-complex="normal"/>
    </style:style>
    <style:style style:name="P37" style:family="paragraph" style:parent-style-name="Standard">
      <style:paragraph-properties fo:text-align="justify" style:justify-single-word="false"/>
      <style:text-properties style:font-name="Times New Roman1" fo:font-size="10pt" officeooo:rsid="0050b01e" officeooo:paragraph-rsid="0050b01e" style:font-size-asian="10pt" style:font-size-complex="10pt"/>
    </style:style>
    <style:style style:name="P38" style:family="paragraph" style:parent-style-name="Standard">
      <style:paragraph-properties fo:text-align="justify" style:justify-single-word="false"/>
      <style:text-properties fo:font-size="10pt" officeooo:rsid="005a7e96" officeooo:paragraph-rsid="005b585b" style:font-size-asian="10pt" style:font-size-complex="10pt"/>
    </style:style>
    <style:style style:name="P39" style:family="paragraph" style:parent-style-name="Standard">
      <style:paragraph-properties fo:text-align="justify" style:justify-single-word="false"/>
      <style:text-properties fo:font-size="10pt" officeooo:rsid="001a0558" officeooo:paragraph-rsid="001a0558" style:font-size-asian="10pt" style:font-size-complex="10pt"/>
    </style:style>
    <style:style style:name="P40" style:family="paragraph" style:parent-style-name="Standard">
      <style:paragraph-properties fo:text-align="justify" style:justify-single-word="false"/>
      <style:text-properties fo:font-size="10pt" officeooo:rsid="005d3f27" officeooo:paragraph-rsid="005d3f27" style:font-size-asian="10pt" style:font-size-complex="10pt"/>
    </style:style>
    <style:style style:name="P41" style:family="paragraph" style:parent-style-name="Standard">
      <style:paragraph-properties fo:text-align="justify" style:justify-single-word="false"/>
      <style:text-properties fo:font-size="10pt" officeooo:rsid="005f14fc" officeooo:paragraph-rsid="005f14fc" style:font-size-asian="10pt" style:font-size-complex="10pt"/>
    </style:style>
    <style:style style:name="P42" style:family="paragraph" style:parent-style-name="Standard">
      <style:paragraph-properties fo:text-align="justify" style:justify-single-word="false"/>
      <style:text-properties fo:font-size="10pt" officeooo:rsid="00607ad4" officeooo:paragraph-rsid="00607ad4" style:font-size-asian="10pt" style:font-size-complex="10pt"/>
    </style:style>
    <style:style style:name="P43" style:family="paragraph" style:parent-style-name="Standard">
      <style:text-properties fo:color="#069a2e" loext:opacity="100%" fo:font-size="18pt" fo:font-weight="normal" officeooo:rsid="007c46ca" officeooo:paragraph-rsid="0042f795" style:font-size-asian="16pt" style:font-weight-asian="normal" style:font-size-complex="16pt" style:font-weight-complex="normal"/>
    </style:style>
    <style:style style:name="P44" style:family="paragraph" style:parent-style-name="Standard">
      <style:paragraph-properties fo:text-align="justify" style:justify-single-word="false"/>
      <style:text-properties fo:font-size="10pt" officeooo:rsid="00625075" officeooo:paragraph-rsid="00625075" style:font-size-asian="12pt" style:font-size-complex="12pt"/>
    </style:style>
    <style:style style:name="P45" style:family="paragraph" style:parent-style-name="Standard">
      <style:paragraph-properties fo:text-align="justify" style:justify-single-word="false"/>
      <style:text-properties fo:font-size="10pt" officeooo:rsid="006bca59" officeooo:paragraph-rsid="006bca59" style:font-size-asian="12pt" style:font-size-complex="12pt"/>
    </style:style>
    <style:style style:name="P46" style:family="paragraph" style:parent-style-name="Standard">
      <style:paragraph-properties fo:text-align="justify" style:justify-single-word="false"/>
      <style:text-properties fo:font-size="10pt" officeooo:rsid="001a0558" officeooo:paragraph-rsid="006e34ef" style:font-size-asian="12pt" style:font-size-complex="12pt"/>
    </style:style>
    <style:style style:name="P47" style:family="paragraph" style:parent-style-name="Standard">
      <style:paragraph-properties fo:text-align="justify" style:justify-single-word="false"/>
      <style:text-properties fo:font-size="10pt" officeooo:rsid="006fe2a3" officeooo:paragraph-rsid="006fe2a3" style:font-size-asian="12pt" style:font-size-complex="12pt"/>
    </style:style>
    <style:style style:name="P48" style:family="paragraph" style:parent-style-name="Standard">
      <style:paragraph-properties fo:text-align="justify" style:justify-single-word="false"/>
      <style:text-properties fo:font-size="10pt" officeooo:rsid="001a5c80" officeooo:paragraph-rsid="006fe2a3" style:font-size-asian="12pt" style:font-size-complex="12pt"/>
    </style:style>
    <style:style style:name="P49" style:family="paragraph" style:parent-style-name="Standard">
      <style:paragraph-properties fo:text-align="justify" style:justify-single-word="false"/>
      <style:text-properties fo:font-size="10pt" officeooo:rsid="00701689" officeooo:paragraph-rsid="00701689" style:font-size-asian="12pt" style:font-size-complex="12pt"/>
    </style:style>
    <style:style style:name="P50" style:family="paragraph" style:parent-style-name="Standard">
      <style:paragraph-properties fo:text-align="justify" style:justify-single-word="false"/>
      <style:text-properties fo:font-size="10pt" officeooo:rsid="001dfb45" officeooo:paragraph-rsid="00701689" style:font-size-asian="12pt" style:font-size-complex="12pt"/>
    </style:style>
    <style:style style:name="P51" style:family="paragraph" style:parent-style-name="Standard">
      <style:paragraph-properties fo:text-align="justify" style:justify-single-word="false"/>
      <style:text-properties fo:font-size="10pt" officeooo:rsid="00706b00" officeooo:paragraph-rsid="00706b00" style:font-size-asian="12pt" style:font-size-complex="12pt"/>
    </style:style>
    <style:style style:name="P52" style:family="paragraph" style:parent-style-name="Standard">
      <style:paragraph-properties fo:text-align="justify" style:justify-single-word="false"/>
      <style:text-properties fo:font-size="10pt" officeooo:rsid="001a0558" officeooo:paragraph-rsid="00706b00" style:font-size-asian="12pt" style:font-size-complex="12pt"/>
    </style:style>
    <style:style style:name="P53" style:family="paragraph" style:parent-style-name="Standard">
      <style:paragraph-properties fo:text-align="justify" style:justify-single-word="false"/>
      <style:text-properties fo:font-size="10pt" officeooo:rsid="00707657" officeooo:paragraph-rsid="00707657" style:font-size-asian="12pt" style:font-size-complex="12pt"/>
    </style:style>
    <style:style style:name="P54" style:family="paragraph" style:parent-style-name="Standard">
      <style:paragraph-properties fo:text-align="justify" style:justify-single-word="false"/>
      <style:text-properties fo:font-size="10pt" officeooo:rsid="0073fee8" officeooo:paragraph-rsid="0073fee8" style:font-size-asian="12pt" style:font-size-complex="12pt"/>
    </style:style>
    <style:style style:name="P55" style:family="paragraph" style:parent-style-name="Standard">
      <style:paragraph-properties fo:text-align="justify" style:justify-single-word="false"/>
      <style:text-properties fo:font-size="10pt" officeooo:rsid="001a0558" officeooo:paragraph-rsid="0073fee8" style:font-size-asian="12pt" style:font-size-complex="12pt"/>
    </style:style>
    <style:style style:name="P56" style:family="paragraph" style:parent-style-name="Standard">
      <style:paragraph-properties fo:text-align="justify" style:justify-single-word="false"/>
      <style:text-properties fo:font-size="10pt" officeooo:rsid="00267930" officeooo:paragraph-rsid="007460be" style:font-size-asian="12pt" style:font-size-complex="12pt"/>
    </style:style>
    <style:style style:name="P57" style:family="paragraph" style:parent-style-name="Standard">
      <style:paragraph-properties fo:text-align="justify" style:justify-single-word="false"/>
      <style:text-properties fo:font-size="10pt" officeooo:rsid="002a0d76" officeooo:paragraph-rsid="007460be" style:font-size-asian="12pt" style:font-size-complex="12pt"/>
    </style:style>
    <style:style style:name="P58" style:family="paragraph" style:parent-style-name="Standard">
      <style:paragraph-properties fo:text-align="justify" style:justify-single-word="false"/>
      <style:text-properties fo:font-size="10pt" officeooo:rsid="002d251c" officeooo:paragraph-rsid="007460be" style:font-size-asian="12pt" style:font-size-complex="12pt"/>
    </style:style>
    <style:style style:name="P59" style:family="paragraph" style:parent-style-name="Standard">
      <style:paragraph-properties fo:text-align="justify" style:justify-single-word="false"/>
      <style:text-properties fo:font-size="20pt" officeooo:rsid="001a24f8" officeooo:paragraph-rsid="001a24f8" style:font-size-asian="12pt" style:font-size-complex="12pt"/>
    </style:style>
    <style:style style:name="P60" style:family="paragraph" style:parent-style-name="Standard">
      <style:paragraph-properties fo:text-align="justify" style:justify-single-word="false"/>
      <style:text-properties fo:font-size="10pt" officeooo:rsid="001a24f8" officeooo:paragraph-rsid="001a24f8" style:font-size-asian="12pt" style:font-size-complex="12pt"/>
    </style:style>
    <style:style style:name="P61" style:family="paragraph" style:parent-style-name="Standard">
      <style:paragraph-properties fo:text-align="justify" style:justify-single-word="false"/>
      <style:text-properties fo:font-size="10pt" style:text-underline-style="none" officeooo:rsid="002eec7c" officeooo:paragraph-rsid="0034e05c" style:font-size-asian="12pt" style:font-size-complex="12pt"/>
    </style:style>
    <style:style style:name="P62" style:family="paragraph" style:parent-style-name="Standard">
      <style:paragraph-properties fo:text-align="justify" style:justify-single-word="false"/>
      <style:text-properties fo:color="#bf0041" loext:opacity="100%" fo:font-size="10pt" style:text-underline-style="none" fo:font-weight="bold" officeooo:rsid="00486f10" officeooo:paragraph-rsid="00706b00" style:font-size-asian="12pt" style:font-weight-asian="bold" style:font-size-complex="12pt" style:font-weight-complex="bold"/>
    </style:style>
    <style:style style:name="P63" style:family="paragraph" style:parent-style-name="Standard">
      <style:paragraph-properties fo:text-align="justify" style:justify-single-word="false"/>
      <style:text-properties fo:font-size="10pt" style:text-underline-style="none" officeooo:rsid="0044705d" officeooo:paragraph-rsid="00706b00" style:font-size-asian="12pt" style:font-size-complex="12pt"/>
    </style:style>
    <style:style style:name="P64" style:family="paragraph" style:parent-style-name="Standard">
      <style:paragraph-properties fo:text-align="justify" style:justify-single-word="false"/>
      <style:text-properties fo:font-size="10pt" style:text-underline-style="none" officeooo:rsid="0044705d" officeooo:paragraph-rsid="0044705d" style:font-size-asian="12pt" style:font-size-complex="12pt"/>
    </style:style>
    <style:style style:name="P65" style:family="paragraph" style:parent-style-name="Standard">
      <style:paragraph-properties fo:text-align="justify" style:justify-single-word="false"/>
      <style:text-properties fo:font-size="10pt" style:text-underline-style="none" officeooo:rsid="0044705d" officeooo:paragraph-rsid="00486f10" style:font-size-asian="12pt" style:font-size-complex="12pt"/>
    </style:style>
    <style:style style:name="P66" style:family="paragraph" style:parent-style-name="Standard">
      <style:paragraph-properties fo:text-align="justify" style:justify-single-word="false"/>
      <style:text-properties fo:font-size="10pt" style:text-underline-style="none" officeooo:rsid="0044705d" officeooo:paragraph-rsid="004bc0d1" style:font-size-asian="12pt" style:font-size-complex="12pt"/>
    </style:style>
    <style:style style:name="P67" style:family="paragraph" style:parent-style-name="Standard">
      <style:paragraph-properties fo:text-align="justify" style:justify-single-word="false"/>
      <style:text-properties fo:font-size="10pt" officeooo:paragraph-rsid="004bc0d1"/>
    </style:style>
    <style:style style:name="P68" style:family="paragraph" style:parent-style-name="Standard">
      <style:paragraph-properties fo:text-align="start" style:justify-single-word="false"/>
      <style:text-properties fo:color="#bf0041" loext:opacity="100%" fo:font-size="10pt" style:text-underline-style="none" fo:font-weight="bold" officeooo:rsid="00486f10" officeooo:paragraph-rsid="006bca59" style:font-size-asian="12pt" style:font-weight-asian="bold" style:font-size-complex="12pt" style:font-weight-complex="bold"/>
    </style:style>
    <style:style style:name="P69" style:family="paragraph" style:parent-style-name="Standard">
      <style:paragraph-properties fo:text-align="justify" style:justify-single-word="false"/>
      <style:text-properties fo:color="#bf0041" loext:opacity="100%" fo:font-size="10pt" style:text-underline-style="none" fo:font-weight="bold" officeooo:rsid="00486f10" officeooo:paragraph-rsid="006e34ef" style:font-size-asian="12pt" style:font-weight-asian="bold" style:font-size-complex="12pt" style:font-weight-complex="bold"/>
    </style:style>
    <style:style style:name="P70" style:family="paragraph" style:parent-style-name="Standard">
      <style:paragraph-properties fo:text-align="justify" style:justify-single-word="false"/>
      <style:text-properties fo:color="#000000" loext:opacity="100%" fo:font-size="10pt" style:text-underline-style="none" fo:font-weight="normal" officeooo:rsid="001a24f8" officeooo:paragraph-rsid="006e34ef" style:font-size-asian="12pt" style:font-weight-asian="normal" style:font-size-complex="12pt" style:font-weight-complex="normal"/>
    </style:style>
    <style:style style:name="P71" style:family="paragraph" style:parent-style-name="Standard">
      <style:paragraph-properties fo:text-align="justify" style:justify-single-word="false"/>
      <style:text-properties fo:font-size="10pt" style:text-underline-style="none" officeooo:rsid="00486f10" officeooo:paragraph-rsid="006fe2a3" style:font-size-asian="12pt" style:font-size-complex="12pt"/>
    </style:style>
    <style:style style:name="P72" style:family="paragraph" style:parent-style-name="Standard">
      <style:paragraph-properties fo:text-align="justify" style:justify-single-word="false"/>
      <style:text-properties fo:color="#bf0041" loext:opacity="100%" fo:font-size="10pt" style:text-underline-style="none" fo:font-weight="bold" officeooo:rsid="00486f10" officeooo:paragraph-rsid="00701689" style:font-size-asian="12pt" style:font-weight-asian="bold" style:font-size-complex="12pt" style:font-weight-complex="bold"/>
    </style:style>
    <style:style style:name="P73" style:family="paragraph" style:parent-style-name="Standard">
      <style:paragraph-properties fo:text-align="justify" style:justify-single-word="false"/>
      <style:text-properties fo:font-size="10pt" style:text-underline-style="none" officeooo:rsid="0044705d" officeooo:paragraph-rsid="00701689" style:font-size-asian="12pt" style:font-size-complex="12pt"/>
    </style:style>
    <style:style style:name="P74" style:family="paragraph" style:parent-style-name="Standard">
      <style:paragraph-properties fo:text-align="justify" style:justify-single-word="false"/>
      <style:text-properties fo:color="#000000" loext:opacity="100%" fo:font-size="10pt" style:text-underline-style="none" fo:font-weight="normal" officeooo:rsid="0020a0ef" officeooo:paragraph-rsid="00706b00" style:font-size-asian="12pt" style:font-weight-asian="normal" style:font-size-complex="12pt" style:font-weight-complex="normal"/>
    </style:style>
    <style:style style:name="P75" style:family="paragraph" style:parent-style-name="Standard">
      <style:paragraph-properties fo:text-align="justify" style:justify-single-word="false"/>
      <style:text-properties fo:font-size="10pt" officeooo:rsid="00486f10" officeooo:paragraph-rsid="00706b00" style:font-size-asian="12pt" style:font-size-complex="12pt"/>
    </style:style>
    <style:style style:name="P76" style:family="paragraph" style:parent-style-name="Standard">
      <style:paragraph-properties fo:text-align="justify" style:justify-single-word="false"/>
      <style:text-properties fo:font-size="10pt" officeooo:rsid="00237b4d" officeooo:paragraph-rsid="00707657" style:font-size-asian="12pt" style:font-size-complex="12pt"/>
    </style:style>
    <style:style style:name="P77" style:family="paragraph" style:parent-style-name="Standard">
      <style:paragraph-properties fo:text-align="justify" style:justify-single-word="false"/>
      <style:text-properties fo:font-size="10pt" officeooo:rsid="00486f10" officeooo:paragraph-rsid="00707657" style:font-size-asian="12pt" style:font-size-complex="12pt"/>
    </style:style>
    <style:style style:name="P78" style:family="paragraph" style:parent-style-name="Standard">
      <style:paragraph-properties fo:text-align="justify" style:justify-single-word="false"/>
      <style:text-properties fo:font-size="10pt" officeooo:rsid="002578c9" officeooo:paragraph-rsid="0073fee8" style:font-size-asian="12pt" style:font-size-complex="12pt"/>
    </style:style>
    <style:style style:name="P79" style:family="paragraph" style:parent-style-name="Standard">
      <style:paragraph-properties fo:text-align="justify" style:justify-single-word="false"/>
      <style:text-properties fo:font-size="10pt" officeooo:rsid="00283778" officeooo:paragraph-rsid="007460be" style:font-size-asian="12pt" style:font-size-complex="12pt"/>
    </style:style>
    <style:style style:name="P80" style:family="paragraph" style:parent-style-name="Standard">
      <style:paragraph-properties fo:text-align="justify" style:justify-single-word="false"/>
      <style:text-properties fo:font-size="10pt" style:text-underline-style="none" officeooo:rsid="002eec7c" officeooo:paragraph-rsid="007460be" style:font-size-asian="12pt" style:font-size-complex="12pt"/>
    </style:style>
    <style:style style:name="P81" style:family="paragraph" style:parent-style-name="Standard">
      <style:paragraph-properties fo:text-align="justify" style:justify-single-word="false"/>
      <style:text-properties fo:color="#bf0041" loext:opacity="100%" fo:font-size="10pt" style:text-underline-style="none" fo:font-weight="bold" officeooo:rsid="00486f10" officeooo:paragraph-rsid="007460be" style:font-size-asian="12pt" style:font-weight-asian="bold" style:font-size-complex="12pt" style:font-weight-complex="bold"/>
    </style:style>
    <style:style style:name="P82" style:family="paragraph" style:parent-style-name="Standard">
      <style:paragraph-properties fo:text-align="justify" style:justify-single-word="false"/>
      <style:text-properties fo:color="#000000" loext:opacity="100%" fo:font-size="10pt" style:text-underline-style="none" fo:font-weight="normal" officeooo:rsid="00486f10" officeooo:paragraph-rsid="00707657" style:font-size-asian="12pt" style:font-weight-asian="normal" style:font-size-complex="12pt" style:font-weight-complex="normal"/>
    </style:style>
    <style:style style:name="T1" style:family="text">
      <style:text-properties officeooo:rsid="0019d5d9"/>
    </style:style>
    <style:style style:name="T2" style:family="text">
      <style:text-properties style:text-underline-style="none"/>
    </style:style>
    <style:style style:name="T3" style:family="text">
      <style:text-properties officeooo:rsid="007832c5"/>
    </style:style>
    <style:style style:name="T4" style:family="text">
      <style:text-properties officeooo:rsid="0025d3f3"/>
    </style:style>
    <style:style style:name="T5" style:family="text">
      <style:text-properties officeooo:rsid="00270ad1"/>
    </style:style>
    <style:style style:name="T6" style:family="text">
      <style:text-properties officeooo:rsid="007c46ca"/>
    </style:style>
    <style:style style:name="T7" style:family="text">
      <style:text-properties officeooo:rsid="005c55f5"/>
    </style:style>
    <style:style style:name="T8" style:family="text">
      <style:text-properties officeooo:rsid="007563e2"/>
    </style:style>
    <style:style style:name="T9" style:family="text">
      <style:text-properties fo:font-weight="bold" style:font-weight-asian="bold" style:font-weight-complex="bold"/>
    </style:style>
    <style:style style:name="T10" style:family="text">
      <style:text-properties fo:color="#069a2e" loext:opacity="100%" fo:font-weight="normal" officeooo:rsid="007c46ca" style:font-weight-asian="normal" style:font-weight-complex="normal"/>
    </style:style>
    <style:style style:name="T11" style:family="text">
      <style:text-properties fo:color="#069a2e" loext:opacity="100%" fo:font-weight="normal" officeooo:rsid="007dcb7c" style:font-weight-asian="normal" style:font-weight-complex="normal"/>
    </style:style>
    <style:style style:name="T12" style:family="text">
      <style:text-properties officeooo:rsid="006114f2"/>
    </style:style>
    <style:style style:name="T13" style:family="text">
      <style:text-properties officeooo:rsid="0042eadb"/>
    </style:style>
    <style:style style:name="T14" style:family="text">
      <style:text-properties officeooo:rsid="00431354"/>
    </style:style>
    <style:style style:name="T15" style:family="text">
      <style:text-properties officeooo:rsid="0047070d"/>
    </style:style>
    <style:style style:name="T16" style:family="text">
      <style:text-properties style:font-size-asian="10pt" style:font-size-complex="10pt"/>
    </style:style>
    <style:style style:name="T17" style:family="text">
      <style:text-properties officeooo:rsid="004b0c05" style:font-size-asian="10pt" style:font-size-complex="10pt"/>
    </style:style>
    <style:style style:name="T18" style:family="text">
      <style:text-properties fo:language="en" fo:country="US"/>
    </style:style>
    <style:style style:name="T19" style:family="text">
      <style:text-properties fo:language="en" fo:country="US" officeooo:rsid="004d145f"/>
    </style:style>
    <style:style style:name="T20" style:family="text">
      <style:text-properties officeooo:rsid="0050b01e"/>
    </style:style>
    <style:style style:name="T21" style:family="text">
      <style:text-properties officeooo:rsid="00556d48"/>
    </style:style>
    <style:style style:name="T22" style:family="text">
      <style:text-properties fo:color="#000000" loext:opacity="100%" style:text-underline-style="none" fo:font-weight="normal" style:font-size-asian="12pt" style:font-weight-asian="normal" style:font-size-complex="12pt" style:font-weight-complex="normal"/>
    </style:style>
    <style:style style:name="T23" style:family="text">
      <style:text-properties fo:color="#000000" loext:opacity="100%" fo:font-weight="normal" officeooo:rsid="00582387" style:font-weight-asian="normal" style:font-weight-complex="normal"/>
    </style:style>
    <style:style style:name="T24" style:family="text">
      <style:text-properties fo:color="#000000" loext:opacity="100%" fo:font-weight="normal" style:font-weight-asian="normal" style:font-weight-complex="normal"/>
    </style:style>
    <style:style style:name="T25" style:family="text">
      <style:text-properties style:font-name="Times New Roman1" officeooo:rsid="006114f2"/>
    </style:style>
    <style:style style:name="T26" style:family="text">
      <style:text-properties style:font-name="Times New Roman1"/>
    </style:style>
    <style:style style:name="T27" style:family="text">
      <style:text-properties style:font-name="Times New Roman1" officeooo:rsid="005b585b"/>
    </style:style>
    <style:style style:name="T28" style:family="text">
      <style:text-properties style:font-name="Courier New" fo:font-size="8pt" officeooo:rsid="005b585b" style:font-size-asian="8pt" style:font-name-complex="Courier New"/>
    </style:style>
    <style:style style:name="T29" style:family="text">
      <style:text-properties style:font-name="Times New Roman1" officeooo:rsid="005b585b" style:font-size-asian="8pt" style:font-name-complex="Courier New"/>
    </style:style>
    <style:style style:name="T30" style:family="text">
      <style:text-properties officeooo:rsid="00607ad4"/>
    </style:style>
    <style:style style:name="T31" style:family="text">
      <style:text-properties officeooo:rsid="0063a719"/>
    </style:style>
    <style:style style:name="T32" style:family="text">
      <style:text-properties officeooo:rsid="006e34ef"/>
    </style:style>
    <style:style style:name="T33" style:family="text">
      <style:text-properties officeooo:rsid="001a5c80"/>
    </style:style>
    <style:style style:name="T34" style:family="text">
      <style:text-properties officeooo:rsid="001dfb45"/>
    </style:style>
    <style:style style:name="T35" style:family="text">
      <style:text-properties officeooo:rsid="0020a0ef"/>
    </style:style>
    <style:style style:name="T36" style:family="text">
      <style:text-properties fo:color="#000000" loext:opacity="100%" style:text-underline-style="none" fo:font-weight="normal" officeooo:rsid="00228437" style:font-weight-asian="normal" style:font-weight-complex="normal"/>
    </style:style>
    <style:style style:name="T37" style:family="text">
      <style:text-properties officeooo:rsid="002578c9"/>
    </style:style>
    <style:style style:name="T38" style:family="text">
      <style:text-properties officeooo:rsid="00763f81"/>
    </style:style>
    <style:style style:name="T39" style:family="text">
      <style:text-properties officeooo:rsid="00283778"/>
    </style:style>
    <style:style style:name="T40" style:family="text">
      <style:text-properties officeooo:rsid="002721e2"/>
    </style:style>
    <style:style style:name="T41" style:family="text">
      <style:text-properties fo:color="#bf0041" loext:opacity="100%"/>
    </style:style>
    <style:style style:name="T42" style:family="text">
      <style:text-properties fo:color="#bf0041" loext:opacity="100%" fo:font-weight="bold" officeooo:rsid="0034e05c" style:font-weight-asian="bold" style:font-weight-complex="bold"/>
    </style:style>
    <style:style style:name="T43" style:family="text">
      <style:text-properties fo:color="#bf0041" loext:opacity="100%" fo:font-weight="bold" style:font-weight-asian="bold" style:font-weight-complex="bold"/>
    </style:style>
    <style:style style:name="T44" style:family="text">
      <style:text-properties fo:color="#bf0041" loext:opacity="100%" fo:font-weight="bold" officeooo:rsid="007563e2" style:font-weight-asian="bold" style:font-weight-complex="bold"/>
    </style:style>
    <style:style style:name="T45" style:family="text">
      <style:text-properties officeooo:rsid="003ce1ad"/>
    </style:style>
    <style:style style:name="T46" style:family="text">
      <style:text-properties officeooo:rsid="003e8557"/>
    </style:style>
    <style:style style:name="T47" style:family="text">
      <style:text-properties officeooo:rsid="003ea1e6"/>
    </style:style>
    <style:style style:name="T48" style:family="text">
      <style:text-properties fo:color="#bf0041" loext:opacity="100%" fo:font-size="10pt" style:text-underline-style="none" fo:font-weight="bold" officeooo:rsid="00486f10" style:font-size-asian="12pt" style:font-weight-asian="bold" style:font-size-complex="12pt" style:font-weight-complex="bold"/>
    </style:style>
    <style:style style:name="T49" style:family="text">
      <style:text-properties fo:color="#bf0041" loext:opacity="100%" fo:font-weight="bold" officeooo:rsid="006114f2" style:font-weight-asian="bold" style:font-weight-complex="bold"/>
    </style:style>
    <style:style style:name="T50" style:family="text">
      <style:text-properties fo:font-weight="normal" officeooo:rsid="0045af5d" style:font-weight-asian="normal" style:font-weight-complex="normal"/>
    </style:style>
    <style:style style:name="T51" style:family="text">
      <style:text-properties fo:font-weight="bold" officeooo:rsid="0045af5d" style:font-weight-asian="bold" style:font-weight-complex="bold"/>
    </style:style>
    <style:style style:name="T52" style:family="text">
      <style:text-properties officeooo:rsid="0045af5d"/>
    </style:style>
    <style:style style:name="T53" style:family="text">
      <style:text-properties fo:color="#000000" loext:opacity="100%" fo:font-weight="normal" officeooo:rsid="00486f10" style:font-weight-asian="normal" style:font-weight-complex="normal"/>
    </style:style>
    <style:style style:name="T54" style:family="text">
      <style:text-properties fo:color="#000000" loext:opacity="100%" fo:font-weight="bold" officeooo:rsid="00486f10" style:font-weight-asian="bold" style:font-weight-complex="bold"/>
    </style:style>
    <style:style style:name="T55" style:family="text">
      <style:text-properties fo:color="#bf0041" loext:opacity="100%" fo:font-weight="bold" officeooo:rsid="00486f10" style:font-weight-asian="bold" style:font-weight-complex="bold"/>
    </style:style>
    <style:style style:name="T56" style:family="text">
      <style:text-properties fo:color="#000000" loext:opacity="100%" fo:font-weight="normal" officeooo:rsid="004bc0d1" style:font-weight-asian="normal" style:font-weight-complex="normal"/>
    </style:style>
    <style:style style:name="T57" style:family="text">
      <style:text-properties fo:color="#000000" loext:opacity="100%" fo:font-weight="normal" officeooo:rsid="004c4d46" style:font-weight-asian="normal" style:font-weight-complex="normal"/>
    </style:style>
    <style:style style:name="T58" style:family="text">
      <style:text-properties fo:color="#000000" loext:opacity="100%" fo:font-weight="normal" officeooo:rsid="004d145f" style:font-weight-asian="normal" style:font-weight-complex="normal"/>
    </style:style>
    <style:style style:name="T59" style:family="text">
      <style:text-properties fo:color="#000000" loext:opacity="100%" fo:font-weight="normal" officeooo:rsid="0051b7ca" style:font-weight-asian="normal" style:font-weight-complex="normal"/>
    </style:style>
    <style:style style:name="T60" style:family="text">
      <style:text-properties fo:color="#000000" loext:opacity="100%" fo:font-weight="normal" officeooo:rsid="00521ac6" style:font-weight-asian="normal" style:font-weight-complex="normal"/>
    </style:style>
    <style:style style:name="T61" style:family="text">
      <style:text-properties fo:color="#000000" loext:opacity="100%" fo:font-weight="normal" officeooo:rsid="005607b2" style:font-weight-asian="normal" style:font-weight-complex="normal"/>
    </style:style>
    <style:style style:name="T62" style:family="text">
      <style:text-properties fo:color="#000000" loext:opacity="100%" fo:font-weight="normal" officeooo:rsid="0057e8fa" style:font-weight-asian="normal" style:font-weight-complex="normal"/>
    </style:style>
    <style:style style:name="T63" style:family="text">
      <style:text-properties fo:color="#bf0041" loext:opacity="100%" style:text-underline-style="none" fo:font-weight="bold" officeooo:rsid="006114f2" style:font-size-asian="12pt" style:font-weight-asian="bold" style:font-size-complex="12pt" style:font-weight-complex="bold"/>
    </style:style>
    <style:style style:name="T64" style:family="text">
      <style:text-properties fo:color="#bf0041" loext:opacity="100%" style:text-underline-style="none" fo:font-weight="bold" officeooo:rsid="00486f10" style:font-size-asian="12pt" style:font-weight-asian="bold" style:font-size-complex="12pt" style:font-weight-complex="bold"/>
    </style:style>
    <style:style style:name="T65" style:family="text">
      <style:text-properties fo:color="#000000" loext:opacity="100%" style:text-underline-style="none" fo:font-weight="normal" officeooo:rsid="0058cbad" style:font-size-asian="12pt" style:font-weight-asian="normal" style:font-size-complex="12pt" style:font-weight-complex="normal"/>
    </style:style>
    <style:style style:name="T66" style:family="text">
      <style:text-properties fo:color="#000000" loext:opacity="100%" fo:font-weight="normal" officeooo:rsid="005c12ad" style:font-weight-asian="normal" style:font-weight-complex="normal"/>
    </style:style>
    <style:style style:name="T67" style:family="text">
      <style:text-properties fo:color="#000000" loext:opacity="100%" fo:font-weight="normal" officeooo:rsid="005d8485" style:font-weight-asian="normal" style:font-weight-complex="normal"/>
    </style:style>
    <style:style style:name="T68" style:family="text">
      <style:text-properties fo:color="#000000" loext:opacity="100%" fo:font-style="italic" fo:font-weight="normal" officeooo:rsid="005d8485" style:font-style-asian="italic" style:font-weight-asian="normal" style:font-style-complex="italic" style:font-weight-complex="normal"/>
    </style:style>
    <style:style style:name="T69" style:family="text">
      <style:text-properties fo:color="#000000" loext:opacity="100%" fo:font-weight="normal" officeooo:rsid="00609696" style:font-weight-asian="normal" style:font-weight-complex="normal"/>
    </style:style>
    <style:style style:name="T70" style:family="text">
      <style:text-properties fo:color="#bf0041" loext:opacity="100%" fo:font-weight="bold" officeooo:rsid="006560cb" style:font-weight-asian="bold" style:font-weight-complex="bold"/>
    </style:style>
    <style:style style:name="T71" style:family="text">
      <style:text-properties fo:color="#000000" loext:opacity="100%" fo:font-weight="normal" officeooo:rsid="006560cb" style:font-weight-asian="normal" style:font-weight-complex="normal"/>
    </style:style>
    <style:style style:name="T72" style:family="text">
      <style:text-properties officeooo:rsid="006bca59"/>
    </style:style>
    <style:style style:name="T73" style:family="text">
      <style:text-properties fo:color="#000000" loext:opacity="100%" fo:font-weight="normal" officeooo:rsid="006bca59" style:font-weight-asian="normal" style:font-weight-complex="normal"/>
    </style:style>
    <style:style style:name="T74" style:family="text">
      <style:text-properties fo:color="#000000" loext:opacity="100%" fo:font-weight="normal" officeooo:rsid="001a24f8" style:font-weight-asian="normal" style:font-weight-complex="normal"/>
    </style:style>
    <style:style style:name="T75" style:family="text">
      <style:text-properties fo:color="#bf0041" loext:opacity="100%" fo:font-weight="bold" officeooo:rsid="006fe2a3" style:font-weight-asian="bold" style:font-weight-complex="bold"/>
    </style:style>
    <style:style style:name="T76" style:family="text">
      <style:text-properties fo:color="#000000" loext:opacity="100%" fo:font-weight="normal" officeooo:rsid="001b146e" style:font-weight-asian="normal" style:font-weight-complex="normal"/>
    </style:style>
    <style:style style:name="T77" style:family="text">
      <style:text-properties fo:color="#000000" loext:opacity="100%" fo:font-weight="normal" officeooo:rsid="001cd7d7" style:font-weight-asian="normal" style:font-weight-complex="normal"/>
    </style:style>
    <style:style style:name="T78" style:family="text">
      <style:text-properties fo:color="#000000" loext:opacity="100%" fo:font-weight="normal" officeooo:rsid="001d3cac" style:font-weight-asian="normal" style:font-weight-complex="normal"/>
    </style:style>
    <style:style style:name="T79" style:family="text">
      <style:text-properties officeooo:rsid="00701689"/>
    </style:style>
    <style:style style:name="T80" style:family="text">
      <style:text-properties fo:color="#000000" loext:opacity="100%" fo:font-weight="normal" officeooo:rsid="001dfb45" style:font-weight-asian="normal" style:font-weight-complex="normal"/>
    </style:style>
    <style:style style:name="T81" style:family="text">
      <style:text-properties fo:color="#000000" loext:opacity="100%" fo:font-weight="normal" officeooo:rsid="001f3b5f" style:font-weight-asian="normal" style:font-weight-complex="normal"/>
    </style:style>
    <style:style style:name="T82" style:family="text">
      <style:text-properties officeooo:rsid="00706b00"/>
    </style:style>
    <style:style style:name="T83" style:family="text">
      <style:text-properties fo:color="#000000" loext:opacity="100%" fo:font-weight="normal" officeooo:rsid="0020a0ef" style:font-weight-asian="normal" style:font-weight-complex="normal"/>
    </style:style>
    <style:style style:name="T84" style:family="text">
      <style:text-properties fo:color="#bf0041" loext:opacity="100%" style:text-underline-style="none" fo:font-weight="bold" officeooo:rsid="00707657" style:font-weight-asian="bold" style:font-weight-complex="bold"/>
    </style:style>
    <style:style style:name="T85" style:family="text">
      <style:text-properties fo:color="#bf0041" loext:opacity="100%" style:text-underline-style="none" fo:font-weight="bold" style:font-weight-asian="bold" style:font-weight-complex="bold"/>
    </style:style>
    <style:style style:name="T86" style:family="text">
      <style:text-properties officeooo:rsid="00237b4d"/>
    </style:style>
    <style:style style:name="T87" style:family="text">
      <style:text-properties fo:color="#bf0041" loext:opacity="100%" style:text-underline-style="none" fo:font-weight="bold" officeooo:rsid="0073fee8" style:font-weight-asian="bold" style:font-weight-complex="bold"/>
    </style:style>
    <style:style style:name="T88" style:family="text">
      <style:text-properties fo:color="#bf0041" loext:opacity="100%" fo:font-weight="bold" officeooo:rsid="007460be" style:font-weight-asian="bold" style:font-weight-complex="bold"/>
    </style:style>
    <style:style style:name="T89" style:family="text">
      <style:text-properties officeooo:rsid="0029b31b"/>
    </style:style>
    <style:style style:name="T90" style:family="text">
      <style:text-properties fo:font-size="10pt" style:text-underline-style="none" officeooo:rsid="002eec7c"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stituto Federal de Educação, Ciência e Tecnologia do Rio Grande do Sul</text:p>
      <text:p text:style-name="P2">Campus Erechim</text:p>
      <text:p text:style-name="P3"/>
      <text:p text:style-name="P4">Disciplina de <text:span text:style-name="T1">Banco de Dados II</text:span></text:p>
      <text:p text:style-name="P5">Prof. André Gustavo Schaeffer</text:p>
      <text:p text:style-name="P6"><text:a xlink:type="simple" xlink:href="mailto:andre_schaeffer@yahoo.com.br" text:style-name="Internet_20_link" text:visited-style-name="Visited_20_Internet_20_Link"><text:span text:style-name="T2">andre_schaeffer@yahoo.com.br</text:span></text:a></text:p>
      <text:p text:style-name="P5"/>
      <text:p text:style-name="P7"><text:span text:style-name="T3">Algumas das </text:span><text:span text:style-name="T4">questões abaixo já foram solicitadas em provas desta disciplina. Servem para você ter uma ideia do que pode ser cobrado </text:span><text:span text:style-name="T3">em termos “teóricos”. </text:span><text:span text:style-name="T4">Todas as respostas encontram-se ao final deste documento. </text:span><text:span text:style-name="T5">Cabe lembrar que vários exercícios importantes e suas respectivas respostas encontram-se nos slides dos conteúdos da disciplina, não tendo sido, necessariamente, copiados para esta lista.</text:span></text:p>
      <text:p text:style-name="P7"/>
      <text:p text:style-name="P8"><text:span text:style-name="T6">Parte 1 - <text:s/>Transações</text:span><text:span text:style-name="T7"> em Bancos de Dados</text:span></text:p>
      <text:p text:style-name="P9"/>
      <text:p text:style-name="P10">1) O que vem a ser um commit ?</text:p>
      <text:p text:style-name="P10"/>
      <text:p text:style-name="P10"><text:span text:style-name="T8">2</text:span>) O que vem a ser um rollback ?</text:p>
      <text:p text:style-name="P10"/>
      <text:p text:style-name="P10"><text:span text:style-name="T8">3</text:span>) Para que serve um savepoint ?</text:p>
      <text:p text:style-name="P10"/>
      <text:p text:style-name="P11"><text:span text:style-name="T8">4</text:span>) Um script tem os seguintes savepoints: savepoint <text:span text:style-name="T9">carga</text:span>, savepoint <text:span text:style-name="T9">atualizacao</text:span> e savepoint <text:span text:style-name="T9">finalizacao</text:span>, extamente nessa ordem, com alguns comandos DML entre eles. Ao final há um teste condicional que fara retorno ou não a um desses savepoints. Numa exceção, executará um rollback sem especificar o savepoint. O que acontecerá se um rollback for executado sem especificar um savepoint ?</text:p>
      <text:p text:style-name="P11"/>
      <text:p text:style-name="P12"><text:span text:style-name="T8">5</text:span>) O que vem a ser um lock em um banco de dados?</text:p>
      <text:p text:style-name="P12"/>
      <text:p text:style-name="P12"><text:span text:style-name="T8">6</text:span>) O que vem a ser um deadlock em um banco de dados?</text:p>
      <text:p text:style-name="P12"/>
      <text:p text:style-name="P12"><text:span text:style-name="T8">7</text:span>) Existe um limite máximo de comandos que podem ser executados antes de executar um commit ou um rollback?</text:p>
      <text:p text:style-name="P12"/>
      <text:p text:style-name="P13"><text:span text:style-name="T8">8</text:span>) A cláusula <text:span text:style-name="T9">for update nowait </text:span>é necessária para fazer uma atualização?</text:p>
      <text:p text:style-name="P13"/>
      <text:p text:style-name="P13"><text:span text:style-name="T8">9)</text:span> Pra que um programador usaria a cláusula <text:span text:style-name="T9">for update nowait</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4"><text:soft-page-break/><text:span text:style-name="T10">Parte 2 - <text:s/></text:span><text:span text:style-name="T11">Programação procedural – </text:span><text:span text:style-name="T10">PL-SQL</text:span></text:p>
      <text:p text:style-name="P9"/>
      <text:p text:style-name="P15"><text:span text:style-name="T12">51</text:span>) Num bloco PL-SQL podemos ter declaração de variáveis, <text:span text:style-name="T13">loops, </text:span><text:span text:style-name="T14">testes condicionais, etc., ou seja, tudo que uma linguagem de programação possui. Assim, qual a razão para que o Banco de Dados disponibilize programação procedural se a linguagem na qual a aplicação que conecta nele foi construída já faz isso? Ou seja, o programador poderia fazer todo o controle necessário dos dados na linguagem de programação sem que fosse necessário o BD disponibilizar tais recursos.</text:span></text:p>
      <text:p text:style-name="P9"/>
      <text:p text:style-name="P16"><text:span text:style-name="T12">52</text:span>) <text:span text:style-name="T15">No banco Oracle, executamos um bloco PLSQL que buscou o nome de um funcionário, mas o mesmo executou com sucesso sem mostrar nada na tela. Por quê?</text:span></text:p>
      <text:p text:style-name="P16"/>
      <text:p text:style-name="P17"><text:span text:style-name="T12">53</text:span>) Mas um bloco PLSQL faz a mesma coisa que um objeto armazenado, como uma trigger, uma função ou uma stored <text:span text:style-name="T16">procedure. Então por que </text:span><text:span text:style-name="T17">existem os blocos PLSQL escritos em arquivos-texto se os usuários finais da aplicação não vão criá-los ou programá-los?</text:span></text:p>
      <text:p text:style-name="P18"/>
      <text:p text:style-name="P19"><text:span text:style-name="T12">54</text:span>) Qual a diferença entre os dois tipo de declaração abaixo:</text:p>
      <text:p text:style-name="P19"/>
      <text:p text:style-name="P20">DECLARE <text:s/><text:tab/>v_sum_sal<text:tab/>emp.sal%type;</text:p>
      <text:p text:style-name="P20"/>
      <text:p text:style-name="P21"><text:span text:style-name="T18">DECLARE<text:tab/><text:tab/>v_sum_sal<text:tab/></text:span><text:span text:style-name="T19">number(6,2)</text:span><text:span text:style-name="T18">;</text:span></text:p>
      <text:p text:style-name="P22"><text:tab/></text:p>
      <text:p text:style-name="P23"><text:span text:style-name="T12">55</text:span>) Mas professor, ao analisar o bloco PLSQL abaixo</text:p>
      <text:p text:style-name="P24"><text:span text:style-name="T18"/></text:p>
      <text:p text:style-name="P25">DECLARE</text:p>
      <text:p text:style-name="P25"><text:tab/>v_sum_sal <text:s/>emp.sal%type;<text:tab/>v_deptn<text:span text:style-name="T20">o <text:s/></text:span>number not null := 10;</text:p>
      <text:p text:style-name="P26">BEGIN</text:p>
      <text:p text:style-name="P26"><text:tab/><text:span text:style-name="T18">select<text:tab/>sum(sal) </text:span></text:p>
      <text:p text:style-name="P25"><text:tab/>into<text:tab/>v_sum_sal</text:p>
      <text:p text:style-name="P25"><text:tab/>from <text:tab/>emp</text:p>
      <text:p text:style-name="P25"><text:tab/>where<text:tab/>deptno = v_deptno;</text:p>
      <text:p text:style-name="P26"><text:span text:style-name="T18"><text:tab/></text:span>dbms_output.put_line('Soma dos salarios: ' || to_char(v_sum_sal));</text:p>
      <text:p text:style-name="P26">END;</text:p>
      <text:p text:style-name="P26">/</text:p>
      <text:p text:style-name="P27"><text:span text:style-name="T18"/></text:p>
      <text:p text:style-name="P28">por que não fazer diretamente uma consulta SQL para saber isso? Complica demais fazer isso dentro de um bloco PLSQL.</text:p>
      <text:p text:style-name="P28"/>
      <text:p text:style-name="P29"><text:span text:style-name="T12">56</text:span>) <text:span text:style-name="T21">Sempre que abrimos o Terminal, iniciamos uma console Bash Shell do Linux no mesmo usuário que logamos na máquina, no caso oracle. Porém, por que precisamos sempre executar um su – oracle ?</text:span></text:p>
      <text:p text:style-name="P29"/>
      <text:p text:style-name="P30"><text:span text:style-name="T12">57</text:span>) <text:span text:style-name="T22">João começou a trabalhar em uma empresa na área de banco de dados e se deparou com a missão de executar o bloco abaixo:</text:span></text:p>
      <text:p text:style-name="P31"><text:span text:style-name="T23"/></text:p>
      <text:p text:style-name="P32">DECLARE</text:p>
      <text:p text:style-name="P32"><text:tab/><text:span text:style-name="T18">v_sal_increase<text:tab/>emp.sal%type := 2000;</text:span></text:p>
      <text:p text:style-name="P32">BEGIN</text:p>
      <text:p text:style-name="P32"><text:tab/><text:span text:style-name="T18">update<text:tab/>emp</text:span></text:p>
      <text:p text:style-name="P33"><text:tab/>set <text:tab/>sal = sal + v_sal_increase</text:p>
      <text:p text:style-name="P33"><text:tab/>where<text:tab/>job = 'ANALYST';</text:p>
      <text:p text:style-name="P33">END;</text:p>
      <text:p text:style-name="P34">/</text:p>
      <text:p text:style-name="P35"><text:span text:style-name="T24"/></text:p>
      <text:p text:style-name="P36">tendo recebido a mensagem PL/SQL procedure successfully completed. Para garantir que tudo ficasse certo, digitou mais 5 vezes a barrinha “/” seguido de ENTER, e obteve mais 5 mensagens PL/SQL procedure successfully completed. Feliz e seguro pelas confirmações de sucesso, foi embora. João fez alguma coisa errada?</text:p>
      <text:p text:style-name="P37"/>
      <text:p text:style-name="P38"><text:span text:style-name="T25">58</text:span><text:span text:style-name="T26">) </text:span><text:span text:style-name="T27">Qual a diferença entre </text:span><text:span text:style-name="T28">CREATE OR REPLACE PROCEDURE </text:span><text:span text:style-name="T29">e </text:span><text:span text:style-name="T28">CREATE PROCEDURE </text:span><text:span text:style-name="T29">ao se criar um procedimento armazenado no banco de dados Oracle?</text:span></text:p>
      <text:p text:style-name="P39"/>
      <text:p text:style-name="P40"><text:span text:style-name="T12">59</text:span>) Observe a execução da procedure a seguir:</text:p>
      <text:p text:style-name="P40"/>
      <text:p text:style-name="P40">SQL&gt; exec verifica_depto (10)</text:p>
      <text:p text:style-name="P40">PL/SQL procedure successfully completed.</text:p>
      <text:p text:style-name="P40"/>
      <text:p text:style-name="P40">Ela deveria ter exibido na console do SqlPlus os dados do departamento 10. O que pode ter acontecido já que ela executou com sucesso mas nada apareceu na tela?</text:p>
      <text:p text:style-name="P40"/>
      <text:p text:style-name="P41"><text:soft-page-break/><text:span text:style-name="T12">60</text:span>) <text:span text:style-name="T30">Observe a execução da função a seguir, que devolve o valor do menor salário entre os funcionários do cargo informado como parâmetro:</text:span></text:p>
      <text:p text:style-name="P41"/>
      <text:p text:style-name="P41">SQL&gt; exec f_menor_sal('CLERK')</text:p>
      <text:p text:style-name="P41">BEGIN f_menor_sal('CLERK'); END;</text:p>
      <text:p text:style-name="P41">ERROR at line 1:</text:p>
      <text:p text:style-name="P41">ORA-06550: line 1, column 7:</text:p>
      <text:p text:style-name="P41">PLS-00221: 'F_MENOR_SAL' is not a procedure or is undefined</text:p>
      <text:p text:style-name="P41">ORA-06550: line 1, column 7:</text:p>
      <text:p text:style-name="P41">PL/SQL: Statement ignored</text:p>
      <text:p text:style-name="P40"/>
      <text:p text:style-name="P42">Por que o erro ocorreu?</text:p>
      <text:p text:style-name="P42"/>
      <text:p text:style-name="P42"/>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3"><text:soft-page-break/>Parte 3 - <text:s/>Administração de Bancos de Dados</text:p>
      <text:p text:style-name="P9"/>
      <text:p text:style-name="P44">100) <text:span text:style-name="T31">O que são tablespaces no contexto dos bancos de dados Oracle?</text:span></text:p>
      <text:p text:style-name="P44"/>
      <text:p text:style-name="P45">101) Quais são os pontos importantes a serem analisados ao executar o comando ‘top’ do shell do Linux no contexto da administração de banco de dados?</text:p>
      <text:p text:style-name="P45"/>
      <text:p text:style-name="P46"><text:span text:style-name="T32">102) </text:span>Um usuário do departamento de Marketing chegou cedo pela manhã para preparar um relatório para a nova campanha de vendas, mas está recebendo o seguinte erro ao acessar o sistema:</text:p>
      <text:p text:style-name="P46"/>
      <text:p text:style-name="P46">ORA-01034: ORACLE not available. ORA-27101: shared memory realm does not exist</text:p>
      <text:p text:style-name="P46"/>
      <text:p text:style-name="P46">O que pode estar acontecendo?</text:p>
      <text:p text:style-name="P44"/>
      <text:p text:style-name="P47">103) <text:span text:style-name="T33">Um usuário da contabilidade ligou para o departamento de informática reportando que não consegue entrar no sistema. A aplicação dá mensagem “Não foi possível acessar o banco de dados”. Lá na Informática, o operador conecta na console do sistema Linux onde o banco de dados está instalado e executa um sqlplus central/opcent001 e conecta com o banco de dados normalmente no usuário “central” com a senha “opcent001”. O que pode estar acontecendo?</text:span></text:p>
      <text:p text:style-name="P48"/>
      <text:p text:style-name="P49">104) <text:span text:style-name="T34">Um usuário do RH está tentando conectar ao sistema e afirma não estar conseguindo. Também afirma que seu colega de trabalho na mesa ao lado está conectando normalmente, e que ao final do expediente no dia anterior o pessoal do suporte reformatou seu computador. Está tendo a mensagem de erro ERROR: ORA-12560: TNS:protocol adapter error. O que pode estar acontecendo?</text:span></text:p>
      <text:p text:style-name="P50"/>
      <text:p text:style-name="P51">105) <text:span text:style-name="T35">O suporte de informática corrigiu a mensagem de erro ocorrida na questão anterior, ajustando o IP do servidor de banco de dados que estava configurado errado na máquina do usuário. Só que agora a mensagem de erro mudou para ERROR: ORA-12541: TNS:no listener. Mas se a máquina do colega desse usuário conecta normalmente, não é problema de Listener. Faltou algum configuração?</text:span></text:p>
      <text:p text:style-name="P52"/>
      <text:p text:style-name="P53">106) <text:span text:style-name="T36">Então parece que iniciar o banco de dados, iniciar o Listener, <text:s/>desativar o banco de dados, desativar o Listener, etc., são tarefas importantes, mas não podemos criar uma sequência de comandos que faça tudo isso de maneira mais fácil, sem precisar ficar digitando tudo todos os dias? Como?</text:span></text:p>
      <text:p text:style-name="P9"/>
      <text:p text:style-name="P54">107) <text:span text:style-name="T37">Mas ter que fazer isso todos os dias no mesmo horário pode não ser possível. Não podemos agendar para que isso seja feito automaticamente?</text:span></text:p>
      <text:p text:style-name="P55"/>
      <text:p text:style-name="P56"><text:span text:style-name="T38">108</text:span>) Queremos executar o <text:span text:style-name="T9">sqlldr</text:span>, que é o aplicativo que faz carga de dados para tabelas do BD a partir de arquivos-texto. Estamos logados no usuário “aluno” <text:span text:style-name="T39">do Linux </text:span>e executamos o Terminal. Ao digitar o nome do programa seguido de ENTER, ocorre “sqlldr: command not found”. Mas temos certeza que o aplicativo foi instalado na máquina <text:span text:style-name="T40">e pelo próprio usuário “aluno”</text:span>. Alguma sugestão?</text:p>
      <text:p text:style-name="P56"/>
      <text:p text:style-name="P57"><text:span text:style-name="T38">109</text:span>) Agora temos um programa com nome abc.sh no diretório /home/aluno e estamos no Terminal exatamente neste diretório, só que digitamos abc.sh seguido de ENTER e dá erro de “abc.sh: command not found”. Alguma sugestão?</text:p>
      <text:p text:style-name="P56"/>
      <text:p text:style-name="P58"><text:span text:style-name="T38">110</text:span>) Em um script há o comando <text:span text:style-name="T41">sqlplus matriz/m2025 </text:span>e pergunta-se: o que significa cada uma dessas coisas?</text:p>
      <text:p text:style-name="P58"/>
      <text:p text:style-name="P10"/>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9"><text:soft-page-break/>Respostas</text:p>
      <text:p text:style-name="P60"/>
      <text:p text:style-name="P61"><text:span text:style-name="T42">1</text:span><text:span text:style-name="T43">) </text:span><text:span text:style-name="T24">Um COMMIT no banco de dados Oracle (e em outros bancos relacionais) é um comando que confirma todas as alterações feitas por uma transação e torna essas mudanças permanentes.</text:span></text:p>
      <text:p text:style-name="P61"/>
      <text:p text:style-name="P61"><text:span text:style-name="T44">2</text:span><text:span text:style-name="T43">) </text:span>O ROLLBACK é um comando no banco de dados que desfaz todas as alterações feitas por uma transação antes de um COMMIT. Ele reverte as mudanças e retorna os dados ao estado original, como se a transação nunca tivesse ocorrido.</text:p>
      <text:p text:style-name="P61"/>
      <text:p text:style-name="P61"><text:span text:style-name="T44">3</text:span><text:span text:style-name="T43">) </text:span>Um SAVEPOINT no banco de dados é um marcador dentro de uma transação que permite desfazer apenas uma parte dela usando ROLLBACK TO SAVEPOINT sem reverter toda a transação.</text:p>
      <text:p text:style-name="P61"/>
      <text:p text:style-name="P61"><text:span text:style-name="T44">4</text:span><text:span text:style-name="T43">) </text:span>Se um ROLLBACK for executado sem especificar um savepoint, toda a transação será desfeita, desde o início, eliminando todas as operações DML (como INSERT, UPDATE, DELETE) realizadas antes dos savepoints.</text:p>
      <text:p text:style-name="P61"/>
      <text:p text:style-name="P61"><text:span text:style-name="T44">5</text:span><text:span text:style-name="T43">) </text:span>Um lock (bloqueio) em um banco de dados é uma técnica usada para garantir a integridade dos dados e evitar conflitos quando múltiplas transações tentam acessar os mesmos dados ao mesmo tempo. O lock impede que uma transação interfira na execução de outra, garantindo que a execução seja consistente e isolada, conforme o modelo ACID (Atomicidade, Consistência, Isolamento, Durabilidade).</text:p>
      <text:p text:style-name="P61"/>
      <text:p text:style-name="P61"><text:span text:style-name="T44">6</text:span><text:span text:style-name="T43">) </text:span>Um deadlock em um banco de dados ocorre quando duas ou mais transações ficam bloqueadas indefinidamente, esperando uma pela outra liberar recursos (como registros ou tabelas) que são necessários para continuar sua execução. Isso cria um ciclo de dependência onde nenhuma das transações pode prosseguir.</text:p>
      <text:p text:style-name="P61"/>
      <text:p text:style-name="P61"><text:span text:style-name="T44">7</text:span><text:span text:style-name="T43">) </text:span>Em sistemas de banco de dados, não há um limite fixo de comandos que podem ser executados antes de um COMMIT ou ROLLBACK ser necessário. O que realmente importa são os recursos de memória, a configuração do banco de dados e as restrições de transação. <text:span text:style-name="T45">Esta questão é bem interessante mas no ORACLE toca em pontos mais avançados do BD, como as chamadas áreas de ROLLBACK, comandos COPYCOMMIT, e REDO LOG BUFFERS e problemas de leituras consistentes que podem vir a gerar o famos ORA - </text:span><text:span text:style-name="T46">0</text:span><text:span text:style-name="T45">1555 – Snapshot Too Old. </text:span></text:p>
      <text:p text:style-name="P61"/>
      <text:p text:style-name="P61"><text:span text:style-name="T44">8</text:span><text:span text:style-name="T43">) </text:span>Não, a cláusula FOR UPDATE NOWAIT não é necessária para realizar uma atualização em um banco de dados. A cláusula FOR UPDATE é usada especificamente para bloquear as linhas selecionadas para que elas não possam ser modificadas por outras transações enquanto a transação atual estiver em andamento. A parte NOWAIT indica que, caso as linhas já estejam bloqueadas por outra transação, <text:span text:style-name="T47">a sessão </text:span>não aguardará e retornará imediatamente um erro.</text:p>
      <text:p text:style-name="P61"/>
      <text:p text:style-name="P61"><text:span text:style-name="T44">9</text:span><text:span text:style-name="T43">) </text:span>Um programador usaria a cláusula FOR UPDATE NOWAIT para controlar o acesso concorrente a dados em um banco de dados, especialmente quando se deseja garantir que uma transação não aguarde por bloqueios de outras transações, mas sim falhe imediatamente caso os dados estejam sendo usados por outra transação. Ela é útil em cenários onde é importante evitar bloqueios indefinidos e garantir a integridade e consistência dos dados sem que a transação fique bloqueada por muito tempo.</text:p>
      <text:p text:style-name="P61"/>
      <text:p text:style-name="P62"/>
      <text:p text:style-name="P62"/>
      <text:p text:style-name="P62"/>
      <text:p text:style-name="P62"/>
      <text:p text:style-name="P63"><text:span text:style-name="T48"/></text:p>
      <text:p text:style-name="P63"><text:span text:style-name="T49">51</text:span><text:span text:style-name="T43">) </text:span><text:span text:style-name="T9">Eficiência e Performance</text:span>: menos tráfego entre aplicação e BD - quando a lógica de negócio está na aplicação, cada consulta SQL exige comunicação com o banco. Se houver muitas interações, isso pode gerar latência e tráfego excessivo. Com PL/SQL (Oracle), T-SQL (Microsoft SQL Server e Azure SQL Database) ou outra linguagem procedural no BD, é possível processar dados internamente, reduzindo a quantidade de chamadas entre a aplicação e o banco. <text:span text:style-name="T9">Segurança e Controle de Acesso</text:span>: algumas regras de negócio são críticas e não devem depender apenas do código da aplicação (que pode ser alterado ou vulnerável). No banco, gatilhos (triggers), funções e procedures garantem que certos processos ocorram independentemente da aplicação. Isso evita que um desenvolvedor mal-intencionado ou um erro de aplicação ignore validações importantes. <text:span text:style-name="T9">Reutilização e Centralização da Lógica de Negócio: </text:span><text:span text:style-name="T50">e</text:span>m sistemas grandes, várias aplicações podem acessar o mesmo banco de dados (exemplo: um ERP, um sistema web e um aplicativo mobile). Se a lógica de negócio estiver na aplicação, cada sistema precisaria replicar essas regras, aumentando a complexidade e o risco de inconsistências. Se a lógica estiver no banco, qualquer aplicação que se conectar ao BD já segue as regras definidas. <text:span text:style-name="T9">Facilidade de Manutenção e Evolução: </text:span><text:span text:style-name="T51">s</text:span>e a lógica estiver no banco, pequenas mudanças podem ser feitas sem precisar recompilar e redistribuir o código da aplicação. Correções de bugs ou novas regras podem ser implementadas em procedures, sem impactar o código do sistema. <text:span text:style-name="T9">Execução Assíncrona e Automática </text:span>(Triggers e Jobs): <text:span text:style-name="T52">a</text:span>lgumas operações precisam ser executadas automaticamente, sem depender da aplicação.<text:line-break/>Triggers podem validar e modificar dados automaticamente após uma inserção ou atualização.<text:line-break/><text:soft-page-break/>Jobs agendados podem rodar processos noturnos sem precisar de uma aplicação ativa. <text:span text:style-name="T9">Melhor Uso de Recursos do Servidor: </text:span><text:span text:style-name="T50">o</text:span> banco de dados é otimizado para lidar com grandes volumes de dados de forma eficiente.<text:line-break/>Se cálculos complexos forem feitos no banco, o servidor da aplicação fica menos sobrecarregado.<text:line-break/>Bancos como Oracle e PostgreSQL possuem recursos específicos que tornam execuções internas mais rápidas que a interação com a aplicação.</text:p>
      <text:p text:style-name="P64"/>
      <text:p text:style-name="P65"><text:span text:style-name="T49">52</text:span><text:span text:style-name="T43">) </text:span><text:span text:style-name="T53">Duas coisas precisam acontecer para isso. O resultado do SQL executado, e que foi colocado em uma variável, precisa ser exibido através do comando DBMS_OUTPUT.PUT_LINE. Além disso, a console do SQLPLUS precisa estar configurada para exibir tais mensagens através do comando </text:span><text:span text:style-name="T54">set serverout on</text:span><text:span text:style-name="T53">.</text:span></text:p>
      <text:p text:style-name="P65"><text:span text:style-name="T53"/></text:p>
      <text:p text:style-name="P66"><text:span text:style-name="T49">53</text:span><text:span text:style-name="T55">) </text:span><text:span text:style-name="T53">A existência de blocos PL/SQL escritos em arquivos-texto pode parecer redundante, já que objetos armazenados (procedures, funções, triggers) cumprem um papel semelhante. No entanto, há razões práticas e estratégicas para essa abordagem. </text:span><text:span text:style-name="T54">Execução Ad Hoc e Testes: </text:span><text:span text:style-name="T56">d</text:span><text:span text:style-name="T53">urante o desenvolvimento, um DBA ou programador pode precisar testar lógicas rapidamente sem criar objetos permanentes no banco. Blocos PL/SQL anônimos permitem testar funcionalidades sem poluir o banco com procedures temporárias. </text:span><text:span text:style-name="T54">Scripts de Automação e Manutenção: </text:span><text:span text:style-name="T56">a</text:span><text:span text:style-name="T53">rquivos-texto contendo PL/SQL são úteis para tarefas administrativas, como backup, auditoria e ajustes no banco de dados.<text:line-break/>Podem ser executados periodicamente sem necessidade de criar objetos armazenados. </text:span><text:span text:style-name="T57">Assim, fica claro que os blocos PLSQL não interessam aos usuários finais, e sim aos desenvolvedores, analistas e administradores da área da TI.</text:span></text:p>
      <text:p text:style-name="P66"><text:span text:style-name="T53"/></text:p>
      <text:p text:style-name="P66"><text:span text:style-name="T49">54</text:span><text:span text:style-name="T55">) </text:span><text:span text:style-name="T53">A diferença entre as duas declarações está no tipo de dado e como ele é definido:</text:span></text:p>
      <text:p text:style-name="P66"><text:span text:style-name="T53"/></text:p>
      <text:p text:style-name="P66"><text:span text:style-name="T54">DECLARE v_sum_sal emp.sal%type; </text:span><text:span text:style-name="T53">- </text:span><text:span text:style-name="T58">a</text:span><text:span text:style-name="T53">qui, o tipo de v_sum_sal é dinâmico e é baseado no tipo da coluna sal da tabela emp. Ou seja, o tipo de dado de v_sum_sal será exatamente o tipo da coluna sal, o que garante que, se o tipo da coluna mudar no futuro (por exemplo, se a coluna sal for alterada de NUMBER(6,2) para outro tipo), a variável v_sum_sal será automaticamente compatível com a alteração. Isso é útil para garantir que a variável tenha o mesmo tipo de dados da tabela, evitando discrepâncias e erros de tipo. </text:span><text:span text:style-name="T58">Já em </text:span><text:span text:style-name="T54">DECLARE v_sum_sal number(6,2);</text:span><text:span text:style-name="T53"> , v_sum_sal é declarado com o tipo estático NUMBER(6,2), ou seja, a variável será do tipo NUMBER com 6 dígitos no total e 2 casas decimais. Este tipo é fixo e não será alterado automaticamente, mesmo que o tipo da coluna sal na tabela emp seja alterado. </text:span><text:span text:style-name="T58">Só pelo dinamismo que se ganha, usar o atributo %type sempre é melhor. </text:span></text:p>
      <text:p text:style-name="P66"><text:span text:style-name="T53"/></text:p>
      <text:p text:style-name="P66"><text:span text:style-name="T49">55</text:span><text:span text:style-name="T55">) </text:span><text:span text:style-name="T59">Certamente! Para o propósito em questão, de apenas buscar uma informação e mostrar na tela, pega-se e executa-se diretamente o SQL, sem bloco PLSQL. Esses blocos assim apresentados são usados somente </text:span><text:span text:style-name="T60">para fins didáticos.</text:span></text:p>
      <text:p text:style-name="P66"><text:span text:style-name="T53"/></text:p>
      <text:p text:style-name="P66"><text:span text:style-name="T49">56</text:span><text:span text:style-name="T55">) </text:span><text:span text:style-name="T61">su – oracle faz com que as variáveis de ambiente do usuário oracle sejam carregadas. Aparentemente, o Terminal d</text:span><text:span text:style-name="T62">o</text:span><text:span text:style-name="T61"> Ubuntu, quando aberto, cria uma sessão Bash Shell do Linux mas não carrega as variáveis de ambiente do usuário logado. Uma das variáveis de ambiente em questão é justamente o PATH onde o sistema deve procurar por aplicativos cujos nomes são digitados na linha de comando. O sqlplus, por exemplo, quando o PATH é “carregado”, passa a ser visível pela sessão. Caso contrário, o sqlplus não consegue ser localizado.</text:span></text:p>
      <text:p text:style-name="P66"><text:span text:style-name="T53"/></text:p>
      <text:p text:style-name="P67"><text:span text:style-name="T63">57</text:span><text:span text:style-name="T64">) </text:span><text:span text:style-name="T65">Certamente! Era para ele aumentar em R$ 2.000,00 o salário de todos os analistas e, quando executou o bloco mais 5 vezes, concedeu mais 5 * 2000 = R$ 10.000,00 a mais para o salário de todos os analistas. </text:span></text:p>
      <text:p text:style-name="P66"><text:span text:style-name="T53"/></text:p>
      <text:p text:style-name="P66"><text:span text:style-name="T49">58</text:span><text:span text:style-name="T55">) </text:span><text:span text:style-name="T53">CREATE PROCEDURE </text:span><text:span text:style-name="T66">c</text:span><text:span text:style-name="T53">ria uma nova procedure. Dá erro se a procedure já existir. CREATE OR REPLACE PROCEDURE </text:span><text:span text:style-name="T66">c</text:span><text:span text:style-name="T53">ria uma nova procedure ou substitui a existente, se já existir.</text:span></text:p>
      <text:p text:style-name="P66"><text:span text:style-name="T53"/></text:p>
      <text:p text:style-name="P66"><text:span text:style-name="T49">59</text:span><text:span text:style-name="T55">) </text:span><text:span text:style-name="T67">Se a procedure estava de fato exibindo saídas na tela com</text:span><text:span text:style-name="T68"> dbms_output.put_lin</text:span><text:span text:style-name="T67">e então faltou configurar a sessão do SqlPlus com </text:span><text:span text:style-name="T68">set serverout on</text:span><text:span text:style-name="T67">.</text:span></text:p>
      <text:p text:style-name="P66"><text:span text:style-name="T53"/></text:p>
      <text:p text:style-name="P66"><text:span text:style-name="T49">60</text:span><text:span text:style-name="T55">) </text:span><text:span text:style-name="T69">Não podemos executar uma função da mesma forma que uma procedure. A função deve ser usada em uma cláusula WHERE na forma de um operando ou em uma cláusula SELECT na forma de uma coluna.</text:span></text:p>
      <text:p text:style-name="P66"><text:span text:style-name="T53"/></text:p>
      <text:p text:style-name="P62"/>
      <text:p text:style-name="P62"><text:span text:style-name="T55"/></text:p>
      <text:p text:style-name="P62"/>
      <text:p text:style-name="P62"/>
      <text:p text:style-name="P62"/>
      <text:p text:style-name="P62"/>
      <text:p text:style-name="P62"><text:span text:style-name="T55"/></text:p>
      <text:p text:style-name="P66"><text:span text:style-name="T70">100</text:span><text:span text:style-name="T55">)</text:span><text:span text:style-name="T53"> <text:s/>Em bancos de dados Oracle, tablespaces são estruturas de armazenamento que funcionam como contêineres lógicos para organizar e gerenciar dados físicos. Eles abstraem os arquivos físicos do sistema operacional, permitindo que os administradores de banco de dados (DBAs) gerenciem o armazenamento. Um</text:span><text:span text:style-name="T71">a</text:span><text:span text:style-name="T53"> tablespace é uma unidade lógica que agrupa </text:span><text:span text:style-name="T71">s</text:span><text:span text:style-name="T53">egmentos de dados </text:span><text:span text:style-name="T71">(t</text:span><text:span text:style-name="T53">abelas, índices, objetos, </text:span><text:span text:style-name="T71">códigos, </text:span><text:span text:style-name="T53">etc.</text:span><text:span text:style-name="T71">). São compostas por a</text:span><text:span text:style-name="T53">rquivos de dados (.dbf) </text:span><text:span text:style-name="T71">chamados de datafiles. Podem conter 1 ou n datafiles. </text:span></text:p>
      <text:p text:style-name="P66"><text:soft-page-break/><text:span text:style-name="T53"/></text:p>
      <text:p text:style-name="P68"><text:span text:style-name="T72">101</text:span>)<text:span text:style-name="T24"> </text:span></text:p>
      <text:p text:style-name="P68"><text:span text:style-name="T24">1. Uso de CPU (%CPU): </text:span><text:span text:style-name="T73">v</text:span><text:span text:style-name="T24">erificar se o processo do banco de dados (como mysqld, postgres, oracle, etc.) está consumindo muita CPU. Alto uso contínuo pode indicar </text:span><text:span text:style-name="T73">c</text:span><text:span text:style-name="T24">onsultas mal otimizadas, </text:span><text:span text:style-name="T73">ín</text:span><text:span text:style-name="T24">dices faltando, </text:span><text:span text:style-name="T73">l</text:span><text:span text:style-name="T24">ocks excessivos, </text:span><text:span text:style-name="T73">o</text:span><text:span text:style-name="T24">perações intensivas (backups, grandes inserções, etc.).<text:line-break/><text:line-break/>2. Uso de Memória (%MEM, RES, VIRT). RES (Resident Memory): memória real que o processo está ocupando. VIRT (Virtual Memory): inclui memória mapeada que nem sempre está realmente alocada. Avaliar se o banco está consumindo muita memória física, o que pode </text:span><text:span text:style-name="T73">r</text:span><text:span text:style-name="T24">eduzir a memória disponível para o sistema e outros processos </text:span><text:span text:style-name="T73">e f</text:span><text:span text:style-name="T24">orçar o Linux a começar a usar swap, prejudicando o desempenho.<text:line-break/><text:line-break/>3. Carga do Sistema (load average)<text:line-break/>Os três números exibidos na linha superior (load average: 1.15, 0.90, 0.70) representam a carga do sistema nos últimos 1, 5 e 15 minutos.<text:line-break/><text:line-break/>4. Uso de Swap (memória swap em uso). Se SWAP começa a ser utilizada, </text:span><text:span text:style-name="T73">i</text:span><text:span text:style-name="T24">ndica que a RAM foi insuficiente. <text:line-break/>A performance do banco de dados pode despencar. Idealmente o banco de dados deveria operar sem usar swap.<text:line-break/><text:line-break/>5. Identificação de Processos Pesados<text:line-break/>Observar processos com uso excessivo de CPU, memória ou IO. Em servidores de banco de dados, normalmente poucos processos (ou um só) são muito relevantes. Pode ser útil reorganizar a visualização (Shift + P para ordenar por CPU, Shift + M por memória).<text:line-break/><text:line-break/>6. Zumbis ou Deadlocks<text:line-break/>Verificar se há processos zumbis (state = Z) que possam indicar </text:span><text:span text:style-name="T73">p</text:span><text:span text:style-name="T24">roblemas de gerenciamento de conexões, </text:span><text:span text:style-name="T73">t</text:span><text:span text:style-name="T24">ravas ou deadlocks no banco.<text:line-break/><text:line-break/>7. Tempo de Atividade (TIME+): </text:span><text:span text:style-name="T73">u</text:span><text:span text:style-name="T24">m processo de banco que está usando CPU por muito tempo sem liberar pode estar executando </text:span><text:span text:style-name="T73">u</text:span><text:span text:style-name="T24">ma consulta pesada/travada, </text:span><text:span text:style-name="T73">u</text:span><text:span text:style-name="T24">m backup, reindexação, ou outra tarefa administrativa longa. Avaliar se é normal ou se precisa de intervenção.<text:line-break/><text:line-break/>8. Estado do Processo (S coluna)<text:line-break/>R (Running) — em execução.<text:line-break/>S (Sleeping) — dormindo (normal para muitos bancos de dados aguardando requisições).<text:line-break/>D (Uninterruptible Sleep) — geralmente esperando IO de disco (pode indicar gargalos de IO).<text:line-break/><text:line-break/>Muitos processos em D → atenção ao disco!<text:line-break/><text:line-break/>9. Utilização de Disco e I/O (não mostrado diretamente no top, mas relacionado). Para análise profunda de I/O, o comando iotop é melhor. No entanto, no top, se muitos processos estão em "D" (esperando I/O), é um alerta para investigar o subsistema de discos. Banco de dados com problemas de disco mostra lentidão geral, locks e timeouts.</text:span></text:p>
      <text:p text:style-name="P66"><text:span text:style-name="T53"/></text:p>
      <text:p text:style-name="P66"><text:span text:style-name="T53"/></text:p>
      <text:p text:style-name="P69"><text:span text:style-name="T32">102</text:span>) <text:span text:style-name="T74">O erro que o usuário do departamento de Marketing está enfrentando, ORA-01034: ORACLE not available combinado com ORA-27101: shared memory realm does not exist, indica que o banco de dados Oracle não está disponível no momento. Possíveis Causas: Instância do Oracle não está em execução; o banco de dados pode não ter sido iniciado após uma reinicialização do servidor ou por algum problema anterior. Isso faz com que a memória compartilhada (shared memory realm) não seja alocada, resultando no erro ORA-27101.</text:span></text:p>
      <text:p text:style-name="P70"/>
      <text:p text:style-name="P71"><text:span text:style-name="T75">103</text:span><text:span text:style-name="T43">) </text:span><text:span text:style-name="T76">O processo do Listener está fora do ar. Isso pode acontecer por diversas razões, mas o </text:span><text:span text:style-name="T77">L</text:span><text:span text:style-name="T76">istener é responsável por estabelecer as conexões cliente/servidor, e estando fora do ar isso não é possível. O operador conseguiu conectar porque a conexão sqlplus que ele fez dentro da própria máquina hospeira do BD não usou o processo do Listener porque não precisava dos serviços de rede já que a máquina era a mesma que hospedava o BD. </text:span><text:span text:style-name="T78">Ele fez uma chada “conexão loopback”. </text:span><text:span text:style-name="T76">Se a aplicação capturasse a mensagem de erro do BD, ela exibiria a mensagem ORA-12541: TNS:no listener e facilitaria muito a resolução do problema.</text:span></text:p>
      <text:p text:style-name="P66"><text:span text:style-name="T53"/></text:p>
      <text:p text:style-name="P72"><text:span text:style-name="T79">104</text:span>) <text:span text:style-name="T80">Tal mensagem é um pouco genérica, mas dado o contexto pode ser que a estação de trabalho do usuário não esteja enxergando o servidor de banco de dados pela rede ou mesmo o cliente do banco de dados esteja configurado de maneira errada. Por exemplo, o hostname ou IP do ser</text:span><text:span text:style-name="T81">vidor de BD pode estar errado, com um número errado ou com um nome errado. O comando PING executado no Windows ou no Linux/Unix do usuário poderia confirmar isso.</text:span></text:p>
      <text:p text:style-name="P73"><text:span text:style-name="T53"/></text:p>
      <text:p text:style-name="P62"><text:span text:style-name="T82">105</text:span>) <text:span text:style-name="T83">Sim, nesse caso, a máquina do usuário já está enxergando corretamente o servidor de banco de dados pela rede mas a porta do Listener que foi configurada para a máquina cliente está errada. Por exemplo, a máquina do usuário pode </text:span><text:soft-page-break/><text:span text:style-name="T83">ter sido configurada para conectar com um Listener na porta 1525 e o processo Listener lá no servidor de BD está “ouvindo” na porta 1521. Isso ocasionaria esse erro. Basta mudar na máquina do usuário a configuração para que a mesma acesse a porta correta.</text:span></text:p>
      <text:p text:style-name="P74"/>
      <text:p text:style-name="P75"><text:span text:style-name="T84">106</text:span><text:span text:style-name="T85">) </text:span><text:span text:style-name="T86">Sim, podemos, através dos chamados scripts do sistema operacional. No Linux e no Unix, temos os Shell Scripts (.csh, .ksh. .sh, etc), e no Windows temos os Batch Scripts (.bat).</text:span></text:p>
      <text:p text:style-name="P76"/>
      <text:p text:style-name="P77"><text:span text:style-name="T87">107</text:span><text:span text:style-name="T85">) </text:span><text:span text:style-name="T37">Podemos, certamente. No Windows através do Agendador de Tarefas e no Linux/Unix através da Crontab.</text:span></text:p>
      <text:p text:style-name="P78"><text:span text:style-name="T53"/></text:p>
      <text:p text:style-name="P79"><text:span text:style-name="T88">108</text:span><text:span text:style-name="T43">) </text:span>A primeira coisa óbvia a saber é se o nome do programa está correto. Se sim, digitar o nome do programa <text:span text:style-name="T89">na linha de comando fará com que o Linux procure no “caminho” se existe um programa com esse nome. Se sim, e se o usuário tem permissões para isso, ele executa o mesmo. Então seria interessante executa echo $PATH para verificar se o referido programa encontra-se em algum diretório listado no PATH.</text:span></text:p>
      <text:p text:style-name="P79"/>
      <text:p text:style-name="P57"><text:span text:style-name="T88">109</text:span><text:span text:style-name="T43">) </text:span>Existem somente duas coisas a serem consideradas agora: 1, se o usuário logado no Terminal tem permissões para executar o programa/script e 2, assegurar que o mesmo seja referenciado de forma absoluta ou relativa, ou seja <text:span text:style-name="T41">/home/aluno/abc.sh</text:span> ou <text:span text:style-name="T41">./abc.sh</text:span></text:p>
      <text:p text:style-name="P79"/>
      <text:p text:style-name="P80"><text:span text:style-name="T88">110</text:span><text:span text:style-name="T43">) </text:span>sqlplus é o nome do aplicativo que servirá de interface com o SGBD, no caso o Oracle. matriz é o nome do usuário do banco de dados ao qual estaremos nos conectando, e m2025 é a senha do mesmo. A barrinha só separa sintaticamente o nome do usuário de sua senha. Se a senha for omitida, será solicitada na sequência sem eco na tela.</text:p>
      <text:p text:style-name="P81"><text:span text:style-name="T90"/></text:p>
      <text:p text:style-name="P81"/>
      <text:p text:style-name="P82"><text:span text:style-name="T53"/></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Normal"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fo:font-size="12pt" style:font-size-asian="12pt"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14">
      <number:number number:decimal-places="4" number:min-decimal-places="4" number:min-integer-digits="1"/>
    </number:number-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18T15:35:49.502000000</meta:creation-date>
    <dc:date>2026-01-29T10:56:37.598000000</dc:date>
    <meta:editing-duration>P3DT2H37M52S</meta:editing-duration>
    <meta:editing-cycles>93</meta:editing-cycles>
    <meta:generator>LibreOffice/24.8.4.2$Windows_X86_64 LibreOffice_project/bb3cfa12c7b1bf994ecc5649a80400d06cd71002</meta:generator>
    <meta:document-statistic meta:table-count="0" meta:image-count="0" meta:object-count="0" meta:page-count="8" meta:paragraph-count="108" meta:word-count="3650" meta:character-count="22283" meta:non-whitespace-character-count="18694"/>
  </office:meta>
</office:document-meta>
</file>